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 manifest:media-type="application/vnd.sun.star.oleobject"/>
  <manifest:file-entry manifest:full-path="Object 4" manifest:media-type="application/vnd.sun.star.oleobject"/>
  <manifest:file-entry manifest:full-path="Basic/Standard/script-lb.xml" manifest:media-type="text/xml"/>
  <manifest:file-entry manifest:full-path="Basic/Project/Módulo1.xml" manifest:media-type="text/xml"/>
  <manifest:file-entry manifest:full-path="Basic/Project/Módulo2.xml" manifest:media-type="text/xml"/>
  <manifest:file-entry manifest:full-path="Basic/Project/script-lb.xml" manifest:media-type="text/xml"/>
  <manifest:file-entry manifest:full-path="Basic/Project/ThisDocument.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1" manifest:media-type="application/vnd.sun.star.oleobject"/>
  <manifest:file-entry manifest:full-path="ObjectReplacements/Object 31" manifest:media-type="application/x-openoffice-wmf;windows_formatname=&quot;Image WMF&quot;"/>
  <manifest:file-entry manifest:full-path="ObjectReplacements/Object 1" manifest:media-type=""/>
  <manifest:file-entry manifest:full-path="ObjectReplacements/Object 9" manifest:media-type=""/>
  <manifest:file-entry manifest:full-path="ObjectReplacements/Object 34" manifest:media-type="application/x-openoffice-wmf;windows_formatname=&quot;Image WMF&quot;"/>
  <manifest:file-entry manifest:full-path="ObjectReplacements/Object 4" manifest:media-type=""/>
  <manifest:file-entry manifest:full-path="ObjectReplacements/Object 35" manifest:media-type="application/x-openoffice-wmf;windows_formatname=&quot;Image WMF&quot;"/>
  <manifest:file-entry manifest:full-path="ObjectReplacements/Object 5" manifest:media-type=""/>
  <manifest:file-entry manifest:full-path="ObjectReplacements/Object 6" manifest:media-type="application/x-openoffice-wmf;windows_formatname=&quot;Image WMF&quot;"/>
  <manifest:file-entry manifest:full-path="ObjectReplacements/Object 36" manifest:media-type="application/x-openoffice-wmf;windows_formatname=&quot;Image WMF&quot;"/>
  <manifest:file-entry manifest:full-path="ObjectReplacements/Object 10" manifest:media-type=""/>
  <manifest:file-entry manifest:full-path="ObjectReplacements/Object 11" manifest:media-type=""/>
  <manifest:file-entry manifest:full-path="ObjectReplacements/Object 7" manifest:media-type=""/>
  <manifest:file-entry manifest:full-path="ObjectReplacements/Object 37" manifest:media-type="application/x-openoffice-wmf;windows_formatname=&quot;Image WMF&quot;"/>
  <manifest:file-entry manifest:full-path="ObjectReplacements/Object 8" manifest:media-type=""/>
  <manifest:file-entry manifest:full-path="ObjectReplacements/Object 12" manifest:media-type="application/x-openoffice-wmf;windows_formatname=&quot;Image WMF&quot;"/>
  <manifest:file-entry manifest:full-path="ObjectReplacements/Object 13" manifest:media-type="application/x-openoffice-wmf;windows_formatname=&quot;Image WMF&quot;"/>
  <manifest:file-entry manifest:full-path="ObjectReplacements/Object 14" manifest:media-type="application/x-openoffice-wmf;windows_formatname=&quot;Image WMF&quot;"/>
  <manifest:file-entry manifest:full-path="ObjectReplacements/Object 15" manifest:media-type="application/x-openoffice-wmf;windows_formatname=&quot;Image WMF&quot;"/>
  <manifest:file-entry manifest:full-path="ObjectReplacements/Object 16" manifest:media-type=""/>
  <manifest:file-entry manifest:full-path="ObjectReplacements/Object 17" manifest:media-type="application/x-openoffice-wmf;windows_formatname=&quot;Image WMF&quot;"/>
  <manifest:file-entry manifest:full-path="ObjectReplacements/Object 18" manifest:media-type="application/x-openoffice-wmf;windows_formatname=&quot;Image WMF&quot;"/>
  <manifest:file-entry manifest:full-path="ObjectReplacements/Object 19" manifest:media-type=""/>
  <manifest:file-entry manifest:full-path="ObjectReplacements/Object 20" manifest:media-type="application/x-openoffice-wmf;windows_formatname=&quot;Image WMF&quot;"/>
  <manifest:file-entry manifest:full-path="ObjectReplacements/Object 32" manifest:media-type="application/x-openoffice-wmf;windows_formatname=&quot;Image WMF&quot;"/>
  <manifest:file-entry manifest:full-path="ObjectReplacements/Object 21" manifest:media-type="application/x-openoffice-wmf;windows_formatname=&quot;Image WMF&quot;"/>
  <manifest:file-entry manifest:full-path="ObjectReplacements/Object 22" manifest:media-type="application/x-openoffice-wmf;windows_formatname=&quot;Image WMF&quot;"/>
  <manifest:file-entry manifest:full-path="ObjectReplacements/Object 23" manifest:media-type="application/x-openoffice-wmf;windows_formatname=&quot;Image WMF&quot;"/>
  <manifest:file-entry manifest:full-path="ObjectReplacements/Object 24" manifest:media-type="application/x-openoffice-wmf;windows_formatname=&quot;Image WMF&quot;"/>
  <manifest:file-entry manifest:full-path="ObjectReplacements/Object 25" manifest:media-type="application/x-openoffice-wmf;windows_formatname=&quot;Image WMF&quot;"/>
  <manifest:file-entry manifest:full-path="ObjectReplacements/Object 26" manifest:media-type="application/x-openoffice-wmf;windows_formatname=&quot;Image WMF&quot;"/>
  <manifest:file-entry manifest:full-path="ObjectReplacements/Object 27" manifest:media-type="application/x-openoffice-wmf;windows_formatname=&quot;Image WMF&quot;"/>
  <manifest:file-entry manifest:full-path="ObjectReplacements/Object 33" manifest:media-type="application/x-openoffice-wmf;windows_formatname=&quot;Image WMF&quot;"/>
  <manifest:file-entry manifest:full-path="ObjectReplacements/Object 28" manifest:media-type="application/x-openoffice-wmf;windows_formatname=&quot;Image WMF&quot;"/>
  <manifest:file-entry manifest:full-path="ObjectReplacements/Object 29" manifest:media-type="application/x-openoffice-wmf;windows_formatname=&quot;Image WMF&quot;"/>
  <manifest:file-entry manifest:full-path="ObjectReplacements/Object 30" manifest:media-type="application/x-openoffice-wmf;windows_formatname=&quot;Image WMF&quot;"/>
  <manifest:file-entry manifest:full-path="Object 9" manifest:media-type="application/vnd.sun.star.oleobject"/>
  <manifest:file-entry manifest:full-path="Object 35" manifest:media-type="application/vnd.sun.star.oleobject"/>
  <manifest:file-entry manifest:full-path="Object 5" manifest:media-type="application/vnd.sun.star.oleobject"/>
  <manifest:file-entry manifest:full-path="Object 10" manifest:media-type="application/vnd.sun.star.oleobject"/>
  <manifest:file-entry manifest:full-path="Object 6" manifest:media-type="application/vnd.sun.star.oleobject"/>
  <manifest:file-entry manifest:full-path="Object 36" manifest:media-type="application/vnd.sun.star.oleobject"/>
  <manifest:file-entry manifest:full-path="Object 11" manifest:media-type="application/vnd.sun.star.oleobject"/>
  <manifest:file-entry manifest:full-path="Object 7" manifest:media-type="application/vnd.sun.star.oleobject"/>
  <manifest:file-entry manifest:full-path="Object 37" manifest:media-type="application/vnd.sun.star.oleobject"/>
  <manifest:file-entry manifest:full-path="Object 8"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32"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33"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70000008BDC6DB08240CE2672.png" manifest:media-type="image/png"/>
  <manifest:file-entry manifest:full-path="Pictures/1000000000000167000000AEA5CA212F039C945B.png" manifest:media-type="image/png"/>
  <manifest:file-entry manifest:full-path="Pictures/100000000000013D000000BA6AACCF32B3559A8D.png" manifest:media-type="image/png"/>
  <manifest:file-entry manifest:full-path="Pictures/10000000000001AD000000DD95B805C0D9CE8245.png" manifest:media-type="image/png"/>
  <manifest:file-entry manifest:full-path="Pictures/1000000000000187000000CB33AA4C3E74D5CCC9.png" manifest:media-type="image/png"/>
  <manifest:file-entry manifest:full-path="Pictures/1000000000000177000000E42FE5354D7AEF2CC5.png" manifest:media-type="image/png"/>
  <manifest:file-entry manifest:full-path="Pictures/1000000000000177000000CB5703A31F1ECEB90C.png" manifest:media-type="image/png"/>
  <manifest:file-entry manifest:full-path="Pictures/1000000000000196000000B9CBCA9BD47505A7F8.png" manifest:media-type="image/png"/>
  <manifest:file-entry manifest:full-path="Pictures/1000000000000177000000C7663F0C9D8206C8D4.png" manifest:media-type="image/png"/>
  <manifest:file-entry manifest:full-path="Pictures/1000000000000140000000CCF980913174D53211.png" manifest:media-type="image/png"/>
  <manifest:file-entry manifest:full-path="Pictures/1000000000000170000000D05FE438D56313EBBA.png" manifest:media-type="image/png"/>
  <manifest:file-entry manifest:full-path="Pictures/1000000000000177000000E4ACB8A853EE6E8AEB.png" manifest:media-type="image/png"/>
  <manifest:file-entry manifest:full-path="Pictures/100000000000011F000000D796F546C9A27A779B.png" manifest:media-type="image/png"/>
  <manifest:file-entry manifest:full-path="Pictures/100000000000011F000000D7FE3F4B4CFC2958D2.png" manifest:media-type="image/png"/>
  <manifest:file-entry manifest:full-path="Pictures/1000000000000140000000CC44A6A40089F2D242.png" manifest:media-type="image/png"/>
  <manifest:file-entry manifest:full-path="Pictures/1000000000000194000000DF90362ABAEA77896C.png" manifest:media-type="image/png"/>
  <manifest:file-entry manifest:full-path="Pictures/100000000000015A000000FCDA8C16B78E5EED33.png" manifest:media-type="image/png"/>
  <manifest:file-entry manifest:full-path="Pictures/10000000000001BC000000E68F89781137175A69.png" manifest:media-type="image/png"/>
  <manifest:file-entry manifest:full-path="Pictures/1000000000000173000000DDE75B9F29C70A01C1.png" manifest:media-type="image/png"/>
  <manifest:file-entry manifest:full-path="Pictures/1000000000000177000000D818B8B839ED5D9EA1.png" manifest:media-type="image/png"/>
  <manifest:file-entry manifest:full-path="Pictures/100000000000010A00000061C6977DA1CDF89C48.png" manifest:media-type="image/png"/>
  <manifest:file-entry manifest:full-path="Pictures/2000000700001D410000151788C89D24EF78ED60.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fo:keep-together="auto"/>
    </style:style>
    <style:style style:name="Table9.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bottom" fo:padding-left="0.123cm" fo:padding-right="0.123cm" fo:padding-top="0cm" fo:padding-bottom="0cm" fo:border="0.5pt solid #000000" style:writing-mode="lr-tb"/>
    </style:style>
    <style:style style:name="Table9.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6.992cm" table:align="left" style:writing-mode="lr-tb"/>
    </style:style>
    <style:style style:name="Tabla8.A" style:family="table-column">
      <style:table-column-properties style:column-width="3.263cm"/>
    </style:style>
    <style:style style:name="Tabla8.B" style:family="table-column">
      <style:table-column-properties style:column-width="13.728cm"/>
    </style:style>
    <style:style style:name="Tabla8.1" style:family="table-row">
      <style:table-row-properties style:row-height="0.67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2" style:family="table-row">
      <style:table-row-properties style:row-height="0.736cm"/>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4" style:family="table-row">
      <style:table-row-properties style:row-height="0.737cm"/>
    </style:style>
    <style:style style:name="Tabla8.7" style:family="table-row">
      <style:table-row-properties style:row-height="0.679cm"/>
    </style:style>
    <style:style style:name="Tabla8.8" style:family="table-row">
      <style:table-row-properties style:row-height="0.753cm"/>
    </style:style>
    <style:style style:name="Tabla8.9" style:family="table-row">
      <style:table-row-properties style:row-height="0.751cm"/>
    </style:style>
    <style:style style:name="Tabla8.10" style:family="table-row">
      <style:table-row-properties style:row-height="0.748cm"/>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0.05pt solid #000000" fo:border-top="none" fo:border-bottom="0.05pt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fo:keep-together="auto"/>
    </style:style>
    <style:style style:name="Table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14.C1" style:family="table-cell">
      <style:table-cell-properties style:vertical-align="bottom" fo:padding-left="0.123cm" fo:padding-right="0.123cm" fo:padding-top="0cm" fo:padding-bottom="0cm" fo:border="0.5pt solid #000000" style:writing-mode="lr-tb"/>
    </style:style>
    <style:style style:name="Table1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loext:contextual-spacing="false"/>
      <style:text-properties fo:color="#ff0000" fo:language="en" fo:country="GB"/>
    </style:style>
    <style:style style:name="P3" style:family="paragraph" style:parent-style-name="Standard">
      <style:paragraph-properties fo:margin-top="0cm" fo:margin-bottom="0.353cm" loext:contextual-spacing="false"/>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loext:contextual-spacing="false"/>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loext:contextual-spacing="false" fo:line-height="115%" fo:orphans="2" fo:widows="2" style:writing-mode="lr-tb"/>
      <style:text-properties fo:language="en" fo:country="GB"/>
    </style:style>
    <style:style style:name="P6" style:family="paragraph" style:parent-style-name="Standard">
      <style:paragraph-properties fo:margin-top="0cm" fo:margin-bottom="0.353cm" loext:contextual-spacing="false"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loext:contextual-spacing="false"/>
      <style:text-properties fo:language="en" fo:country="GB"/>
    </style:style>
    <style:style style:name="P8" style:family="paragraph" style:parent-style-name="Standard">
      <style:paragraph-properties fo:margin-top="0cm" fo:margin-bottom="0cm" loext:contextual-spacing="false" fo:line-height="115%"/>
      <style:text-properties fo:font-size="12pt" fo:background-color="transparent"/>
    </style:style>
    <style:style style:name="P9" style:family="paragraph" style:parent-style-name="Standard">
      <style:paragraph-properties fo:margin-top="0cm" fo:margin-bottom="0cm" loext:contextual-spacing="false" fo:line-height="115%" fo:text-align="justify" style:justify-single-word="false"/>
      <style:text-properties fo:font-size="12pt" fo:background-color="transparent"/>
    </style:style>
    <style:style style:name="P10" style:family="paragraph" style:parent-style-name="Standard">
      <style:paragraph-properties fo:margin-top="0cm" fo:margin-bottom="0cm" loext:contextual-spacing="false" fo:line-height="115%"/>
      <style:text-properties fo:font-size="12pt" fo:background-color="transparen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loext:contextual-spacing="false"/>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loext:contextual-spacing="false"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loext:contextual-spacing="false"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loext:contextual-spacing="false"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loext:contextual-spacing="false"/>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loext:contextual-spacing="false"/>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loext:contextual-spacing="false"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15%"/>
      <style:text-properties fo:font-size="12pt" fo:language="en" fo:country="none"/>
    </style:style>
    <style:style style:name="P33" style:family="paragraph" style:parent-style-name="Standard">
      <style:paragraph-properties fo:margin-top="0cm" fo:margin-bottom="0cm" loext:contextual-spacing="false" fo:line-height="115%"/>
      <style:text-properties fo:font-size="12pt"/>
    </style:style>
    <style:style style:name="P34" style:family="paragraph" style:parent-style-name="Standard">
      <style:paragraph-properties fo:margin-top="0cm" fo:margin-bottom="0cm" loext:contextual-spacing="false" fo:line-height="115%"/>
      <style:text-properties fo:background-color="transparent"/>
    </style:style>
    <style:style style:name="P35" style:family="paragraph" style:parent-style-name="Standard">
      <style:paragraph-properties fo:margin-top="0cm" fo:margin-bottom="0cm" loext:contextual-spacing="false" fo:line-height="115%" fo:text-align="justify" style:justify-single-word="false"/>
      <style:text-properties fo:background-color="transparent"/>
    </style:style>
    <style:style style:name="P36" style:family="paragraph" style:parent-style-name="Standard">
      <style:paragraph-properties fo:margin-top="0cm" fo:margin-bottom="0cm" loext:contextual-spacing="false"/>
      <style:text-properties fo:language="en" fo:country="GB" fo:background-color="transparent"/>
    </style:style>
    <style:style style:name="P37" style:family="paragraph" style:parent-style-name="Standard">
      <style:paragraph-properties fo:margin-top="0cm" fo:margin-bottom="0cm" loext:contextual-spacing="false" fo:text-align="justify" style:justify-single-word="false"/>
      <style:text-properties fo:language="en" fo:country="GB" fo:background-color="transparent"/>
    </style:style>
    <style:style style:name="P38" style:family="paragraph" style:parent-style-name="Standard">
      <style:paragraph-properties fo:margin-top="0cm" fo:margin-bottom="0cm" loext:contextual-spacing="false" fo:text-align="center" style:justify-single-word="false"/>
      <style:text-properties fo:language="en" fo:country="GB" fo:background-color="transparent"/>
    </style:style>
    <style:style style:name="P39" style:family="paragraph" style:parent-style-name="Standard">
      <style:paragraph-properties fo:margin-top="0cm" fo:margin-bottom="0cm" loext:contextual-spacing="false" fo:text-align="center" style:justify-single-word="false"/>
      <style:text-properties fo:language="en" fo:country="GB" fo:background-color="transparent" style:language-asian="nl" style:country-asian="BE"/>
    </style:style>
    <style:style style:name="P40" style:family="paragraph" style:parent-style-name="Standard">
      <style:paragraph-properties fo:margin-top="0cm" fo:margin-bottom="0cm" loext:contextual-spacing="false" fo:text-align="justify" style:justify-single-word="false"/>
      <style:text-properties fo:language="en" fo:country="GB" fo:font-weight="bold" fo:background-color="transparent" style:font-weight-asian="bold"/>
    </style:style>
    <style:style style:name="P41" style:family="paragraph" style:parent-style-name="Standard">
      <style:paragraph-properties fo:margin-top="0cm" fo:margin-bottom="0cm" loext:contextual-spacing="false" fo:text-align="justify" style:justify-single-word="false"/>
      <style:text-properties style:font-name="Courier New3" fo:font-size="12pt" fo:language="en" fo:country="GB" fo:background-color="transparent"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fo:color="#000000" fo:font-size="12pt" fo:language="en" fo:country="GB" fo:background-color="transparent" style:font-name-asian="Times New Roman" style:font-size-asian="12pt" style:language-asian="es" style:country-asian="PE"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5" style:family="paragraph" style:parent-style-name="Standard">
      <style:paragraph-properties fo:margin-top="0cm" fo:margin-bottom="0cm" loext:contextual-spacing="false" fo:line-height="100%"/>
      <style:text-properties fo:color="#000000" fo:language="en" fo:country="GB" fo:background-color="transparent" style:font-name-asian="Times New Roman" style:language-asian="es" style:country-asian="PE"/>
    </style:style>
    <style:style style:name="P46" style:family="paragraph" style:parent-style-name="Standard">
      <style:paragraph-properties fo:margin-top="0cm" fo:margin-bottom="0cm" loext:contextual-spacing="false" fo:text-align="justify" style:justify-single-word="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47" style:family="paragraph" style:parent-style-name="Standard">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48" style:family="paragraph" style:parent-style-name="Text_20_body">
      <style:paragraph-properties fo:margin-top="0cm" fo:margin-bottom="0cm" loext:contextual-spacing="false"/>
    </style:style>
    <style:style style:name="P49" style:family="paragraph" style:parent-style-name="Text_20_body">
      <style:paragraph-properties fo:margin-top="0cm" fo:margin-bottom="0cm" loext:contextual-spacing="false" fo:line-height="115%"/>
      <style:text-properties fo:font-size="12pt" fo:background-color="transparent"/>
    </style:style>
    <style:style style:name="P50" style:family="paragraph" style:parent-style-name="Text_20_body">
      <style:paragraph-properties fo:margin-top="0cm" fo:margin-bottom="0cm" loext:contextual-spacing="false" fo:line-height="115%" fo:text-align="justify" style:justify-single-word="false"/>
      <style:text-properties fo:font-size="12pt" fo:background-color="transparent"/>
    </style:style>
    <style:style style:name="P51" style:family="paragraph" style:parent-style-name="Text_20_body">
      <style:paragraph-properties fo:margin-top="0cm" fo:margin-bottom="0cm" loext:contextual-spacing="false" fo:line-height="115%"/>
      <style:text-properties fo:font-size="12pt" fo:background-color="transparent" style:font-size-asian="12pt" style:font-size-complex="12pt"/>
    </style:style>
    <style:style style:name="P52" style:family="paragraph" style:parent-style-name="Text_20_body">
      <style:paragraph-properties fo:margin-top="0cm" fo:margin-bottom="0cm" loext:contextual-spacing="false" fo:line-height="115%"/>
      <style:text-properties fo:font-size="12pt" fo:language="en" fo:country="GB" fo:background-color="transparent" style:font-size-asian="12pt" style:font-size-complex="12pt"/>
    </style:style>
    <style:style style:name="P53" style:family="paragraph" style:parent-style-name="Text_20_body">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54" style:family="paragraph" style:parent-style-name="Text_20_body">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55" style:family="paragraph" style:parent-style-name="Text_20_body">
      <style:paragraph-properties fo:margin-top="0cm" fo:margin-bottom="0cm" loext:contextual-spacing="false" fo:line-height="115%"/>
      <style:text-properties fo:font-size="12pt" fo:language="en" fo:country="GB" fo:background-color="transparent"/>
    </style:style>
    <style:style style:name="P56"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57"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style>
    <style:style style:name="P58"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ffff00" style:font-size-asian="12pt" style:font-size-complex="12pt"/>
    </style:style>
    <style:style style:name="P59" style:family="paragraph" style:parent-style-name="Text_20_body">
      <style:paragraph-properties fo:margin-top="0cm" fo:margin-bottom="0cm" loext:contextual-spacing="false" fo:line-height="115%" fo:text-align="justify" style:justify-single-word="false"/>
      <style:text-properties fo:font-size="12pt" fo:background-color="#ffff00" style:font-size-asian="12pt" style:font-size-complex="12pt"/>
    </style:style>
    <style:style style:name="P60" style:family="paragraph" style:parent-style-name="Text_20_body">
      <style:paragraph-properties fo:margin-top="0cm" fo:margin-bottom="0cm" loext:contextual-spacing="false" fo:line-height="115%"/>
      <style:text-properties fo:font-size="12pt"/>
    </style:style>
    <style:style style:name="P61" style:family="paragraph" style:parent-style-name="Text_20_body">
      <style:paragraph-properties fo:margin-top="0cm" fo:margin-bottom="0cm" loext:contextual-spacing="false"/>
      <style:text-properties fo:background-color="transparent"/>
    </style:style>
    <style:style style:name="P62" style:family="paragraph" style:parent-style-name="Text_20_body">
      <style:paragraph-properties fo:margin-top="0cm" fo:margin-bottom="0cm" loext:contextual-spacing="false" fo:line-height="115%"/>
      <style:text-properties fo:background-color="transparent"/>
    </style:style>
    <style:style style:name="P63" style:family="paragraph" style:parent-style-name="Text_20_body">
      <style:paragraph-properties fo:margin-top="0cm" fo:margin-bottom="0cm" loext:contextual-spacing="false" fo:line-height="115%" fo:text-align="justify" style:justify-single-word="false"/>
      <style:text-properties fo:background-color="transparent"/>
    </style:style>
    <style:style style:name="P64" style:family="paragraph" style:parent-style-name="Text_20_body">
      <style:paragraph-properties fo:margin-top="0cm" fo:margin-bottom="0cm" loext:contextual-spacing="false" fo:text-align="center" style:justify-single-word="false"/>
      <style:text-properties fo:background-color="transparent"/>
    </style:style>
    <style:style style:name="P65" style:family="paragraph" style:parent-style-name="Text_20_body">
      <style:paragraph-properties fo:margin-top="0cm" fo:margin-bottom="0cm" loext:contextual-spacing="false" fo:line-height="115%"/>
      <style:text-properties style:font-name="Courier New2" fo:font-size="12pt" fo:background-color="transparent"/>
    </style:style>
    <style:style style:name="P66" style:family="paragraph" style:parent-style-name="Text_20_body">
      <style:paragraph-properties fo:margin-top="0cm" fo:margin-bottom="0cm" loext:contextual-spacing="false"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7" style:family="paragraph" style:parent-style-name="Text_20_body">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68" style:family="paragraph" style:parent-style-name="Text_20_body">
      <style:paragraph-properties fo:margin-top="0cm" fo:margin-bottom="0cm" loext:contextual-spacing="false" fo:line-height="115%" fo:text-align="justify" style:justify-single-word="false"/>
      <style:text-properties fo:color="#000000" fo:font-size="12pt" fo:background-color="transparent" style:font-size-asian="12pt" style:font-size-complex="12pt"/>
    </style:style>
    <style:style style:name="P69" style:family="paragraph" style:parent-style-name="Text_20_body">
      <style:paragraph-properties fo:margin-top="0cm" fo:margin-bottom="0cm" loext:contextual-spacing="false" fo:line-height="115%"/>
    </style:style>
    <style:style style:name="P70" style:family="paragraph" style:parent-style-name="Standard">
      <style:paragraph-properties fo:margin-top="0cm" fo:margin-bottom="0cm" loext:contextual-spacing="false" fo:break-before="page"/>
      <style:text-properties fo:font-size="12pt" fo:language="en" fo:country="GB" fo:background-color="transparent" style:font-size-asian="12pt" style:font-size-complex="12pt"/>
    </style:style>
    <style:style style:name="P71" style:family="paragraph" style:parent-style-name="Standard">
      <style:paragraph-properties fo:margin-top="0cm" fo:margin-bottom="0cm" loext:contextual-spacing="false" fo:text-align="justify" style:justify-single-word="false" fo:break-before="page"/>
      <style:text-properties fo:font-size="12pt" fo:language="en" fo:country="GB" fo:background-color="transparent" style:font-size-asian="12pt" style:font-size-complex="12pt"/>
    </style:style>
    <style:style style:name="P72" style:family="paragraph" style:parent-style-name="Text_20_body">
      <style:paragraph-properties fo:margin-top="0cm" fo:margin-bottom="0cm" loext:contextual-spacing="false" fo:break-before="page"/>
      <style:text-properties fo:background-color="transparent"/>
    </style:style>
    <style:style style:name="P73" style:family="paragraph" style:parent-style-name="Standard">
      <style:paragraph-properties fo:margin-top="0cm" fo:margin-bottom="0cm" loext:contextual-spacing="false" style:writing-mode="lr-tb"/>
      <style:text-properties fo:font-size="12pt" fo:language="en" fo:country="none" fo:background-color="transparent" style:font-size-asian="12pt" style:font-size-complex="12pt"/>
    </style:style>
    <style:style style:name="P74"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7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7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1c7cc9" fo:background-color="transparent" style:font-size-asian="12pt" style:font-size-complex="12pt"/>
    </style:style>
    <style:style style:name="P7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330f74" fo:background-color="transparent" style:font-size-asian="12pt" style:font-size-complex="12pt"/>
    </style:style>
    <style:style style:name="P78"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font-size="12pt" fo:language="en" fo:country="GB" fo:background-color="transparent" style:font-size-asian="12pt" style:font-size-complex="12pt"/>
    </style:style>
    <style:style style:name="P7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rsid="00295f36" officeooo:paragraph-rsid="00295f36" fo:background-color="transparent" style:font-size-asian="12pt" style:font-size-complex="12pt"/>
    </style:style>
    <style:style style:name="P8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8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8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8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style>
    <style:style style:name="P8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8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officeooo:paragraph-rsid="00330f74" fo:background-color="transparent" style:font-size-asian="12pt" style:font-size-complex="12pt"/>
    </style:style>
    <style:style style:name="P8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style:style>
    <style:style style:name="P87" style:family="paragraph" style:parent-style-name="Standard">
      <style:paragraph-properties fo:margin-left="0cm" fo:margin-right="0cm" fo:margin-top="0cm" fo:margin-bottom="0cm" loext:contextual-spacing="false" fo:line-height="115%" fo:text-align="justify" style:justify-single-word="false" fo:text-indent="1.249cm" style:auto-text-indent="false"/>
      <style:text-properties fo:font-size="12pt" fo:language="en" fo:country="none"/>
    </style:style>
    <style:style style:name="P8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background-color="transparent"/>
    </style:style>
    <style:style style:name="P8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style:style>
    <style:style style:name="P9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style:style>
    <style:style style:name="P9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style>
    <style:style style:name="P9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language-asian="nl" style:country-asian="BE"/>
    </style:style>
    <style:style style:name="P93"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language-asian="nl" style:country-asian="BE"/>
    </style:style>
    <style:style style:name="P94"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style>
    <style:style style:name="P9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background-color="transparent"/>
    </style:style>
    <style:style style:name="P9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9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language="en" fo:country="GB" fo:background-color="transparent"/>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10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4pt" fo:language="en" fo:country="GB" fo:background-color="transparent" style:font-size-asian="14pt" style:font-size-complex="12pt"/>
    </style:style>
    <style:style style:name="P10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language="en" fo:country="GB" fo:background-color="transparent"/>
    </style:style>
    <style:style style:name="P107"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08"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109"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ffff00" style:font-size-asian="12pt" style:font-size-complex="12pt"/>
    </style:style>
    <style:style style:name="P110"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style:style>
    <style:style style:name="P111" style:family="paragraph" style:parent-style-name="Text_20_body">
      <style:paragraph-properties fo:margin-left="0cm" fo:margin-right="0cm" fo:margin-top="0cm" fo:margin-bottom="0cm" loext:contextual-spacing="false" fo:text-align="justify" style:justify-single-word="false" fo:text-indent="1.249cm" style:auto-text-indent="false"/>
    </style:style>
    <style:style style:name="P11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style>
    <style:style style:name="P113" style:family="paragraph" style:parent-style-name="Standard">
      <loext:graphic-properties draw:fill="solid" draw:fill-color="#daeef3" draw:opacity="100%"/>
      <style:paragraph-properties fo:margin-top="0cm" fo:margin-bottom="0.035cm" loext:contextual-spacing="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4"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5"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6"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1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18"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language="en" fo:country="GB" fo:background-color="transparent"/>
    </style:style>
    <style:style style:name="P11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2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34c672" fo:background-color="transparent"/>
    </style:style>
    <style:style style:name="P121"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officeooo:paragraph-rsid="0034ed77" fo:background-color="transparent"/>
    </style:style>
    <style:style style:name="P122" style:family="paragraph" style:parent-style-name="Standard">
      <loext:graphic-properties draw:fill="solid" draw:fill-color="#daeef3" draw:opacity="100%"/>
      <style:paragraph-properties fo:margin-top="0cm" fo:margin-bottom="0.035cm" loext:contextual-spacing="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3"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4"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5"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6"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2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3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style>
    <style:style style:name="P13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3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3"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4" style:family="paragraph" style:parent-style-name="Standard">
      <loext:graphic-properties draw:fill="solid" draw:fill-color="#daeef3" draw:opacity="100%"/>
      <style:paragraph-properties fo:margin-top="0cm" fo:margin-bottom="0.035cm" loext:contextual-spacing="false" fo:background-color="#daeef3"/>
      <style:text-properties officeooo:paragraph-rsid="0034ed77"/>
    </style:style>
    <style:style style:name="P135" style:family="paragraph" style:parent-style-name="HTML_20_con_20_formato_20_previo">
      <loext:graphic-properties draw:fill="solid" draw:fill-color="#daeef3" draw:opacity="100%"/>
      <style:paragraph-properties fo:margin-top="0cm" fo:margin-bottom="0.035cm" loext:contextual-spacing="false" fo:background-color="#daeef3"/>
    </style:style>
    <style:style style:name="P136" style:family="paragraph" style:parent-style-name="HTML_20_con_20_formato_20_previo">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37"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style:font-name="Courier New2" fo:font-size="10pt" fo:font-weight="bold" fo:background-color="transparent"/>
    </style:style>
    <style:style style:name="P138"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fo:background-color="transparent"/>
    </style:style>
    <style:style style:name="P139"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style:font-name="Courier New2" fo:font-size="10pt" fo:background-color="transparent"/>
    </style:style>
    <style:style style:name="P140"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fo:background-color="transparent"/>
    </style:style>
    <style:style style:name="P141"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transparent"/>
    </style:style>
    <style:style style:name="P142" style:family="paragraph" style:parent-style-name="Text_20_body">
      <loext:graphic-properties draw:fill="solid" draw:fill-color="#daeef3" draw:opacity="100%"/>
      <style:paragraph-properties fo:margin-top="0cm" fo:margin-bottom="0.035cm" loext:contextual-spacing="false" fo:background-color="#daeef3"/>
      <style:text-properties fo:color="#000000" fo:language="en" fo:country="GB" fo:background-color="transparent"/>
    </style:style>
    <style:style style:name="P143"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ffff00"/>
    </style:style>
    <style:style style:name="P144"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style:style>
    <style:style style:name="P145" style:family="paragraph" style:parent-style-name="Text_20_body">
      <style:paragraph-properties fo:margin-top="0cm" fo:margin-bottom="0.035cm" loext:contextual-spacing="false" fo:line-height="115%" fo:text-align="justify" style:justify-single-word="false"/>
      <style:text-properties fo:background-color="transparent"/>
    </style:style>
    <style:style style:name="P14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background-color="transparent"/>
    </style:style>
    <style:style style:name="P147"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background-color="transparent"/>
    </style:style>
    <style:style style:name="P148" style:family="paragraph" style:parent-style-name="Text_20_body">
      <style:paragraph-properties fo:margin-top="0cm" fo:margin-bottom="0.035cm" loext:contextual-spacing="false" fo:text-align="justify" style:justify-single-word="false"/>
      <style:text-properties fo:language="en" fo:country="GB" fo:background-color="transparent"/>
    </style:style>
    <style:style style:name="P149"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50"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51"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style>
    <style:style style:name="P152"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style>
    <style:style style:name="P153" style:family="paragraph" style:parent-style-name="Text_20_body">
      <style:paragraph-properties fo:margin-top="0cm" fo:margin-bottom="0.035cm" loext:contextual-spacing="false" fo:line-height="115%" fo:text-align="justify" style:justify-single-word="false"/>
      <style:text-properties officeooo:paragraph-rsid="0022fd8b"/>
    </style:style>
    <style:style style:name="P154" style:family="paragraph" style:parent-style-name="Text_20_body">
      <style:paragraph-properties fo:margin-top="0cm" fo:margin-bottom="0.035cm" loext:contextual-spacing="false" fo:line-height="115%" fo:text-align="justify" style:justify-single-word="false"/>
      <style:text-properties officeooo:paragraph-rsid="0028d0ce"/>
    </style:style>
    <style:style style:name="P155" style:family="paragraph" style:parent-style-name="Text_20_body">
      <style:paragraph-properties fo:margin-top="0cm" fo:margin-bottom="0.035cm" loext:contextual-spacing="false" fo:line-height="115%" fo:text-align="justify" style:justify-single-word="false"/>
      <style:text-properties officeooo:paragraph-rsid="00295f36"/>
    </style:style>
    <style:style style:name="P15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ff0000" style:font-name="Courier New2" fo:font-size="10pt" fo:font-weight="bold" fo:background-color="transparent"/>
    </style:style>
    <style:style style:name="P157" style:family="paragraph" style:parent-style-name="Preformatted_20_Text">
      <loext:graphic-properties draw:fill="solid" draw:fill-color="#ffffcc" draw:opacity="100%"/>
      <style:paragraph-properties fo:margin-top="0cm" fo:margin-bottom="0.035cm" loext:contextual-spacing="false" fo:background-color="#ffffcc"/>
    </style:style>
    <style:style style:name="P158" style:family="paragraph" style:parent-style-name="Standard">
      <style:paragraph-properties fo:margin-left="0cm" fo:margin-right="0cm" fo:margin-top="0cm" fo:margin-bottom="0cm" loext:contextual-spacing="false" fo:text-align="justify" style:justify-single-word="false" fo:text-indent="1.016cm" style:auto-text-indent="false"/>
    </style:style>
    <style:style style:name="P159"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60"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1"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language-asian="nl" style:country-asian="BE"/>
    </style:style>
    <style:style style:name="P162" style:family="paragraph" style:parent-style-name="Standard">
      <style:paragraph-properties fo:margin-left="0cm" fo:margin-right="0cm" fo:margin-top="0cm" fo:margin-bottom="0cm" loext:contextual-spacing="false" fo:text-align="center" style:justify-single-word="false" fo:text-indent="1.016cm" style:auto-text-indent="false"/>
      <style:text-properties fo:language="en" fo:country="GB" fo:background-color="transparent" style:language-asian="nl" style:country-asian="BE"/>
    </style:style>
    <style:style style:name="P163"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background-color="transparent"/>
    </style:style>
    <style:style style:name="P164"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65"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6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style>
    <style:style style:name="P16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style>
    <style:style style:name="P17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font-name-complex="Calibri"/>
    </style:style>
    <style:style style:name="P171" style:family="paragraph" style:parent-style-name="Standard">
      <style:text-properties fo:font-size="12pt" fo:language="en" fo:country="GB" fo:background-color="transparent" style:font-size-asian="12pt"/>
    </style:style>
    <style:style style:name="P172" style:family="paragraph" style:parent-style-name="Standard">
      <style:text-properties fo:font-size="12pt" fo:background-color="transparent" style:font-size-asian="12pt" style:font-size-complex="12pt"/>
    </style:style>
    <style:style style:name="P173" style:family="paragraph" style:parent-style-name="Standard">
      <style:text-properties fo:font-size="12pt" fo:language="en" fo:country="none" fo:background-color="transparent"/>
    </style:style>
    <style:style style:name="P174" style:family="paragraph" style:parent-style-name="Standard">
      <style:text-properties fo:language="en" fo:country="GB" fo:background-color="transparent"/>
    </style:style>
    <style:style style:name="P175"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76"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77" style:family="paragraph" style:parent-style-name="Standard">
      <style:text-properties fo:font-size="16pt" fo:language="en" fo:country="GB" fo:background-color="transparent" style:font-size-asian="16pt"/>
    </style:style>
    <style:style style:name="P178"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79"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0" style:family="paragraph" style:parent-style-name="Preformatted_20_Text">
      <style:paragraph-properties fo:margin-left="1.249cm" fo:margin-right="0cm" fo:text-indent="0cm" style:auto-text-indent="false"/>
      <style:text-properties fo:background-color="transparent"/>
    </style:style>
    <style:style style:name="P181" style:family="paragraph" style:parent-style-name="Standard">
      <style:paragraph-properties fo:margin-left="0.06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2" style:family="paragraph" style:parent-style-name="Standard">
      <style:paragraph-properties fo:margin-left="0.0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3" style:family="paragraph" style:parent-style-name="Standard">
      <style:paragraph-properties fo:margin-left="0.058cm" fo:margin-right="0cm" fo:margin-top="0cm" fo:margin-bottom="0cm" loext:contextual-spacing="false"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84" style:family="paragraph" style:parent-style-name="Standard">
      <style:paragraph-properties fo:margin-left="0.058cm" fo:margin-right="0cm" fo:margin-top="0cm" fo:margin-bottom="0cm" loext:contextual-spacing="false" fo:text-align="justify" style:justify-single-word="false" fo:text-indent="-0.058cm" style:auto-text-indent="false"/>
      <style:text-properties fo:font-size="12pt" fo:language="en" fo:country="GB" fo:background-color="transparent" style:font-size-asian="12pt" style:font-size-complex="12pt"/>
    </style:style>
    <style:style style:name="P185" style:family="paragraph" style:parent-style-name="Standard">
      <style:paragraph-properties fo:margin-left="0.058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6" style:family="paragraph" style:parent-style-name="Standard">
      <style:paragraph-properties fo:margin-left="0.058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7"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8"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GB" fo:background-color="transparent"/>
    </style:style>
    <style:style style:name="P189"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90"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91"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fo:font-size="12pt" fo:language="en" fo:country="GB" fo:background-color="transparent" style:font-size-asian="12pt" style:font-size-complex="12pt"/>
    </style:style>
    <style:style style:name="P192"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3" style:family="paragraph" style:parent-style-name="Standard">
      <style:paragraph-properties fo:margin-left="1.01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4" style:family="paragraph" style:parent-style-name="Standard">
      <loext:graphic-properties draw:fill="solid" draw:fill-color="#ffffcc" draw:opacity="100%"/>
      <style:paragraph-properties fo:margin-left="1.016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95" style:family="paragraph" style:parent-style-name="Standard">
      <style:paragraph-properties fo:margin-left="1.884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6" style:family="paragraph" style:parent-style-name="Standard">
      <style:paragraph-properties fo:margin-left="1.016cm" fo:margin-right="0cm" fo:margin-top="0cm" fo:margin-bottom="0cm" loext:contextual-spacing="false" fo:text-align="justify" style:justify-single-word="false" fo:text-indent="0.233cm" style:auto-text-indent="false"/>
      <style:text-properties fo:font-size="12pt" fo:language="en" fo:country="GB" fo:background-color="transparent" style:font-size-asian="12pt" style:font-size-complex="12pt"/>
    </style:style>
    <style:style style:name="P197" style:family="paragraph" style:parent-style-name="Standard">
      <style:paragraph-properties fo:break-before="page"/>
      <style:text-properties fo:language="en" fo:country="GB" fo:background-color="transparent"/>
    </style:style>
    <style:style style:name="P198" style:family="paragraph" style:parent-style-name="Standard">
      <style:paragraph-properties fo:margin-left="0.762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9" style:family="paragraph" style:parent-style-name="HTML_20_con_20_formato_20_previo">
      <style:text-properties fo:language="en" fo:country="GB" fo:background-color="transparent"/>
    </style:style>
    <style:style style:name="P200" style:family="paragraph" style:parent-style-name="Table_20_Contents">
      <style:text-properties fo:font-size="12pt" fo:background-color="transparent" style:font-size-asian="12pt" style:font-size-complex="12pt"/>
    </style:style>
    <style:style style:name="P20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2" style:family="paragraph" style:parent-style-name="Table_20_Contents">
      <style:text-properties fo:font-size="12pt" style:font-size-asian="12pt" style:font-size-complex="12pt"/>
    </style:style>
    <style:style style:name="P203" style:family="paragraph" style:parent-style-name="Standard">
      <style:paragraph-properties fo:margin-left="2.498cm" fo:margin-right="0cm" fo:text-indent="-2.498cm" style:auto-text-indent="false"/>
      <style:text-properties fo:language="en" fo:country="GB" fo:background-color="transparent"/>
    </style:style>
    <style:style style:name="P204" style:family="paragraph" style:parent-style-name="Contents_20_1">
      <style:paragraph-properties>
        <style:tab-stops>
          <style:tab-stop style:position="17.002cm" style:type="right" style:leader-style="dotted" style:leader-text="."/>
        </style:tab-stops>
      </style:paragraph-properties>
    </style:style>
    <style:style style:name="P205" style:family="paragraph" style:parent-style-name="Contents_20_2">
      <style:paragraph-properties>
        <style:tab-stops>
          <style:tab-stop style:position="17.002cm" style:type="right" style:leader-style="dotted" style:leader-text="."/>
        </style:tab-stops>
      </style:paragraph-properties>
    </style:style>
    <style:style style:name="P206" style:family="paragraph" style:parent-style-name="Text_20_body">
      <style:paragraph-properties fo:margin-top="0cm" fo:margin-bottom="0cm" loext:contextual-spacing="false" fo:line-height="115%"/>
    </style:style>
    <style:style style:name="P207"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208" style:family="paragraph" style:parent-style-name="Text_20_body">
      <style:paragraph-properties fo:margin-top="0cm" fo:margin-bottom="0.035cm" loext:contextual-spacing="false" fo:line-height="115%" fo:text-align="justify" style:justify-single-word="false"/>
    </style:style>
    <style:style style:name="P209"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210"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211" style:family="paragraph" style:parent-style-name="Standard" style:list-style-name="WW8Num13">
      <style:paragraph-properties fo:margin-left="0.751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212" style:family="paragraph" style:parent-style-name="Standard" style:list-style-name="WW8Num13">
      <style:paragraph-properties fo:margin-left="0.764cm" fo:margin-right="0cm" fo:margin-top="0cm" fo:margin-bottom="0cm" loext:contextual-spacing="false"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213" style:family="paragraph" style:parent-style-name="Standard" style:list-style-name="WW8Num24">
      <style:paragraph-properties fo:margin-left="0cm" fo:margin-right="0cm" fo:margin-top="0cm" fo:margin-bottom="0cm" loext:contextual-spacing="false" fo:text-align="justify" style:justify-single-word="false" fo:text-indent="0cm" style:auto-text-indent="false"/>
    </style:style>
    <style:style style:name="P214" style:family="paragraph" style:parent-style-name="Standard" style:list-style-name="WW8Num2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5" style:family="paragraph" style:parent-style-name="Standard" style:list-style-name="WW8Num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6" style:family="paragraph" style:parent-style-name="Standard" style:list-style-name="WW8Num1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7" style:family="paragraph" style:parent-style-name="Standard" style:list-style-name="WW8Num1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8" style:family="paragraph" style:parent-style-name="Standard" style:list-style-name="WW8Num1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9" style:family="paragraph" style:parent-style-name="Standard" style:list-style-name="WW8Num1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0" style:family="paragraph" style:parent-style-name="Standard" style:list-style-name="WW8Num1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1" style:family="paragraph" style:parent-style-name="Standard" style:list-style-name="WW8Num1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2" style:family="paragraph" style:parent-style-name="Standard" style:list-style-name="WW8Num3">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3" style:family="paragraph" style:parent-style-name="Standard" style:list-style-name="WW8Num2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4" style:family="paragraph" style:parent-style-name="Standard" style:list-style-name="WW8Num22">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5" style:family="paragraph" style:parent-style-name="Standard" style:list-style-name="WW8Num1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6" style:family="paragraph" style:parent-style-name="Standard" style:list-style-name="WW8Num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7" style:family="paragraph" style:parent-style-name="Standard" style:list-style-name="WW8Num1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8" style:family="paragraph" style:parent-style-name="Standard" style:list-style-name="WW8Num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9" style:family="paragraph" style:parent-style-name="Standard" style:list-style-name="WW8Num2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30" style:family="paragraph" style:parent-style-name="Standard" style:list-style-name="WW8Num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31" style:family="paragraph" style:parent-style-name="Standard" style:list-style-name="WW8Num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32" style:family="paragraph" style:parent-style-name="Standard" style:list-style-name="WW8Num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33" style:family="paragraph" style:parent-style-name="Standard" style:list-style-name="L1">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34"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235" style:family="paragraph" style:parent-style-name="Standard" style:list-style-name="WW8Num10">
      <style:paragraph-properties fo:margin-top="0cm" fo:margin-bottom="0cm" loext:contextual-spacing="false" fo:text-align="justify" style:justify-single-word="false"/>
      <style:text-properties fo:background-color="transparent"/>
    </style:style>
    <style:style style:name="P236" style:family="paragraph" style:parent-style-name="Standard" style:list-style-name="WW8Num14">
      <style:paragraph-properties fo:margin-top="0cm" fo:margin-bottom="0cm" loext:contextual-spacing="false" fo:text-align="justify" style:justify-single-word="false"/>
    </style:style>
    <style:style style:name="P237" style:family="paragraph" style:parent-style-name="Standard" style:list-style-name="WW8Num12">
      <style:paragraph-properties fo:margin-top="0cm" fo:margin-bottom="0cm" loext:contextual-spacing="false" fo:text-align="justify" style:justify-single-word="false"/>
      <style:text-properties fo:language="en" fo:country="GB" fo:background-color="transparent"/>
    </style:style>
    <style:style style:name="P238" style:family="paragraph" style:parent-style-name="Standard" style:list-style-name="WW8Num6">
      <style:paragraph-properties fo:margin-top="0cm" fo:margin-bottom="0cm" loext:contextual-spacing="false" fo:text-align="justify" style:justify-single-word="false"/>
      <style:text-properties fo:language="en" fo:country="GB" fo:background-color="transparent"/>
    </style:style>
    <style:style style:name="P239" style:family="paragraph" style:parent-style-name="Standard" style:list-style-name="WW8Num10">
      <style:paragraph-properties fo:margin-top="0cm" fo:margin-bottom="0cm" loext:contextual-spacing="false" fo:text-align="justify" style:justify-single-word="false"/>
      <style:text-properties fo:language="en" fo:country="GB" fo:background-color="transparent"/>
    </style:style>
    <style:style style:name="P240" style:family="paragraph" style:parent-style-name="Standard">
      <style:paragraph-properties fo:margin-top="0cm" fo:margin-bottom="0cm" loext:contextual-spacing="false" fo:line-height="115%" fo:text-align="justify" style:justify-single-word="false"/>
    </style:style>
    <style:style style:name="P241" style:family="paragraph" style:parent-style-name="Standard" style:list-style-name="WW8Num17">
      <style:paragraph-properties fo:margin-left="2cm" fo:margin-right="0cm" fo:margin-top="0cm" fo:margin-bottom="0cm" loext:contextual-spacing="false" fo:text-align="justify" style:justify-single-word="false" fo:text-indent="-0.75cm" style:auto-text-indent="false"/>
      <style:text-properties fo:font-size="12pt" fo:language="en" fo:country="GB" fo:background-color="transparent" style:font-size-asian="12pt" style:font-size-complex="12pt"/>
    </style:style>
    <style:style style:name="P242" style:family="paragraph" style:parent-style-name="Standard" style:list-style-name="WW8Num8">
      <style:paragraph-properties fo:margin-left="0.377cm" fo:margin-right="0cm" fo:margin-top="0cm" fo:margin-bottom="0cm" loext:contextual-spacing="false" fo:text-align="justify" style:justify-single-word="false" fo:text-indent="-0.377cm" style:auto-text-indent="false"/>
      <style:text-properties fo:font-size="12pt" fo:language="en" fo:country="GB" fo:background-color="transparent" style:font-size-asian="12pt" style:font-size-complex="12pt"/>
    </style:style>
    <style:style style:name="P24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244" style:family="paragraph" style:parent-style-name="Heading_20_1">
      <style:paragraph-properties fo:break-before="page"/>
      <style:text-properties fo:language="en" fo:country="GB" fo:background-color="transparent"/>
    </style:style>
    <style:style style:name="P245" style:family="paragraph" style:parent-style-name="Heading_20_1" style:list-style-name="">
      <style:paragraph-properties fo:margin-left="0cm" fo:margin-right="0cm" fo:margin-top="0cm" fo:margin-bottom="0cm" loext:contextual-spacing="false" fo:text-align="center" style:justify-single-word="false" fo:text-indent="0cm" style:auto-text-indent="false" fo:break-before="page"/>
      <style:text-properties fo:font-size="12pt" fo:language="en" fo:country="GB" fo:background-color="transparent" style:font-size-asian="12pt" style:font-size-complex="12pt"/>
    </style:style>
    <style:style style:name="P246" style:family="paragraph" style:parent-style-name="Heading_20_2">
      <style:text-properties fo:language="en" fo:country="GB" fo:background-color="transparent"/>
    </style:style>
    <style:style style:name="P247" style:family="paragraph" style:parent-style-name="Heading_20_2" style:list-style-name="WW8Num24">
      <style:text-properties fo:language="en" fo:country="GB" fo:background-color="transparent"/>
    </style:style>
    <style:style style:name="P248" style:family="paragraph" style:parent-style-name="Heading_20_2">
      <style:text-properties fo:language="en" fo:country="none" fo:background-color="transparent"/>
    </style:style>
    <style:style style:name="P249" style:family="paragraph" style:parent-style-name="Heading_20_2">
      <style:text-properties fo:background-color="transparent"/>
    </style:style>
    <style:style style:name="P250" style:family="paragraph" style:parent-style-name="Heading_20_2">
      <style:paragraph-properties fo:break-before="page"/>
      <style:text-properties fo:language="en" fo:country="GB" fo:background-color="transparent"/>
    </style:style>
    <style:style style:name="P251" style:family="paragraph" style:parent-style-name="Heading_20_2" style:list-style-name="WW8Num24">
      <style:paragraph-properties fo:break-before="page"/>
      <style:text-properties fo:language="en" fo:country="GB" fo:background-color="transparent"/>
    </style:style>
    <style:style style:name="P252"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3" style:family="paragraph" style:parent-style-name="Heading_20_2">
      <style:paragraph-properties fo:line-height="115%" fo:orphans="2" fo:widows="2" fo:hyphenation-ladder-count="no-limit" style:writing-mode="lr-tb"/>
      <style:text-properties style:use-window-font-color="true" style:font-name="Courier New1" fo:language="en" fo:country="GB" fo:font-weight="bold" fo:background-color="transparent" style:language-asian="zh" style:country-asian="CN" style:font-weight-asian="bold" style:font-name-complex="Courier New1" style:language-complex="ar" style:country-complex="SA" fo:hyphenate="false" fo:hyphenation-remain-char-count="2" fo:hyphenation-push-char-count="2"/>
    </style:style>
    <style:style style:name="P254"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55"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56" style:family="paragraph" style:parent-style-name="Heading_20_3">
      <style:text-properties fo:language="en" fo:country="GB" fo:background-color="transparent"/>
    </style:style>
    <style:style style:name="P257" style:family="paragraph" style:parent-style-name="Heading_20_3" style:list-style-name="WW8Num24">
      <style:text-properties fo:language="en" fo:country="GB" fo:background-color="transparent"/>
    </style:style>
    <style:style style:name="P258" style:family="paragraph" style:parent-style-name="Heading_20_3">
      <style:text-properties fo:background-color="transparent"/>
    </style:style>
    <style:style style:name="P259" style:family="paragraph" style:parent-style-name="Heading_20_3" style:list-style-name="WW8Num24">
      <style:text-properties fo:background-color="transparent"/>
    </style:style>
    <style:style style:name="P260"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61" style:family="paragraph" style:parent-style-name="Heading_20_3">
      <style:paragraph-properties fo:line-height="115%" fo:orphans="2" fo:widows="2" fo:hyphenation-ladder-count="no-limit" style:writing-mode="lr-tb"/>
      <style:text-properties style:use-window-font-color="true" style:language-asian="zh" style:country-asian="CN" style:language-complex="ar" style:country-complex="SA" fo:hyphenate="false" fo:hyphenation-remain-char-count="2" fo:hyphenation-push-char-count="2"/>
    </style:style>
    <style:style style:name="P262"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63" style:family="paragraph" style:parent-style-name="Heading_20_3">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64" style:family="paragraph">
      <style:paragraph-properties fo:margin-top="0cm" fo:margin-bottom="0cm" fo:line-height="115%" fo:text-align="justify" style:writing-mode="lr-tb"/>
    </style:style>
    <style:style style:name="P265" style:family="paragraph">
      <loext:graphic-properties draw:fill="solid" draw:fill-color="#ffffff"/>
      <style:paragraph-properties fo:margin-top="0cm" fo:margin-bottom="0cm" fo:line-height="115%" fo:text-align="justify" style:writing-mode="lr-tb"/>
    </style:style>
    <style:style style:name="P266" style:family="paragraph">
      <style:paragraph-properties fo:margin-top="0cm" fo:margin-bottom="0.353cm" fo:line-height="115%" style:writing-mode="lr-tb"/>
    </style:style>
    <style:style style:name="P267" style:family="paragraph">
      <loext:graphic-properties draw:fill="none" draw:fill-color="#ffffff"/>
      <style:paragraph-properties fo:text-align="center" style:writing-mode="lr-tb"/>
    </style:style>
    <style:style style:name="P268" style:family="paragraph">
      <loext:graphic-properties draw:fill="none" draw:fill-color="#ffffff"/>
      <style:paragraph-properties style:writing-mode="lr-tb"/>
    </style:style>
    <style:style style:name="P269" style:family="paragraph">
      <style:paragraph-properties fo:margin-top="0cm" fo:margin-bottom="0.353cm" fo:line-height="115%" fo:text-align="end" style:writing-mode="lr-tb"/>
    </style:style>
    <style:style style:name="P270" style:family="paragraph">
      <loext:graphic-properties draw:fill="solid" draw:fill-color="#ffffff"/>
      <style:paragraph-properties fo:margin-top="0cm" fo:margin-bottom="0.353cm" fo:line-height="115%" fo:text-align="end" style:writing-mode="lr-tb"/>
    </style:style>
    <style:style style:name="P271" style:family="paragraph">
      <style:paragraph-properties fo:text-align="center"/>
    </style:style>
    <style:style style:name="P272"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P27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4"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5" style:family="paragraph">
      <style:paragraph-properties fo:margin-left="0cm" fo:margin-right="0cm" fo:margin-top="0cm" fo:margin-bottom="0cm" fo:line-height="100%" fo:text-align="start" fo:text-indent="0cm"/>
    </style:style>
    <style:style style:name="P27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7" style:family="paragraph">
      <style:paragraph-properties fo:margin-left="0cm" fo:margin-right="0cm" fo:margin-top="0cm" fo:margin-bottom="0cm" fo:line-height="100%" fo:text-align="center" fo:text-indent="0cm"/>
    </style:style>
    <style:style style:name="P2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9" style:family="paragraph">
      <style:paragraph-properties fo:margin-left="0cm" fo:margin-right="0cm" fo:margin-top="0cm" fo:margin-bottom="0cm" fo:line-height="120%" fo:text-align="start" fo:text-indent="0cm"/>
    </style:style>
    <style:style style:name="P280" style:family="paragraph">
      <loext:graphic-properties draw:fill="none" draw:fill-color="#729fcf"/>
      <style:paragraph-properties fo:margin-left="0cm" fo:margin-right="0cm" fo:margin-top="0cm" fo:margin-bottom="0cm" fo:line-height="12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loext:char-shading-value="0"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font-size="12pt" fo:language="en" fo:country="none" fo:background-color="transparent" loext:char-shading-value="0" style:font-size-asian="12pt" style:font-size-complex="12pt"/>
    </style:style>
    <style:style style:name="T10" style:family="text">
      <style:text-properties fo:color="#008000" style:font-name="Courier New1" fo:font-size="10pt" fo:font-weight="bold" style:font-size-asian="10pt" style:language-asian="nl" style:country-asian="BE" style:font-weight-asian="bold" style:font-name-complex="Courier New1"/>
    </style:style>
    <style:style style:name="T11"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officeooo:rsid="0034c672" style:font-size-asian="10pt" style:language-asian="nl" style:country-asian="BE" style:font-weight-asian="bold" style:font-name-complex="Courier New1" style:font-size-complex="12pt"/>
    </style:style>
    <style:style style:name="T13"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4" style:family="text">
      <style:text-properties fo:color="#008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5" style:family="text">
      <style:text-properties fo:color="#008000" fo:language="en" fo:country="GB" fo:font-weight="bold" fo:background-color="transparent" loext:char-shading-value="0" style:language-asian="nl" style:country-asian="BE" style:font-weight-asian="bold"/>
    </style:style>
    <style:style style:name="T16" style:family="text">
      <style:text-properties fo:color="#008000" style:font-name="Courier New2" fo:font-size="10pt" fo:font-weight="bold"/>
    </style:style>
    <style:style style:name="T17"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8" style:family="text">
      <style:text-properties fo:color="#008000" style:font-name="Courier New2" fo:font-size="10pt" fo:font-weight="bold" officeooo:rsid="002d061b"/>
    </style:style>
    <style:style style:name="T19" style:family="text">
      <style:text-properties fo:color="#008000" fo:font-weight="bold" fo:background-color="transparent" loext:char-shading-value="0"/>
    </style:style>
    <style:style style:name="T20" style:family="text">
      <style:text-properties style:font-name="Courier New1" fo:font-size="12pt" fo:font-weight="bold" style:font-size-asian="12pt" style:font-weight-asian="bold" style:font-name-complex="Courier New1" style:font-size-complex="12pt"/>
    </style:style>
    <style:style style:name="T21" style:family="text">
      <style:text-properties style:font-name="Courier New1" fo:font-size="12pt" fo:font-weight="bold" style:font-name-asian="Courier New1" style:font-size-asian="12pt" style:font-weight-asian="bold" style:font-name-complex="Courier New1" style:font-size-complex="12pt"/>
    </style:style>
    <style:style style:name="T22" style:family="text">
      <style:text-properties style:font-name="Courier New1" fo:font-size="10pt" style:font-size-asian="10pt" style:language-asian="nl" style:country-asian="BE" style:font-name-complex="Courier New1" style:font-size-complex="12pt"/>
    </style:style>
    <style:style style:name="T23" style:family="text">
      <style:text-properties style:font-name="Courier New1" fo:font-size="10pt" fo:font-weight="bold" style:font-size-asian="10pt" style:language-asian="nl" style:country-asian="BE" style:font-weight-asian="bold" style:font-name-complex="Courier New1" style:font-size-complex="12pt"/>
    </style:style>
    <style:style style:name="T24" style:family="text">
      <style:text-properties fo:color="#000000"/>
    </style:style>
    <style:style style:name="T25" style:family="text">
      <style:text-properties fo:color="#000000" style:font-name="Courier New1" fo:font-size="10pt" style:font-size-asian="10pt" style:language-asian="nl" style:country-asian="BE" style:font-name-complex="Courier New1"/>
    </style:style>
    <style:style style:name="T26" style:family="text">
      <style:text-properties fo:color="#000000" style:font-name="Courier New1" fo:font-size="10pt" style:font-size-asian="10pt" style:language-asian="nl" style:country-asian="BE" style:font-name-complex="Courier New1" style:font-size-complex="12pt"/>
    </style:style>
    <style:style style:name="T27" style:family="text">
      <style:text-properties fo:color="#000000" style:font-name="Courier New1" fo:font-size="10pt" officeooo:rsid="002d061b" style:font-size-asian="10pt" style:language-asian="nl" style:country-asian="BE" style:font-name-complex="Courier New1" style:font-size-complex="12pt"/>
    </style:style>
    <style:style style:name="T28" style:family="text">
      <style:text-properties fo:color="#000000" style:font-name="Courier New1" fo:font-size="10pt" officeooo:rsid="002d9b92" style:font-size-asian="10pt" style:language-asian="nl" style:country-asian="BE" style:font-name-complex="Courier New1" style:font-size-complex="12pt"/>
    </style:style>
    <style:style style:name="T29" style:family="text">
      <style:text-properties fo:color="#000000" style:font-name="Courier New1" fo:font-size="10pt" officeooo:rsid="002f3445" style:font-size-asian="10pt" style:language-asian="nl" style:country-asian="BE" style:font-name-complex="Courier New1" style:font-size-complex="12pt"/>
    </style:style>
    <style:style style:name="T30" style:family="text">
      <style:text-properties fo:color="#000000" style:font-name="Courier New1" fo:font-size="10pt" officeooo:rsid="002fdbeb" style:font-size-asian="10pt" style:language-asian="nl" style:country-asian="BE" style:font-name-complex="Courier New1" style:font-size-complex="12pt"/>
    </style:style>
    <style:style style:name="T31" style:family="text">
      <style:text-properties fo:color="#000000" style:font-name="Courier New1" fo:font-size="10pt" officeooo:rsid="00319604" style:font-size-asian="10pt" style:language-asian="nl" style:country-asian="BE" style:font-name-complex="Courier New1" style:font-size-complex="12pt"/>
    </style:style>
    <style:style style:name="T32" style:family="text">
      <style:text-properties fo:color="#000000" style:font-name="Courier New1" fo:font-size="10pt" officeooo:rsid="00330f74" style:font-size-asian="10pt" style:language-asian="nl" style:country-asian="BE" style:font-name-complex="Courier New1" style:font-size-complex="12pt"/>
    </style:style>
    <style:style style:name="T33" style:family="text">
      <style:text-properties fo:color="#000000" style:font-name="Courier New1" fo:font-size="10pt" officeooo:rsid="0033a059" style:font-size-asian="10pt" style:language-asian="nl" style:country-asian="BE" style:font-name-complex="Courier New1" style:font-size-complex="12pt"/>
    </style:style>
    <style:style style:name="T34" style:family="text">
      <style:text-properties fo:color="#000000" style:font-name="Courier New1" fo:font-size="10pt" officeooo:rsid="0034c672" style:font-size-asian="10pt" style:language-asian="nl" style:country-asian="BE" style:font-name-complex="Courier New1" style:font-size-complex="12pt"/>
    </style:style>
    <style:style style:name="T35" style:family="text">
      <style:text-properties fo:color="#000000" style:font-name="Courier New1" fo:font-size="10pt" officeooo:rsid="0034ed77" style:font-size-asian="10pt" style:language-asian="nl" style:country-asian="BE" style:font-name-complex="Courier New1" style:font-size-complex="12pt"/>
    </style:style>
    <style:style style:name="T36" style:family="text">
      <style:text-properties fo:color="#000000" style:font-name="Courier New1" fo:font-size="10pt" officeooo:rsid="00400fcf" style:font-size-asian="10pt" style:language-asian="nl" style:country-asian="BE" style:font-name-complex="Courier New1" style:font-size-complex="12pt"/>
    </style:style>
    <style:style style:name="T37" style:family="text">
      <style:text-properties fo:color="#000000" style:font-name="Courier New1" fo:font-size="10pt" style:font-name-asian="Courier New1" style:font-size-asian="10pt" style:language-asian="nl" style:country-asian="BE" style:font-name-complex="Courier New1"/>
    </style:style>
    <style:style style:name="T38" style:family="text">
      <style:text-properties fo:color="#000000" style:font-name="Courier New1" fo:font-size="10pt" style:font-name-asian="Courier New1" style:font-size-asian="10pt" style:language-asian="nl" style:country-asian="BE" style:font-name-complex="Courier New1" style:font-size-complex="12pt"/>
    </style:style>
    <style:style style:name="T39" style:family="text">
      <style:text-properties fo:color="#000000" style:font-name="Courier New1" fo:font-size="10pt" fo:language="en" fo:country="GB" fo:background-color="transparent" loext:char-shading-value="0" style:font-name-asian="Courier New1" style:font-size-asian="10pt" style:language-asian="nl" style:country-asian="BE" style:font-name-complex="Courier New1" style:font-size-complex="12pt"/>
    </style:style>
    <style:style style:name="T40" style:family="text">
      <style:text-properties fo:color="#000000" style:font-name="Courier New1" fo:font-size="10pt" fo:language="en" fo:country="GB" officeooo:rsid="0034ed77" fo:background-color="transparent" loext:char-shading-value="0" style:font-name-asian="Courier New1" style:font-size-asian="10pt" style:language-asian="nl" style:country-asian="BE" style:font-name-complex="Courier New1" style:font-size-complex="12pt"/>
    </style:style>
    <style:style style:name="T41" style:family="text">
      <style:text-properties fo:color="#000000" style:font-name="Courier New1" fo:font-size="10pt" fo:language="en" fo:country="GB" fo:background-color="transparent" loext:char-shading-value="0" style:font-size-asian="10pt" style:language-asian="nl" style:country-asian="BE" style:font-name-complex="Courier New1" style:font-size-complex="12pt"/>
    </style:style>
    <style:style style:name="T42" style:family="text">
      <style:text-properties fo:color="#000000" style:font-name="Courier New1" fo:font-size="10pt" fo:language="en" fo:country="GB" officeooo:rsid="002d06d9" fo:background-color="transparent" loext:char-shading-value="0" style:font-size-asian="10pt" style:language-asian="nl" style:country-asian="BE" style:font-name-complex="Courier New1" style:font-size-complex="12pt"/>
    </style:style>
    <style:style style:name="T43" style:family="text">
      <style:text-properties fo:color="#000000" style:font-name="Courier New1" fo:font-size="10pt" fo:language="en" fo:country="GB" fo:font-weight="bold" fo:background-color="transparent" loext:char-shading-value="0" style:font-name-asian="Courier New1" style:font-size-asian="10pt" style:language-asian="nl" style:country-asian="BE" style:font-weight-asian="bold" style:font-name-complex="Courier New1" style:font-size-complex="12pt"/>
    </style:style>
    <style:style style:name="T44" style:family="text">
      <style:text-properties fo:color="#000000"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45" style:family="text">
      <style:text-properties fo:color="#00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46"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47"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48" style:family="text">
      <style:text-properties fo:color="#000000" style:font-name="Courier New1" fo:font-size="10pt" fo:font-weight="normal" style:font-name-asian="Courier New1" style:font-size-asian="10pt" style:language-asian="nl" style:country-asian="BE" style:font-weight-asian="normal" style:font-name-complex="Courier New1" style:font-size-complex="12pt" style:font-weight-complex="normal"/>
    </style:style>
    <style:style style:name="T49" style:family="text">
      <style:text-properties fo:color="#000000" style:font-name="Courier New1" fo:font-size="10pt" officeooo:rsid="0028d0ce" style:font-name-asian="Calibri" style:font-size-asian="10pt" style:language-asian="nl" style:country-asian="BE" style:font-name-complex="Courier New1" style:font-size-complex="12pt" style:language-complex="ar" style:country-complex="SA"/>
    </style:style>
    <style:style style:name="T50" style:family="text">
      <style:text-properties fo:color="#000000" style:font-name="Courier New1" fo:font-size="10pt" officeooo:rsid="00400fcf" style:font-name-asian="Calibri" style:font-size-asian="10pt" style:language-asian="nl" style:country-asian="BE" style:font-name-complex="Courier New1" style:font-size-complex="12pt" style:language-complex="ar" style:country-complex="SA"/>
    </style:style>
    <style:style style:name="T51" style:family="text">
      <style:text-properties fo:color="#000000" fo:language="en" fo:country="GB" fo:background-color="transparent" loext:char-shading-value="0" style:language-asian="nl" style:country-asian="BE"/>
    </style:style>
    <style:style style:name="T52" style:family="text">
      <style:text-properties fo:color="#000000" fo:language="en" fo:country="GB" officeooo:rsid="002d06d9" fo:background-color="transparent" loext:char-shading-value="0" style:language-asian="nl" style:country-asian="BE"/>
    </style:style>
    <style:style style:name="T53" style:family="text">
      <style:text-properties fo:color="#000000" fo:language="en" fo:country="GB" officeooo:rsid="0033a059" fo:background-color="transparent" loext:char-shading-value="0" style:language-asian="nl" style:country-asian="BE"/>
    </style:style>
    <style:style style:name="T54" style:family="text">
      <style:text-properties fo:color="#000000" fo:language="en" fo:country="GB" fo:background-color="transparent" loext:char-shading-value="0" style:font-name-asian="Calibri" style:language-asian="nl" style:country-asian="BE"/>
    </style:style>
    <style:style style:name="T55" style:family="text">
      <style:text-properties fo:color="#000000" fo:language="en" fo:country="GB" fo:background-color="transparent" loext:char-shading-value="0" style:font-name-asian="Courier New1" style:language-asian="nl" style:country-asian="BE"/>
    </style:style>
    <style:style style:name="T56" style:family="text">
      <style:text-properties fo:color="#000000" style:font-name="Courier New2" fo:font-size="10pt"/>
    </style:style>
    <style:style style:name="T57" style:family="text">
      <style:text-properties fo:color="#000000" style:font-name="Courier New2" fo:font-size="10pt" fo:font-weight="bold"/>
    </style:style>
    <style:style style:name="T58"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59" style:family="text">
      <style:text-properties fo:color="#000000" style:font-name="Courier New2" fo:font-size="10pt" fo:font-weight="bold" style:font-name-asian="Courier New1" style:font-size-asian="10pt" style:language-asian="nl" style:country-asian="BE" style:font-weight-asian="bold" style:font-name-complex="Courier New1" style:font-size-complex="12pt"/>
    </style:style>
    <style:style style:name="T60" style:family="text">
      <style:text-properties fo:color="#000000" style:font-name="Courier New2" fo:font-size="10pt" style:font-name-asian="Courier New1" style:font-size-asian="10pt" style:language-asian="nl" style:country-asian="BE" style:font-name-complex="Courier New1" style:font-size-complex="12pt"/>
    </style:style>
    <style:style style:name="T61" style:family="text">
      <style:text-properties fo:color="#000000" style:font-name="Courier New2" fo:font-size="10pt" style:font-size-asian="12pt" style:font-size-complex="12pt"/>
    </style:style>
    <style:style style:name="T62" style:family="text">
      <style:text-properties fo:color="#000000" style:font-name="Courier New2" fo:font-size="10pt" officeooo:rsid="002f3445" style:font-size-asian="12pt" style:font-size-complex="12pt"/>
    </style:style>
    <style:style style:name="T63" style:family="text">
      <style:text-properties fo:color="#000000" style:font-name="Courier New2" fo:font-size="10pt" fo:font-weight="normal" style:font-name-asian="Courier New1" style:font-size-asian="10pt" style:language-asian="nl" style:country-asian="BE" style:font-weight-asian="normal" style:font-name-complex="Courier New1" style:font-size-complex="12pt" style:font-weight-complex="normal"/>
    </style:style>
    <style:style style:name="T64" style:family="text">
      <style:text-properties fo:color="#000000" style:font-name="Courier New2" fo:font-size="10pt" fo:font-weight="normal" officeooo:rsid="002f3445" style:font-name-asian="Courier New1" style:font-size-asian="10pt" style:language-asian="nl" style:country-asian="BE" style:font-weight-asian="normal" style:font-name-complex="Courier New1" style:font-size-complex="12pt" style:font-weight-complex="normal"/>
    </style:style>
    <style:style style:name="T65" style:family="text">
      <style:text-properties fo:color="#000000" style:font-name="Courier New2" fo:font-size="10pt" officeooo:rsid="0020598f"/>
    </style:style>
    <style:style style:name="T66" style:family="text">
      <style:text-properties fo:color="#000000" style:font-name="Courier New2" fo:font-size="10pt" fo:language="en" fo:country="GB"/>
    </style:style>
    <style:style style:name="T67" style:family="text">
      <style:text-properties fo:color="#000000" style:font-name="Courier New2" fo:font-size="10pt" officeooo:rsid="002d061b"/>
    </style:style>
    <style:style style:name="T68" style:family="text">
      <style:text-properties fo:color="#000000" style:font-name="Courier New2" fo:font-size="10pt" officeooo:rsid="002f3445"/>
    </style:style>
    <style:style style:name="T69" style:family="text">
      <style:text-properties fo:color="#000000" style:font-name="Courier New2" fo:font-size="10pt" officeooo:rsid="002fdbeb"/>
    </style:style>
    <style:style style:name="T70" style:family="text">
      <style:text-properties fo:color="#000000" style:font-name="Courier New2" fo:font-size="10pt" officeooo:rsid="00330f74"/>
    </style:style>
    <style:style style:name="T71" style:family="text">
      <style:text-properties fo:color="#000000" style:font-name="Courier New2" fo:font-size="10pt" officeooo:rsid="0033a059"/>
    </style:style>
    <style:style style:name="T72" style:family="text">
      <style:text-properties fo:color="#000000" style:font-name="Courier New2" fo:font-size="10pt" officeooo:rsid="0034307a"/>
    </style:style>
    <style:style style:name="T73" style:family="text">
      <style:text-properties fo:color="#000000" style:font-name="Courier New2" fo:font-size="10pt" officeooo:rsid="0034c672"/>
    </style:style>
    <style:style style:name="T74" style:family="text">
      <style:text-properties fo:color="#000000" style:font-name="Courier New2" fo:font-size="10pt" officeooo:rsid="0034ed77"/>
    </style:style>
    <style:style style:name="T75" style:family="text">
      <style:text-properties fo:color="#000000" fo:font-size="12pt" style:font-size-asian="12pt" style:font-size-complex="12pt"/>
    </style:style>
    <style:style style:name="T76" style:family="text">
      <style:text-properties fo:color="#000000" fo:background-color="transparent" loext:char-shading-value="0"/>
    </style:style>
    <style:style style:name="T77" style:family="text">
      <style:text-properties fo:color="#ff0000"/>
    </style:style>
    <style:style style:name="T78" style:family="text">
      <style:text-properties fo:color="#ff0000" style:font-name="Courier New1" fo:font-size="10pt" fo:font-weight="bold" style:font-size-asian="10pt" style:language-asian="nl" style:country-asian="BE" style:font-weight-asian="bold" style:font-name-complex="Courier New1"/>
    </style:style>
    <style:style style:name="T79"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80"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81" style:family="text">
      <style:text-properties fo:color="#ff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82" style:family="text">
      <style:text-properties fo:color="#ff0000" fo:language="en" fo:country="GB" fo:font-weight="bold" fo:background-color="transparent" loext:char-shading-value="0" style:language-asian="nl" style:country-asian="BE" style:font-weight-asian="bold"/>
    </style:style>
    <style:style style:name="T83" style:family="text">
      <style:text-properties fo:color="#ff0000" style:font-name="Courier New2" fo:font-size="10pt" fo:font-weight="bold"/>
    </style:style>
    <style:style style:name="T84"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85" style:family="text">
      <style:text-properties fo:color="#ff0000" style:font-name="Courier New2" fo:font-size="10pt" fo:font-weight="bold" style:font-name-asian="Courier New1" style:font-size-asian="10pt" style:language-asian="nl" style:country-asian="BE" style:font-weight-asian="bold" style:font-name-complex="Courier New1" style:font-size-complex="12pt"/>
    </style:style>
    <style:style style:name="T86"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87" style:family="text">
      <style:text-properties fo:color="#ff0000" style:font-name="Courier New2" fo:font-size="10pt" fo:font-weight="bold" style:font-size-asian="12pt" style:font-size-complex="12pt"/>
    </style:style>
    <style:style style:name="T88" style:family="text">
      <style:text-properties fo:color="#ff0000" style:font-name="Courier New2" fo:font-size="10pt" fo:language="en" fo:country="GB" fo:font-weight="bold"/>
    </style:style>
    <style:style style:name="T89" style:family="text">
      <style:text-properties fo:color="#ff0000" fo:font-weight="bold" fo:background-color="transparent" loext:char-shading-value="0"/>
    </style:style>
    <style:style style:name="T90" style:family="text">
      <style:text-properties fo:color="#0000ff"/>
    </style:style>
    <style:style style:name="T91" style:family="text">
      <style:text-properties fo:color="#0000ff" style:font-name="Courier New1" fo:font-size="10pt" fo:font-weight="bold" style:font-size-asian="10pt" style:language-asian="nl" style:country-asian="BE" style:font-weight-asian="bold" style:font-name-complex="Courier New1"/>
    </style:style>
    <style:style style:name="T92"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93" style:family="text">
      <style:text-properties fo:color="#0000ff" style:font-name="Courier New1" fo:font-size="10pt" fo:font-weight="bold" officeooo:rsid="0028d0ce" style:font-size-asian="10pt" style:language-asian="nl" style:country-asian="BE" style:font-weight-asian="bold" style:font-name-complex="Courier New1" style:font-size-complex="12pt"/>
    </style:style>
    <style:style style:name="T94"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95" style:family="text">
      <style:text-properties fo:color="#0000ff" style:font-name="Courier New1" fo:font-size="10pt" style:font-size-asian="10pt" style:language-asian="nl" style:country-asian="BE" style:font-name-complex="Courier New1"/>
    </style:style>
    <style:style style:name="T96" style:family="text">
      <style:text-properties fo:color="#0000ff" style:font-name="Courier New1" fo:font-size="10pt" style:font-size-asian="10pt" style:language-asian="nl" style:country-asian="BE" style:font-name-complex="Courier New1" style:font-size-complex="12pt"/>
    </style:style>
    <style:style style:name="T97" style:family="text">
      <style:text-properties fo:color="#0000ff" style:font-name="Courier New1" fo:font-size="10pt" officeooo:rsid="002d061b" style:font-size-asian="10pt" style:language-asian="nl" style:country-asian="BE" style:font-name-complex="Courier New1" style:font-size-complex="12pt"/>
    </style:style>
    <style:style style:name="T98" style:family="text">
      <style:text-properties fo:color="#0000ff" style:font-name="Courier New1" fo:font-size="10pt" officeooo:rsid="0034ed77" style:font-size-asian="10pt" style:language-asian="nl" style:country-asian="BE" style:font-name-complex="Courier New1"/>
    </style:style>
    <style:style style:name="T99" style:family="text">
      <style:text-properties fo:color="#0000ff" style:font-name="Courier New1" fo:font-size="10pt" style:font-name-asian="Courier New1" style:font-size-asian="10pt" style:language-asian="nl" style:country-asian="BE" style:font-name-complex="Courier New1"/>
    </style:style>
    <style:style style:name="T100" style:family="text">
      <style:text-properties fo:color="#0000ff" style:font-name="Courier New1" fo:font-size="10pt" style:font-name-asian="Courier New1" style:font-size-asian="10pt" style:language-asian="nl" style:country-asian="BE" style:font-name-complex="Courier New1" style:font-size-complex="12pt"/>
    </style:style>
    <style:style style:name="T101" style:family="text">
      <style:text-properties fo:color="#0000ff"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02" style:family="text">
      <style:text-properties fo:color="#0000ff" style:font-name="Courier New1" fo:font-size="10pt" fo:language="en" fo:country="GB" fo:font-weight="bold" officeooo:rsid="0028d0ce" fo:background-color="transparent" loext:char-shading-value="0" style:font-size-asian="10pt" style:language-asian="nl" style:country-asian="BE" style:font-weight-asian="bold" style:font-name-complex="Courier New1" style:font-size-complex="12pt"/>
    </style:style>
    <style:style style:name="T103" style:family="text">
      <style:text-properties fo:color="#0000ff"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104" style:family="text">
      <style:text-properties fo:color="#0000ff" style:font-name="Courier New1" fo:font-size="10pt" fo:language="en" fo:country="GB" fo:background-color="transparent" loext:char-shading-value="0" style:font-size-asian="10pt" style:language-asian="nl" style:country-asian="BE" style:font-name-complex="Courier New1" style:font-size-complex="12pt"/>
    </style:style>
    <style:style style:name="T105" style:family="text">
      <style:text-properties fo:color="#0000ff" fo:language="en" fo:country="GB" fo:font-weight="bold" fo:background-color="transparent" loext:char-shading-value="0" style:language-asian="nl" style:country-asian="BE" style:font-weight-asian="bold"/>
    </style:style>
    <style:style style:name="T106" style:family="text">
      <style:text-properties fo:color="#0000ff" fo:language="en" fo:country="GB" fo:background-color="transparent" loext:char-shading-value="0" style:font-name-asian="Calibri" style:language-asian="nl" style:country-asian="BE" style:font-size-complex="12pt"/>
    </style:style>
    <style:style style:name="T107" style:family="text">
      <style:text-properties fo:color="#0000ff" fo:language="en" fo:country="GB" fo:background-color="transparent" loext:char-shading-value="0" style:font-name-asian="Courier New1" style:language-asian="nl" style:country-asian="BE" style:font-size-complex="12pt"/>
    </style:style>
    <style:style style:name="T108" style:family="text">
      <style:text-properties fo:color="#0000ff" fo:language="en" fo:country="GB" fo:background-color="transparent" loext:char-shading-value="0" style:language-asian="nl" style:country-asian="BE"/>
    </style:style>
    <style:style style:name="T109" style:family="text">
      <style:text-properties fo:color="#0000ff" style:font-name="Courier New2" fo:font-size="10pt"/>
    </style:style>
    <style:style style:name="T110" style:family="text">
      <style:text-properties fo:color="#0000ff" style:font-name="Courier New2" fo:font-size="10pt" fo:font-weight="bold"/>
    </style:style>
    <style:style style:name="T111" style:family="text">
      <style:text-properties fo:color="#0000ff" style:font-name="Courier New2" fo:font-size="10pt" fo:font-weight="bold" style:font-size-asian="10pt" style:language-asian="nl" style:country-asian="BE" style:font-weight-asian="bold" style:font-name-complex="Courier New1" style:font-size-complex="12pt"/>
    </style:style>
    <style:style style:name="T112" style:family="text">
      <style:text-properties fo:color="#0000ff" style:font-name="Courier New2" fo:font-size="10pt" fo:font-weight="bold" officeooo:rsid="0034ed77" style:font-size-asian="10pt" style:language-asian="nl" style:country-asian="BE" style:font-weight-asian="bold" style:font-name-complex="Courier New1" style:font-size-complex="12pt"/>
    </style:style>
    <style:style style:name="T113" style:family="text">
      <style:text-properties fo:color="#800080"/>
    </style:style>
    <style:style style:name="T114" style:family="text">
      <style:text-properties fo:color="#800080" style:font-name="Courier New1" fo:font-size="10pt" style:font-size-asian="10pt" style:language-asian="nl" style:country-asian="BE" style:font-name-complex="Courier New1" style:font-size-complex="12pt"/>
    </style:style>
    <style:style style:name="T115"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116" style:family="text">
      <style:text-properties fo:color="#800080" fo:language="en" fo:country="GB" fo:font-weight="bold" fo:background-color="transparent" loext:char-shading-value="0" style:language-asian="nl" style:country-asian="BE" style:font-weight-asian="bold"/>
    </style:style>
    <style:style style:name="T117" style:family="text">
      <style:text-properties fo:color="#800080" fo:language="en" fo:country="GB" fo:background-color="transparent" loext:char-shading-value="0" style:language-asian="nl" style:country-asian="BE"/>
    </style:style>
    <style:style style:name="T118" style:family="text">
      <style:text-properties fo:color="#800080" style:font-name="Courier New2" fo:font-size="10pt"/>
    </style:style>
    <style:style style:name="T119" style:family="text">
      <style:text-properties fo:color="#800080" style:font-name="Courier New2" fo:font-size="10pt" fo:font-weight="bold"/>
    </style:style>
    <style:style style:name="T120"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121" style:family="text">
      <style:text-properties fo:color="#800080" style:font-name="Courier New2" fo:font-size="10pt" fo:font-weight="bold" style:font-size-asian="12pt" style:font-size-complex="12pt"/>
    </style:style>
    <style:style style:name="T122" style:family="text">
      <style:text-properties fo:color="#800080" style:font-name="Courier New2" fo:font-size="10pt" fo:font-weight="bold" style:font-name-asian="Courier New1" style:font-size-asian="10pt" style:language-asian="nl" style:country-asian="BE" style:font-weight-asian="bold" style:font-name-complex="Courier New1" style:font-size-complex="12pt"/>
    </style:style>
    <style:style style:name="T123" style:family="text">
      <style:text-properties fo:color="#800080" style:font-name="Courier New2" fo:font-size="10pt" style:font-name-asian="Courier New1" style:font-size-asian="10pt" style:language-asian="nl" style:country-asian="BE" style:font-name-complex="Courier New1" style:font-size-complex="12pt"/>
    </style:style>
    <style:style style:name="T124" style:family="text">
      <style:text-properties fo:color="#800080" style:font-name="Courier New2" fo:font-size="10pt" style:font-size-asian="12pt" style:font-size-complex="12pt"/>
    </style:style>
    <style:style style:name="T125" style:family="text">
      <style:text-properties fo:color="#800080" style:font-name="Courier New2" fo:font-size="10pt" officeooo:rsid="00295f36"/>
    </style:style>
    <style:style style:name="T126" style:family="text">
      <style:text-properties fo:color="#800080" fo:font-weight="bold" fo:background-color="transparent" loext:char-shading-value="0"/>
    </style:style>
    <style:style style:name="T127" style:family="text">
      <style:text-properties fo:color="#800080" fo:background-color="transparent" loext:char-shading-value="0"/>
    </style:style>
    <style:style style:name="T128" style:family="text">
      <style:text-properties style:font-name-complex="Calibri"/>
    </style:style>
    <style:style style:name="T129" style:family="text">
      <style:text-properties style:text-position="super 58%" fo:font-size="12pt" fo:language="en" fo:country="GB" fo:background-color="transparent" loext:char-shading-value="0" style:font-size-asian="12pt" style:font-size-complex="12pt"/>
    </style:style>
    <style:style style:name="T130" style:family="text">
      <style:text-properties fo:font-weight="bold" style:font-weight-asian="bold" style:font-weight-complex="bold"/>
    </style:style>
    <style:style style:name="T131" style:family="text">
      <style:text-properties style:font-name="Courier New3"/>
    </style:style>
    <style:style style:name="T132" style:family="text">
      <style:text-properties fo:font-style="italic" style:font-style-asian="italic" style:font-style-complex="italic"/>
    </style:style>
    <style:style style:name="T133" style:family="text">
      <style:text-properties style:font-name="Calibri1"/>
    </style:style>
    <style:style style:name="T134" style:family="text">
      <style:text-properties style:font-name="Calibri1" fo:font-size="12pt"/>
    </style:style>
    <style:style style:name="T135" style:family="text">
      <style:text-properties style:font-name="Calibri1" fo:font-size="12pt" fo:language="en" fo:country="GB" style:font-size-asian="12pt" style:font-size-complex="12pt"/>
    </style:style>
    <style:style style:name="T136" style:family="text">
      <style:text-properties fo:language="en" fo:country="none"/>
    </style:style>
    <style:style style:name="T137" style:family="text">
      <style:text-properties fo:language="en" fo:country="none" officeooo:rsid="002d061b"/>
    </style:style>
    <style:style style:name="T138" style:family="text">
      <style:text-properties style:font-name="Courier New2" fo:font-size="10pt"/>
    </style:style>
    <style:style style:name="T139" style:family="text">
      <style:text-properties style:font-name="Courier New2" fo:font-size="10pt" fo:font-weight="bold"/>
    </style:style>
    <style:style style:name="T140" style:family="text">
      <style:text-properties style:use-window-font-color="true" fo:language="en" fo:country="GB" style:language-asian="zh" style:country-asian="CN" style:language-complex="ar" style:country-complex="SA"/>
    </style:style>
    <style:style style:name="T141" style:family="text">
      <style:text-properties style:use-window-font-color="true" fo:language="en" fo:country="GB" fo:background-color="transparent" loext:char-shading-value="0" style:language-asian="zh" style:country-asian="CN" style:language-complex="ar" style:country-complex="SA"/>
    </style:style>
    <style:style style:name="T142" style:family="text">
      <style:text-properties style:use-window-font-color="true" fo:language="en" fo:country="none" style:language-asian="zh" style:country-asian="CN" style:language-complex="ar" style:country-complex="SA"/>
    </style:style>
    <style:style style:name="T143" style:family="text">
      <style:text-properties officeooo:rsid="001b5e54"/>
    </style:style>
    <style:style style:name="T144" style:family="text">
      <style:text-properties fo:language="en" fo:country="US"/>
    </style:style>
    <style:style style:name="T145" style:family="text">
      <style:text-properties fo:language="en" fo:country="US" officeooo:rsid="001d2772"/>
    </style:style>
    <style:style style:name="T146" style:family="text">
      <style:text-properties fo:language="en" fo:country="US" officeooo:rsid="001efcb5"/>
    </style:style>
    <style:style style:name="T147" style:family="text">
      <style:text-properties fo:language="en" fo:country="US" officeooo:rsid="00295f36"/>
    </style:style>
    <style:style style:name="T148" style:family="text">
      <style:text-properties fo:language="en" fo:country="US" officeooo:rsid="00356171"/>
    </style:style>
    <style:style style:name="T149" style:family="text">
      <style:text-properties fo:language="en" fo:country="US" officeooo:rsid="0046976e"/>
    </style:style>
    <style:style style:name="T150" style:family="text">
      <style:text-properties officeooo:rsid="0022fd8b"/>
    </style:style>
    <style:style style:name="T151" style:family="text">
      <style:text-properties officeooo:rsid="00244e89"/>
    </style:style>
    <style:style style:name="T152" style:family="text">
      <style:text-properties officeooo:rsid="00257eb1"/>
    </style:style>
    <style:style style:name="T153" style:family="text">
      <style:text-properties officeooo:rsid="002f3445"/>
    </style:style>
    <style:style style:name="T154" style:family="text">
      <style:text-properties officeooo:rsid="002fdbeb"/>
    </style:style>
    <style:style style:name="T155" style:family="text">
      <style:text-properties officeooo:rsid="00356171"/>
    </style:style>
    <style:style style:name="T156" style:family="text">
      <style:text-properties officeooo:rsid="00372d76"/>
    </style:style>
    <style:style style:name="T157" style:family="text">
      <style:text-properties officeooo:rsid="0037d262"/>
    </style:style>
    <style:style style:name="T158" style:family="text">
      <style:text-properties officeooo:rsid="003baa1b"/>
    </style:style>
    <style:style style:name="T159" style:family="text">
      <style:text-properties officeooo:rsid="003d67d8"/>
    </style:style>
    <style:style style:name="T160" style:family="text">
      <style:text-properties officeooo:rsid="0041660b"/>
    </style:style>
    <style:style style:name="T161" style:family="text">
      <style:text-properties officeooo:rsid="00429479"/>
    </style:style>
    <style:style style:name="T162" style:family="text">
      <style:text-properties officeooo:rsid="0044c295"/>
    </style:style>
    <style:style style:name="T163" style:family="text">
      <style:text-properties officeooo:rsid="0046976e"/>
    </style:style>
    <style:style style:name="T164"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65"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66"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7"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8" style:family="text">
      <style:text-properties style:font-name="Arial" fo:font-size="10pt" fo:font-weight="bold" style:font-size-asian="10pt" style:font-weight-asian="bold" style:font-size-complex="10pt" style:font-weight-complex="bold"/>
    </style:style>
    <style:style style:name="T169" style:family="text">
      <style:text-properties fo:font-variant="normal" fo:text-transform="none" fo:color="#000000"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70" style:family="text">
      <style:text-properties fo:font-variant="normal" fo:text-transform="none" fo:color="#000000" style:text-outline="false" style:text-line-through-style="none" style:text-line-through-typ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171" style:family="text">
      <style:text-properties fo:font-variant="normal" fo:text-transform="none" fo:color="#00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2" style:family="text">
      <style:text-properties fo:font-variant="normal" fo:text-transform="none" fo:color="#000000" style:text-outline="false" style:text-line-through-style="none" style:text-line-through-typ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73" style:family="text">
      <style:text-properties fo:font-variant="normal" fo:text-transform="none" fo:color="#0000ff" style:text-outline="false" style:text-line-through-style="none" style:text-line-through-type="none" style:font-name="Arial1" fo:font-size="12pt" fo:font-style="italic" fo:text-shadow="none" style:text-underline-style="none" fo:font-weight="normal" style:letter-kerning="true"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T174" style:family="text">
      <style:text-properties fo:font-variant="normal" fo:text-transform="none" fo:color="#ff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5" style:family="text">
      <style:text-properties fo:font-variant="normal" fo:text-transform="none" fo:color="#0000ff"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6" style:family="text">
      <style:text-properties fo:font-variant="normal" fo:text-transform="none" fo:color="#80808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9.012cm" draw:visible-area-height="3.401cm"/>
    </style:style>
    <style:style style:name="fr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567cm" draw:visible-area-height="3.401cm"/>
    </style:style>
    <style:style style:name="fr1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993cm" draw:visible-area-height="2.632cm"/>
    </style:style>
    <style:style style:name="fr1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5cm" draw:visible-area-height="3.328cm"/>
    </style:style>
    <style:style style:name="fr1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3cm" draw:visible-area-height="3.643cm"/>
    </style:style>
    <style:style style:name="fr1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3cm" draw:visible-area-height="3.472cm"/>
    </style:style>
    <style:style style:name="fr1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3cm" draw:visible-area-height="1.957cm"/>
    </style:style>
    <style:style style:name="fr15"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43cm" draw:visible-area-height="11.472cm"/>
    </style:style>
    <style:style style:name="fr1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0.834cm" draw:visible-area-height="11.472cm"/>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32cm" draw:visible-area-height="10.398cm"/>
    </style:style>
    <style:style style:name="fr1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2cm" draw:visible-area-height="6.225cm"/>
    </style:style>
    <style:style style:name="fr1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549cm" draw:visible-area-height="6.084cm"/>
    </style:style>
    <style:style style:name="fr2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3cm" draw:visible-area-height="1.643cm"/>
    </style:style>
    <style:style style:name="fr2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058cm" draw:visible-area-height="3.969cm"/>
    </style:style>
    <style:style style:name="fr2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229cm" draw:visible-area-height="4.855cm"/>
    </style:style>
    <style:style style:name="fr2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438cm" draw:visible-area-height="1.643cm"/>
    </style:style>
    <style:style style:name="fr2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9.063cm" draw:visible-area-height="6.342cm"/>
    </style:style>
    <style:style style:name="fr25" style:family="graphic" style:parent-style-name="OLE">
      <style:graphic-properties style:vertical-pos="top" style:vertical-rel="paragraph" style:horizontal-pos="center" style:horizontal-rel="paragraph" draw:ole-draw-aspect="5488" draw:visible-area-top="0cm" draw:visible-area-width="10.284cm" draw:visible-area-height="8.138cm"/>
    </style:style>
    <style:style style:name="fr26" style:family="graphic" style:parent-style-name="OLE">
      <style:graphic-properties style:vertical-pos="top" style:vertical-rel="paragraph" style:horizontal-pos="center" style:horizontal-rel="paragraph" draw:ole-draw-aspect="10" draw:visible-area-top="0cm" draw:visible-area-width="10.284cm" draw:visible-area-height="4.623cm"/>
    </style:style>
    <style:style style:name="fr2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2cm" draw:visible-area-height="5.007cm"/>
    </style:style>
    <style:style style:name="fr2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2cm" draw:visible-area-height="5.475cm"/>
    </style:style>
    <style:style style:name="fr2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1cm" draw:visible-area-height="6.124cm"/>
    </style:style>
    <style:style style:name="fr3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1cm" draw:visible-area-height="6.949cm"/>
    </style:style>
    <style:style style:name="fr31" style:family="graphic" style:parent-style-name="OLE">
      <style:graphic-properties style:vertical-pos="from-top" style:vertical-rel="paragraph" style:horizontal-pos="from-left" style:horizontal-rel="paragraph" draw:ole-draw-aspect="38424" draw:visible-area-top="0cm" draw:visible-area-width="10.283cm" draw:visible-area-height="5.937cm"/>
    </style:style>
    <style:style style:name="fr32" style:family="graphic" style:parent-style-name="OLE">
      <style:graphic-properties style:vertical-pos="from-top" style:vertical-rel="paragraph" style:horizontal-pos="from-left" style:horizontal-rel="paragraph" draw:ole-draw-aspect="12808" draw:visible-area-top="0cm" draw:visible-area-width="10.283cm" draw:visible-area-height="5.937cm"/>
    </style:style>
    <style:style style:name="fr33" style:family="graphic" style:parent-style-name="OLE">
      <style:graphic-properties style:vertical-pos="from-top" style:vertical-rel="paragraph" style:horizontal-pos="from-left" style:horizontal-rel="paragraph" draw:ole-draw-aspect="8289" draw:visible-area-top="0cm" draw:visible-area-width="10.283cm" draw:visible-area-height="5.937cm"/>
    </style:style>
    <style:style style:name="fr34" style:family="graphic" style:parent-style-name="OLE">
      <style:graphic-properties style:vertical-pos="from-top" style:vertical-rel="paragraph" style:horizontal-pos="from-left" style:horizontal-rel="paragraph" draw:ole-draw-aspect="716" draw:visible-area-top="0cm" draw:visible-area-width="10.283cm" draw:visible-area-height="4.622cm"/>
    </style:style>
    <style:style style:name="fr35" style:family="graphic" style:parent-style-name="OLE">
      <style:graphic-properties style:vertical-pos="from-top" style:vertical-rel="paragraph" style:horizontal-pos="from-left" style:horizontal-rel="paragraph" draw:ole-draw-aspect="45912" draw:visible-area-top="0cm" draw:visible-area-width="10.283cm" draw:visible-area-height="4.622cm"/>
    </style:style>
    <style:style style:name="fr3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631cm" draw:visible-area-height="11.131cm"/>
    </style:style>
    <style:style style:name="fr3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81cm" draw:visible-area-height="11.131cm"/>
    </style:style>
    <style:style style:name="fr3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81cm" draw:visible-area-height="13.881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313cm" fo:min-width="2.54cm" fo:padding-top="0.141cm" fo:padding-bottom="0.141cm" fo:padding-left="0.141cm" fo:padding-right="0.141cm" draw:shadow="hidden" draw:shadow-offset-x="0.199cm" draw:shadow-offset-y="0.199cm" draw:shadow-color="#808080" style:run-through="foreground"/>
    </style:style>
    <style:style style:name="gr12" style:family="graphic">
      <style:graphic-properties draw:stroke="solid" svg:stroke-width="0.042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46cm" fo:padding-bottom="0.146cm" fo:padding-left="0.272cm" fo:padding-right="0.272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053cm" fo:min-width="2.54cm" fo:padding-top="0.035cm" fo:padding-bottom="0.071cm" fo:padding-left="0.035cm" fo:padding-right="0.035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87cm" fo:min-width="2.54cm" fo:padding-top="0.141cm" fo:padding-bottom="0.141cm" fo:padding-left="0.141cm" fo:padding-right="0.141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244cm" fo:min-width="2.54cm" fo:padding-top="0.141cm" fo:padding-bottom="0.141cm" fo:padding-left="0.141cm" fo:padding-right="0.141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75cm" fo:min-width="2.54cm" fo:padding-top="0.141cm" fo:padding-bottom="0.141cm" fo:padding-left="0.141cm" fo:padding-right="0.141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17cm" fo:min-width="2.54cm" fo:padding-top="0.141cm" fo:padding-bottom="0.141cm" fo:padding-left="0.141cm" fo:padding-right="0.141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89cm" fo:min-width="2.54cm" fo:padding-top="0.141cm" fo:padding-bottom="0.141cm" fo:padding-left="0.141cm" fo:padding-right="0.141cm" draw:shadow="hidden" draw:shadow-offset-x="0.199cm" draw:shadow-offset-y="0.199cm" draw:shadow-color="#808080" style:run-through="foreground"/>
    </style:style>
    <style:style style:name="gr19"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38cm" fo:min-width="2.54cm" fo:padding-top="0.141cm" fo:padding-bottom="0.141cm" fo:padding-left="0.141cm" fo:padding-right="0.141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
      <text:p text:style-name="P203"/>
      <text:p text:style-name="P174"/>
      <text:p text:style-name="P174"/>
      <text:p text:style-name="P174"/>
      <text:p text:style-name="P174"/>
      <text:p text:style-name="P174"/>
      <text:p text:style-name="P175">Lazarus</text:p>
      <text:p text:style-name="P177"/>
      <text:p text:style-name="P177"/>
      <text:p text:style-name="P177"/>
      <text:p text:style-name="P177"/>
      <text:p text:style-name="P176">Configurable Highlighter for SynEdit</text:p>
      <text:p text:style-name="P176">TSynFacilSyn 1.<text:span text:style-name="T160">21</text:span></text:p>
      <text:p text:style-name="P171"/>
      <text:p text:style-name="P171"/>
      <text:p text:style-name="P171"/>
      <text:p text:style-name="P174"/>
      <text:p text:style-name="P174"/>
      <text:p text:style-name="P174"/>
      <text:p text:style-name="P174"/>
      <text:p text:style-name="P12"/>
      <text:p text:style-name="P70"/>
      <text:p text:style-name="P178">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text:span text:style-name="T163">1</text:span>/<text:span text:style-name="T163">10</text:span>/201<text:span text:style-name="T163">8</text:span>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text:span text:style-name="T163">8</text:span></text:p>
            <text:p text:style-name="P19">Examples have been developed on Windows-<text:span text:style-name="T163">64</text:span>.</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 <text:span text:style-name="T163">from Tito Hinostroza</text:span>.</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78"/>
      <text:p text:style-name="P178">NOTES FOR VERSION 1.<text:span text:style-name="T160">21</text:span></text:p>
      <text:p text:style-name="P84"><text:s/></text:p>
      <text:p text:style-name="P84"><text:bookmark text:name="result_box82"/><text:span text:style-name="T144">This version includes access to the position of the token, within the advanced definitions of tokens by content. In addition, </text:span><text:span text:style-name="T149">it has been </text:span><text:span text:style-name="T144">improve</text:span><text:span text:style-name="T149">d</text:span><text:span text:style-name="T144"> the handling of </text:span><text:span text:style-name="T149">the attributes </text:span><text:span text:style-name="T144">in </text:span><text:span text:style-name="T149">this kind </text:span><text:span text:style-name="T144">of tokens. </text:span><text:s/></text:p>
      <text:p text:style-name="P84"/>
      <text:p text:style-name="P84"><text:bookmark text:name="result_box86"/><text:span text:style-name="T144">Compatibility with previous versions is maintained.</text:span> </text:p>
      <text:p text:style-name="P84"/>
      <text:p text:style-name="P84"><text:bookmark text:name="result_box85"/><text:span text:style-name="T144">All other performance characteristics and parameters are maintained.</text:span> </text:p>
      <text:p text:style-name="P84"/>
      <text:p text:style-name="P84"/>
      <text:p text:style-name="P84"/>
      <text:p text:style-name="P75"/>
      <text:p text:style-name="P75"/>
      <text:p text:style-name="P75"/>
      <text:p text:style-name="P75"><text:line-break/></text:p>
      <text:p text:style-name="P178"/>
      <text:list xml:id="list3450043137344652514" text:style-name="WW8Num24">
        <text:list-item>
          <text:h text:style-name="P244" text:outline-level="1"><text:bookmark-start text:name="__RefHeading___Toc404419443"/>Introduction<text:bookmark-end text:name="__RefHeading___Toc404419443"/></text:h>
        </text:list-item>
      </text:list>
      <text:p text:style-name="P15"/>
      <text:p text:style-name="P75">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6"><draw:image xlink:href="Pictures/1000000000000167000000AEA5CA212F039C945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5">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5">The TSynFacilSyn highlighter SynEdit only work with Lazarus component. Implements syntax highlighting and code folding. </text:p>
      <text:list xml:id="list230305560529144" text:continue-numbering="true" text:style-name="WW8Num24">
        <text:list-item>
          <text:list>
            <text:list-item>
              <text:list>
                <text:list-item>
                  <text:h text:style-name="P256" text:outline-level="3"><text:bookmark-start text:name="__RefHeading___Toc404419444"/>Characteristics<text:bookmark-end text:name="__RefHeading___Toc404419444"/></text:h>
                </text:list-item>
              </text:list>
            </text:list-item>
          </text:list>
        </text:list-item>
      </text:list>
      <text:p text:style-name="P75"/>
      <text:list xml:id="list3601353285542638163" text:style-name="WW8Num13">
        <text:list-item>
          <text:p text:style-name="P211">It is configurable. Design a syntax highlighting, using an external XML file or using code instructions.</text:p>
        </text:list-item>
        <text:list-item>
          <text:p text:style-name="P211">It is fast and consumes low memory. It is optimized to be comparable in speed to a non-configurable highlighter.</text:p>
        </text:list-item>
        <text:list-item>
          <text:p text:style-name="P211">Allows you to easily configure most syntax elements such as identifiers, strings, numbers and comments in a way that it adapts to most languages.</text:p>
        </text:list-item>
        <text:list-item>
          <text:p text:style-name="P211">It is oriented towards the management of tokens and attributes. Each token contains a single attribute.</text:p>
        </text:list-item>
        <text:list-item>
          <text:p text:style-name="P211"><text:soft-page-break/>Allows definition of the characters that are valid for identifiers so it can be adapted to the specific definition of each language.</text:p>
        </text:list-item>
        <text:list-item>
          <text:p text:style-name="P211">It can handle subsets of identifiers (reserved words, variables, directives, etc.) and subsets of symbols (operators, separators, etc.).</text:p>
        </text:list-item>
        <text:list-item>
          <text:p text:style-name="P212">Supports multi-line comments and strings.</text:p>
        </text:list-item>
        <text:list-item>
          <text:p text:style-name="P211">Can create new tokens, using identifiers as delimiters (similar to blocks &lt;&lt; Heredoc).</text:p>
        </text:list-item>
        <text:list-item>
          <text:p text:style-name="P211">Includes "CaseSensitive" property.</text:p>
        </text:list-item>
        <text:list-item>
          <text:p text:style-name="P211">Define blocks with or without code folding. Includes several options to suit most programming languages.</text:p>
        </text:list-item>
        <text:list-item>
          <text:p text:style-name="P211">You can color the background of the blocks.</text:p>
        </text:list-item>
        <text:list-item>
          <text:p text:style-name="P211">The XML syntax file allows simplified ways to define tokens.</text:p>
        </text:list-item>
        <text:list-item>
          <text:p text:style-name="P211">Manages several predefined attributes but they can be used more dynamically.</text:p>
        </text:list-item>
      </text:list>
      <text:p text:style-name="P15"/>
      <text:list xml:id="list230304882583746" text:continue-list="list230305560529144" text:style-name="WW8Num24">
        <text:list-item>
          <text:h text:style-name="P244" text:outline-level="1"><text:bookmark-start text:name="__RefHeading___Toc404419445"/>Summary<text:bookmark-end text:name="__RefHeading___Toc404419445"/></text:h>
          <text:list>
            <text:list-item>
              <text:h text:style-name="P246" text:outline-level="2"><text:bookmark-start text:name="__RefHeading___Toc404419446"/>Use within a program.<text:bookmark-end text:name="__RefHeading___Toc404419446"/></text:h>
            </text:list-item>
          </text:list>
        </text:list-item>
      </text:list>
      <text:p text:style-name="P75"/>
      <text:p text:style-name="P75">This highlighter consists of a single sourcefile: "SynFacilHighlighter.pas". You must include this file in the folder where the work project or folder of the project units is.</text:p>
      <text:p text:style-name="P75"/>
      <text:p text:style-name="P75">Once copied, the unit must be included in the USES statement in units which will use the highlighter.</text:p>
      <text:p text:style-name="P75"/>
      <text:p text:style-name="P75">As with any highlighter, we must create an instance of the highlighter (TSynFacilSyn) and assign it to the editor that we will use:</text:p>
      <text:p text:style-name="P75"/>
      <text:p text:style-name="P117"><text:span text:style-name="T11">uses </text:span><text:span text:style-name="T26">..., SynFacilHighlighter</text:span><text:span text:style-name="T79">;</text:span></text:p>
      <text:p text:style-name="P123"/>
      <text:p text:style-name="P127">var</text:p>
      <text:p text:style-name="P117"><text:span text:style-name="T38"><text:s text:c="4"/></text:span><text:span text:style-name="T26">hlt </text:span><text:span text:style-name="T79">:</text:span><text:span text:style-name="T26"> TSynFacilSyn</text:span><text:span text:style-name="T79">;</text:span></text:p>
      <text:p text:style-name="P123"/>
      <text:p text:style-name="P125">...</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highlighter</text:span></text:p>
      <text:p text:style-name="P117"><text:span text:style-name="T38"><text:s text:c="2"/></text:span><text:span text:style-name="T26">editor.Highlighter </text:span><text:span text:style-name="T79">: =</text:span><text:span text:style-name="T26"> hlt</text:span><text:span text:style-name="T79">;</text:span></text:p>
      <text:p text:style-name="P117"><text:span text:style-name="T38"><text:s text:c="2"/></text:span><text:span text:style-name="T26">hlt.LoadFromFile</text:span><text:span text:style-name="T79">(</text:span><text:span text:style-name="T114">'SynPHP.xml'</text:span><text:span text:style-name="T79">);</text:span><text:span text:style-name="T26"> </text:span><text:span text:style-name="T92">//</text:span><text:span text:style-name="T96">Load file syntax</text:span></text:p>
      <text:p text:style-name="P125">...</text:p>
      <text:p text:style-name="P117"><text:span text:style-name="T38"><text:s text:c="2"/></text:span><text:span text:style-name="T26">htl.Free</text:span><text:span text:style-name="T79">;</text:span><text:span text:style-name="T26"> </text:span><text:span text:style-name="T92">//</text:span><text:span text:style-name="T96">Free </text:span></text:p>
      <text:p text:style-name="P123"/>
      <text:p text:style-name="P75"/>
      <text:p text:style-name="P75">To use the highlighter, you must first configure the syntax. This can be done using an external file (syntax) or by code.</text:p>
      <text:p text:style-name="P75"/>
      <text:p text:style-name="P75"/>
      <text:list xml:id="list230304718491013" text:continue-numbering="true" text:style-name="WW8Num24">
        <text:list-item>
          <text:list>
            <text:list-item>
              <text:h text:style-name="P246" text:outline-level="2"><text:bookmark-start text:name="__RefHeading___Toc404419447"/>Configuration using syntax file<text:bookmark-end text:name="__RefHeading___Toc404419447"/></text:h>
            </text:list-item>
          </text:list>
        </text:list-item>
      </text:list>
      <text:p text:style-name="P75"/>
      <text:p text:style-name="P75">For example, if we want a simple syntax of PHP files, we could create an XML file and put this content:</text:p>
      <text:p text:style-name="P75"/>
      <text:p text:style-name="P118"><text:span text:style-name="T79">&lt;</text:span><text:span text:style-name="T11">Language </text:span><text:span text:style-name="T26">name</text:span><text:span text:style-name="T79">=</text:span><text:span text:style-name="T114">"Php"</text:span><text:span text:style-name="T79">&gt;</text:span></text:p>
      <text:p text:style-name="P118"><text:span text:style-name="T38"><text:s text:c="2"/></text:span><text:span text:style-name="T79">&lt;</text:span><text:span text:style-name="T11">String </text:span><text:span text:style-name="T26">Start</text:span><text:span text:style-name="T79">=</text:span><text:span text:style-name="T114">"'" End</text:span><text:span text:style-name="T115">=</text:span><text:span text:style-name="T114">"'"</text:span><text:span text:style-name="T79">&gt; &lt;/</text:span><text:span text:style-name="T11">String</text:span><text:span text:style-name="T79">&gt;</text:span></text:p>
      <text:p text:style-name="P118"><text:span text:style-name="T38"><text:s text:c="2"/></text:span><text:span text:style-name="T79">&lt;</text:span><text:span text:style-name="T11">String </text:span><text:span text:style-name="T26">Start</text:span><text:span text:style-name="T79">=</text:span><text:span text:style-name="T114">"&amp;quot</text:span><text:span text:style-name="T115">;</text:span><text:span text:style-name="T114">"</text:span><text:span text:style-name="T26"> End</text:span><text:span text:style-name="T79">=</text:span><text:span text:style-name="T114">"&amp;quot</text:span><text:span text:style-name="T115">;</text:span><text:span text:style-name="T114">"</text:span><text:span text:style-name="T26"> </text:span><text:span text:style-name="T79">&gt; &lt;/</text:span><text:span text:style-name="T11">String</text:span><text:span text:style-name="T79">&gt;</text:span></text:p>
      <text:p text:style-name="P118"><text:span text:style-name="T38"><text:s text:c="2"/></text:span><text:span text:style-name="T79">&lt;</text:span><text:span text:style-name="T11">Comment </text:span><text:span text:style-name="T26">Start</text:span><text:span text:style-name="T79">=</text:span><text:span text:style-name="T114">"</text:span><text:span text:style-name="T115">//</text:span><text:span text:style-name="T114">"</text:span><text:span text:style-name="T26"> </text:span><text:span text:style-name="T79">&gt; &lt;/</text:span><text:span text:style-name="T11">Comment</text:span><text:span text:style-name="T79">&gt;</text:span></text:p>
      <text:p text:style-name="P118"><text:soft-page-break/><text:span text:style-name="T38"><text:s text:c="2"/></text:span><text:span text:style-name="T79">&lt;</text:span><text:span text:style-name="T11">Comment </text:span><text:span text:style-name="T26">Start</text:span><text:span text:style-name="T79">=</text:span><text:span text:style-name="T114">"</text:span><text:span text:style-name="T115">/*</text:span><text:span text:style-name="T114">"</text:span><text:span text:style-name="T26"> End</text:span><text:span text:style-name="T79">=</text:span><text:span text:style-name="T114">"</text:span><text:span text:style-name="T115">*/</text:span><text:span text:style-name="T114">"</text:span><text:span text:style-name="T26"> </text:span><text:span text:style-name="T79">&gt; &lt;/</text:span><text:span text:style-name="T11">Comment</text:span><text:span text:style-name="T79">&gt;</text:span></text:p>
      <text:p text:style-name="P118"><text:span text:style-name="T38"><text:s text:c="2"/></text:span><text:span text:style-name="T79">&lt;</text:span><text:span text:style-name="T11">Keyword</text:span><text:span text:style-name="T79">&gt;</text:span><text:span text:style-name="T26"> </text:span></text:p>
      <text:p text:style-name="P118"><text:span text:style-name="T26">__file__ __LINE__ array and break case class const continue default do doublé die echo empty endfor endif elseif else endswitch endwhile eval exit extends false float for global function highlight_file highlight_</text:span><text:span text:style-name="T11">string </text:span><text:span text:style-name="T26">int integer if isset include new object list old_function actual print or return show_source require static </text:span><text:span text:style-name="T11">string </text:span><text:span text:style-name="T26">unset var switch while true xor </text:span></text:p>
      <text:p text:style-name="P118"><text:span text:style-name="T38"><text:s text:c="2"/></text:span><text:span text:style-name="T79">&lt;/</text:span><text:span text:style-name="T11">Keyword</text:span><text:span text:style-name="T79">&gt;</text:span></text:p>
      <text:p text:style-name="P118"><text:span text:style-name="T79">&lt;/</text:span><text:span text:style-name="T11">Language</text:span><text:span text:style-name="T79">&gt;</text:span></text:p>
      <text:p text:style-name="P75"/>
      <text:p text:style-name="P75">Then we should use the LoadFromFile() method to set the highlighter to this file. </text:p>
      <text:p text:style-name="P75"/>
      <text:list xml:id="list230304668905077" text:continue-numbering="true" text:style-name="WW8Num24">
        <text:list-item>
          <text:list>
            <text:list-item>
              <text:h text:style-name="P246" text:outline-level="2"><text:bookmark-start text:name="__RefHeading___Toc404419448"/>Configuration using Code<text:bookmark-end text:name="__RefHeading___Toc404419448"/></text:h>
            </text:list-item>
          </text:list>
        </text:list-item>
      </text:list>
      <text:p text:style-name="P75"/>
      <text:p text:style-name="P75">The syntax can also be set using code instead of an external file. This gives us greater flexibility but requires more care. The following code to define the syntax of the XML file shown above:</text:p>
      <text:p text:style-name="P75"/>
      <text:p text:style-name="P117"><text:span text:style-name="T38"><text:s text:c="2"/></text:span><text:span text:style-name="T26">hlt1.ClearMethodTables</text:span><text:span text:style-name="T79">;</text:span></text:p>
      <text:p text:style-name="P117"><text:span text:style-name="T38"><text:s text:c="2"/></text:span><text:span text:style-name="T26">hlt1.ClearSpecials</text:span><text:span text:style-name="T79">;</text:span></text:p>
      <text:p text:style-name="P149"><text:span text:style-name="T38"><text:s text:c="2"/></text:span><text:span text:style-name="T60">hlt1.DefTokIdentif</text:span><text:span text:style-name="T84">(</text:span><text:span text:style-name="T123">'[$A-Za-z_]'</text:span><text:span text:style-name="T84">, </text:span><text:span text:style-name="T123">'[A-Za-z0-9_]*'</text:span><text:span text:style-name="T84">);</text:span></text:p>
      <text:p text:style-name="P114"/>
      <text:p text:style-name="P117"><text:span text:style-name="T38"><text:s text:c="2"/></text:span><text:span text:style-name="T26">hlt1.AddKeyword</text:span><text:span text:style-name="T79">(</text:span><text:span text:style-name="T114">'__</text:span><text:span text:style-name="T115">file</text:span><text:span text:style-name="T114">__ '</text:span><text:span text:style-name="T79">);</text:span></text:p>
      <text:p text:style-name="P117"><text:span text:style-name="T38"><text:s text:c="2"/></text:span><text:span text:style-name="T26">hlt1.AddKeyword</text:span><text:span text:style-name="T79">(</text:span><text:span text:style-name="T114">'__LINE__'</text:span><text:span text:style-name="T79">);</text:span></text:p>
      <text:p text:style-name="P117"><text:span text:style-name="T38"><text:s text:c="2"/></text:span><text:span text:style-name="T26">hlt1.AddKeyword</text:span><text:span text:style-name="T79">(</text:span><text:span text:style-name="T114">'array'</text:span><text:span text:style-name="T79">);</text:span></text:p>
      <text:p text:style-name="P117"><text:span text:style-name="T38"><text:s text:c="2"/></text:span><text:span text:style-name="T26">hlt1.AddKeyword</text:span><text:span text:style-name="T79">(</text:span><text:span text:style-name="T114">'and'</text:span><text:span text:style-name="T79">);</text:span></text:p>
      <text:p text:style-name="P125">...</text:p>
      <text:p text:style-name="P117"><text:span text:style-name="T38"><text:s text:c="2"/></text:span><text:span text:style-name="T26">hlt1.AddKeyword</text:span><text:span text:style-name="T79">(</text:span><text:span text:style-name="T114">'while'</text:span><text:span text:style-name="T79">);</text:span></text:p>
      <text:p text:style-name="P117"><text:span text:style-name="T38"><text:s text:c="2"/></text:span><text:span text:style-name="T26">hlt1.AddKeyword</text:span><text:span text:style-name="T79">(</text:span><text:span text:style-name="T114">'xor'</text:span><text:span text:style-name="T79">);</text:span></text:p>
      <text:p text:style-name="P123"/>
      <text:p text:style-name="P149"><text:span text:style-name="T48"><text:s text:c="2"/></text:span><text:span text:style-name="T63">hlt1.DefTokDelim</text:span><text:span text:style-name="T85">(</text:span><text:span text:style-name="T122">''''</text:span><text:span text:style-name="T59">,</text:span><text:span text:style-name="T122">''''</text:span><text:span text:style-name="T59">, </text:span><text:span text:style-name="T63">hl.t</text:span><text:span text:style-name="T64">n</text:span><text:span text:style-name="T63">String</text:span><text:span text:style-name="T85">);</text:span></text:p>
      <text:p text:style-name="P151"><text:span text:style-name="T43"><text:s text:c="2"/></text:span><text:span text:style-name="T56">hlt1.DefTokDelim</text:span><text:span text:style-name="T83">(</text:span><text:span text:style-name="T118">'"'</text:span><text:span text:style-name="T56">,</text:span><text:span text:style-name="T118">'"'</text:span><text:span text:style-name="T56">, hl.t</text:span><text:span text:style-name="T68">n</text:span><text:span text:style-name="T56">String</text:span><text:span text:style-name="T83">);</text:span></text:p>
      <text:p text:style-name="P151"><text:span text:style-name="T43"><text:s text:c="2"/></text:span><text:span text:style-name="T56">hlt1.DefTokDelim</text:span><text:span text:style-name="T83">(</text:span><text:span text:style-name="T118">'//'</text:span><text:span text:style-name="T109">,</text:span><text:span text:style-name="T118">''</text:span><text:span text:style-name="T109">, </text:span><text:span text:style-name="T56">hl</text:span><text:span text:style-name="T109">.</text:span><text:span text:style-name="T56">t</text:span><text:span text:style-name="T68">n</text:span><text:span text:style-name="T56">Comment</text:span><text:span text:style-name="T83">)</text:span><text:span text:style-name="T110">;</text:span></text:p>
      <text:p text:style-name="P151"><text:span text:style-name="T43"><text:s text:c="2"/></text:span><text:span text:style-name="T56">hlt1.DefTokDelim</text:span><text:span text:style-name="T83">(</text:span><text:span text:style-name="T118">'</text:span><text:span text:style-name="T119">/\*</text:span><text:span text:style-name="T118">'</text:span><text:span text:style-name="T56">,</text:span><text:span text:style-name="T113"> </text:span><text:span text:style-name="T118">'\</text:span><text:span text:style-name="T119">*/</text:span><text:span text:style-name="T118">'</text:span><text:span text:style-name="T56">, hl.t</text:span><text:span text:style-name="T68">n</text:span><text:span text:style-name="T56">Comment, tdMulLin, </text:span><text:span text:style-name="T16">true</text:span><text:span text:style-name="T83">);</text:span></text:p>
      <text:p text:style-name="P117"><text:span text:style-name="T38"><text:s text:c="2"/></text:span><text:span text:style-name="T26">hlt1.Rebuild</text:span><text:span text:style-name="T79">;</text:span></text:p>
      <text:p text:style-name="P75"/>
      <text:list xml:id="list230305499795903" text:continue-numbering="true" text:style-name="WW8Num24">
        <text:list-item>
          <text:list>
            <text:list-item>
              <text:h text:style-name="P246" text:outline-level="2"><text:bookmark-start text:name="__RefHeading___Toc404419449"/>Changing attributes<text:bookmark-end text:name="__RefHeading___Toc404419449"/></text:h>
            </text:list-item>
          </text:list>
        </text:list-item>
      </text:list>
      <text:p text:style-name="P75"/>
      <text:p text:style-name="P75">The attributes can be changed in the XML file or using code.</text:p>
      <text:p text:style-name="P75"/>
      <text:p text:style-name="P75">The following XML file shows how the properties of the attributes are defined:</text:p>
      <text:p text:style-name="P75"><text:soft-page-break/></text:p>
      <text:p text:style-name="P118"><text:span text:style-name="T79">&lt;</text:span><text:span text:style-name="T11">Language </text:span><text:span text:style-name="T26">name</text:span><text:span text:style-name="T79">=</text:span><text:span text:style-name="T114">"Oracle SQL"</text:span><text:span text:style-name="T26"> ext</text:span><text:span text:style-name="T79">=</text:span><text:span text:style-name="T114">"Psql"</text:span><text:span text:style-name="T26"> ColorBlock</text:span><text:span text:style-name="T79">=</text:span><text:span text:style-name="T114">"</text:span><text:span text:style-name="T115">Block</text:span><text:span text:style-name="T114">"</text:span><text:span text:style-name="T79">&gt;</text:span></text:p>
      <text:p text:style-name="P118"><text:span text:style-name="T38"><text:s text:c="2"/></text:span><text:span text:style-name="T79">&lt;</text:span><text:span text:style-name="T26">Attribute Name</text:span><text:span text:style-name="T79">=</text:span><text:span text:style-name="T114">"</text:span><text:span text:style-name="T115">Keyword</text:span><text:span text:style-name="T114">"</text:span><text:span text:style-name="T26"> ForeCol</text:span><text:span text:style-name="T79">=</text:span><text:span text:style-name="T114">"#40A040"</text:span><text:span text:style-name="T26"> Bold</text:span><text:span text:style-name="T79">=</text:span><text:span text:style-name="T114">"False" </text:span><text:span text:style-name="T26">Backcol</text:span><text:span text:style-name="T79">=</text:span><text:span text:style-name="T114">"#404040"</text:span><text:span text:style-name="T79">&gt;</text:span></text:p>
      <text:p text:style-name="P118"><text:span text:style-name="T38"><text:s text:c="2"/></text:span><text:span text:style-name="T79">&lt;/</text:span><text:span text:style-name="T26">Attribute</text:span><text:span text:style-name="T79">&gt;</text:span></text:p>
      <text:p text:style-name="P118"><text:span text:style-name="T38"><text:s text:c="2"/></text:span><text:span text:style-name="T79">&lt;</text:span><text:span text:style-name="T26">Attribute Name</text:span><text:span text:style-name="T79">=</text:span><text:span text:style-name="T114">"Number"</text:span><text:span text:style-name="T26"> FrameCol</text:span><text:span text:style-name="T79">=</text:span><text:span text:style-name="T114">"#4040A0"</text:span><text:span text:style-name="T26"> Italic</text:span><text:span text:style-name="T79">=</text:span><text:span text:style-name="T114">"True"</text:span><text:span text:style-name="T26"> Strikeout</text:span><text:span text:style-name="T79">=</text:span><text:span text:style-name="T114">"True"</text:span><text:span text:style-name="T79">&gt;</text:span></text:p>
      <text:p text:style-name="P118"><text:span text:style-name="T38"><text:s text:c="2"/></text:span><text:span text:style-name="T79">&lt;/</text:span><text:span text:style-name="T26">Attribute</text:span><text:span text:style-name="T79">&gt;</text:span></text:p>
      <text:p text:style-name="P124"/>
      <text:p text:style-name="P126">...</text:p>
      <text:p text:style-name="P115"/>
      <text:p text:style-name="P118"><text:span text:style-name="T79">&lt;/</text:span><text:span text:style-name="T11">Language</text:span><text:span text:style-name="T79">&gt;</text:span></text:p>
      <text:p text:style-name="P75"/>
      <text:p text:style-name="P91"><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5"/>
      <text:p text:style-name="P75">To change the attributes in code should access the properties of attributes:</text:p>
      <text:p text:style-name="P75"/>
      <text:p text:style-name="P117"><text:span text:style-name="T38"><text:s text:c="2"/></text:span><text:span text:style-name="T92">//</text:span><text:span text:style-name="T96">Load syntax</text:span></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p>
      <text:p text:style-name="P117"><text:span text:style-name="T38"><text:s text:c="2"/></text:span><text:span text:style-name="T26">hlt.LoadFromFile</text:span><text:span text:style-name="T79">(</text:span><text:span text:style-name="T114">'SynPHP.xml'</text:span><text:span text:style-name="T79">);</text:span><text:span text:style-name="T26"> </text:span></text:p>
      <text:p text:style-name="P117"><text:span text:style-name="T38"><text:s text:c="2"/></text:span><text:span text:style-name="T92">//</text:span><text:span text:style-name="T96">change the text color Keywords</text:span></text:p>
      <text:p text:style-name="P117"><text:span text:style-name="T38"><text:s text:c="2"/></text:span><text:span text:style-name="T26">hlt.tkKeyword.Foreground </text:span><text:span text:style-name="T79">: =</text:span><text:span text:style-name="T26">clGray</text:span><text:span text:style-name="T79">;</text:span><text:span text:style-name="T26"> </text:span></text:p>
      <text:p text:style-name="P117"><text:span text:style-name="T38"><text:s text:c="2"/></text:span><text:span text:style-name="T92">//</text:span><text:span text:style-name="T96">change the background color of the chains</text:span></text:p>
      <text:p text:style-name="P117"><text:span text:style-name="T38"><text:s text:c="2"/></text:span><text:span text:style-name="T26">hlt.tkString.Background </text:span><text:span text:style-name="T79">: =</text:span><text:span text:style-name="T26">clyellow</text:span><text:span text:style-name="T79">;</text:span><text:span text:style-name="T26"> </text:span></text:p>
      <text:p text:style-name="P117"><text:span text:style-name="T38"><text:s text:c="2"/></text:span><text:span text:style-name="T92">//</text:span><text:span text:style-name="T96">change the text color of comments</text:span></text:p>
      <text:p text:style-name="P117"><text:span text:style-name="T38"><text:s text:c="2"/></text:span><text:span text:style-name="T26">hlt.tkComment.Foreground </text:span><text:span text:style-name="T79">: =</text:span><text:span text:style-name="T26">clRed</text:span><text:span text:style-name="T79">;</text:span></text:p>
      <text:p text:style-name="P75"/>
      <text:p text:style-name="P75">There are several predefined attributes highlighter, but it's only needed to set what we are going to use. </text:p>
      <text:p text:style-name="P75"/>
      <text:p text:style-name="P75">Some attributes have default properties set, as keywords and comments.</text:p>
      <text:list xml:id="list230305735355808" text:continue-numbering="true" text:style-name="WW8Num24">
        <text:list-item>
          <text:list>
            <text:list-item>
              <text:h text:style-name="P250" text:outline-level="2"><text:bookmark-start text:name="__RefHeading___Toc404419450"/>Code folding<text:bookmark-end text:name="__RefHeading___Toc404419450"/></text:h>
            </text:list-item>
          </text:list>
        </text:list-item>
      </text:list>
      <text:p text:style-name="P75"/>
      <text:p text:style-name="P75">The highlighter TSynFacilSyn has built in configurable support for code folding:</text:p>
      <text:p text:style-name="P75"/>
      <text:p text:style-name="P92"><draw:frame draw:style-name="fr4" draw:name="Image2" text:anchor-type="as-char" svg:width="8.387cm" svg:height="4.921cm" draw:z-index="0"><draw:image xlink:href="Pictures/100000000000013D000000BA6AACCF32B3559A8D.png" xlink:type="simple" xlink:show="embed" xlink:actuate="onLoad"/></draw:frame></text:p>
      <text:p text:style-name="P75"/>
      <text:p text:style-name="P75">Code folding can be enabled for multi-line tokens or for blocks containing several tokens.</text:p>
      <text:p text:style-name="P75"/>
      <text:p text:style-name="P75">Folding strings like in the example are defined in XML as follows:</text:p>
      <text:p text:style-name="P75"/>
      <text:p text:style-name="P118"><text:span text:style-name="T38"><text:s text:c="2"/></text:span><text:span text:style-name="T79">&lt;</text:span><text:span text:style-name="T11">Start String</text:span><text:span text:style-name="T79">=</text:span><text:span text:style-name="T114">"&amp;quot</text:span><text:span text:style-name="T115">;</text:span><text:span text:style-name="T114">"</text:span><text:span text:style-name="T26"> </text:span><text:span text:style-name="T11">End</text:span><text:span text:style-name="T79">=</text:span><text:span text:style-name="T114">"&amp;quot</text:span><text:span text:style-name="T115">;</text:span><text:span text:style-name="T114">"</text:span><text:span text:style-name="T26"> Folding</text:span><text:span text:style-name="T79">=</text:span><text:span text:style-name="T114">"True"</text:span><text:span text:style-name="T79">&gt;&lt;/</text:span><text:span text:style-name="T11">String</text:span><text:span text:style-name="T79">&gt;</text:span></text:p>
      <text:p text:style-name="P75"/>
      <text:p text:style-name="P75">To define folding blocks delimited by tokens, you can use the following definition:</text:p>
      <text:p text:style-name="P75"/>
      <text:p text:style-name="P118"><text:span text:style-name="T38"><text:s text:c="2"/></text:span><text:span text:style-name="T79">&lt;</text:span><text:span text:style-name="T11">Start Block</text:span><text:span text:style-name="T79">=</text:span><text:span text:style-name="T114">"BEGIN"</text:span><text:span text:style-name="T26"> </text:span><text:span text:style-name="T11">End</text:span><text:span text:style-name="T79">=</text:span><text:span text:style-name="T114">"</text:span><text:span text:style-name="T115">END</text:span><text:span text:style-name="T114">"</text:span><text:span text:style-name="T26"> Folding</text:span><text:span text:style-name="T79">=</text:span><text:span text:style-name="T114">"True"</text:span><text:span text:style-name="T79">&gt;&lt;/</text:span><text:span text:style-name="T11">Block</text:span><text:span text:style-name="T79">&gt;</text:span></text:p>
      <text:p text:style-name="P75"/>
      <text:p text:style-name="P75">The folding can be configured both, by syntax file and by code. Later it's indicated how to enable the folding.</text:p>
      <text:p text:style-name="P75"/>
      <text:p text:style-name="P75"/>
      <text:list xml:id="list230304640085554" text:continue-numbering="true" text:style-name="WW8Num24">
        <text:list-item>
          <text:h text:style-name="P244" text:outline-level="1"><text:bookmark-start text:name="__RefHeading___Toc404419451"/>Understanding the syntax<text:bookmark-end text:name="__RefHeading___Toc404419451"/></text:h>
        </text:list-item>
      </text:list>
      <text:p text:style-name="P174"/>
      <text:list xml:id="list230305833090811" text:continue-numbering="true" text:style-name="WW8Num24">
        <text:list-item>
          <text:list>
            <text:list-item>
              <text:h text:style-name="P246"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75"/>
      <text:p text:style-name="P75">Syntax may be specified for different levels. We know that a low level, the languages are just a set of character, or even on a lower level languages, they are single set of bytes (or bits).</text:p>
      <text:p text:style-name="P75"/>
      <text:p text:style-name="P75">Consider a simple sequence of a programming language:</text:p>
      <text:p text:style-name="P75"/>
      <text:p text:style-name="P37"><text:bookmark text:name="_1441102226"/><text:bookmark text:name="_1441102987"/><text:bookmark text:name="_1441103226"/><draw:frame draw:style-name="fr8"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5"/>
      <text:p text:style-name="P75">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80"><text:s/></text:p>
      <text:p text:style-name="P75">The TSynFacilSyn highlighter processes the characters as if they were single bytes. Accented characters are processed as two characters (because actually stored as two bytes in UTF-8).</text:p>
      <text:p text:style-name="P75">You need to know two key concepts to understand the functioning of highlighter TSynFacilSyn:</text:p>
      <text:p text:style-name="P81"><draw:custom-shape text:anchor-type="char" draw:z-index="18" draw:style-name="gr1" draw:text-style-name="P265" svg:width="14.923cm" svg:height="2.033cm" svg:x="0.704cm" svg:y="0.462cm"><text:p text:style-name="P264"><text:span text:style-name="T164">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5"/>
      <text:p text:style-name="P75"/>
      <text:p text:style-name="P75"/>
      <text:p text:style-name="P75"/>
      <text:p text:style-name="P75"><draw:custom-shape text:anchor-type="char" draw:z-index="19" draw:style-name="gr1" draw:text-style-name="P265" svg:width="14.923cm" svg:height="2.687cm" svg:x="0.704cm" svg:y="0.118cm"><text:p text:style-name="P264"><text:span text:style-name="T164">Attributes are properties of </text:span><text:span text:style-name="T165">highlighter </text:span><text:span text:style-name="T164">that can be applied to a particular </text:span><text:span text:style-name="T165"><text:s/></text:span><text:span text:style-name="T164">token. In SynEdit, an attribute is represented by an instance of the "TSynHighlighterAttributes" class and is used to define properties such as text color, background color, font, or font style.</text:span></text:p><text:p text:style-name="P266"><text:span text:style-name="T1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75"/>
      <text:p text:style-name="P75"/>
      <text:p text:style-name="P75"/>
      <text:p text:style-name="P167"/>
      <text:p text:style-name="P167"><text:soft-page-break/></text:p>
      <text:p text:style-name="P167"><text:tab/>Strings and comments are always treated as a single token and have a unique attribute. </text:p>
      <text:p text:style-name="P167"/>
      <text:p text:style-name="P81"><draw:frame draw:style-name="fr3" draw:name="Image3" text:anchor-type="char" svg:x="4.166cm" svg:y="0.078cm" svg:width="9.497cm" svg:height="4.602cm" draw:z-index="20"><draw:image xlink:href="Pictures/1000000000000167000000AEA5CA212F039C945B.png" xlink:type="simple" xlink:show="embed" xlink:actuate="onLoad"/></draw:frame></text:p>
      <text:p text:style-name="P75"/>
      <text:p text:style-name="P81"><draw:connector text:anchor-type="char" draw:z-index="22" draw:style-name="gr2" draw:text-style-name="P267" draw:type="line" svg:x1="2.662cm" svg:y1="2.33cm" svg:x2="7.481cm" svg:y2="0.025cm" svg:d="M2662 2330l4819-2305" svg:viewBox="0 0 4821 2307"><text:p/></draw:connector></text:p>
      <text:p text:style-name="P81"><draw:connector text:anchor-type="char" draw:z-index="25" draw:style-name="gr2" draw:text-style-name="P267" draw:type="line" svg:x1="2.662cm" svg:y1="1.734cm" svg:x2="7.848cm" svg:y2="0.33cm" svg:d="M2662 1734l5186-1404" svg:viewBox="0 0 5188 1406"><text:p/></draw:connector></text:p>
      <text:p text:style-name="P81"><draw:frame draw:style-name="fr1" draw:name="Frame1" text:anchor-type="char" svg:x="0.594cm" svg:y="0.132cm" svg:width="2.542cm" svg:height="1.808cm" draw:z-index="21"><draw:text-box><text:p text:style-name="P2">Tokens of type "string"</text:p></draw:text-box></draw:frame></text:p>
      <text:p text:style-name="P75"/>
      <text:p text:style-name="P75"/>
      <text:p text:style-name="P75"/>
      <text:p text:style-name="P75"/>
      <text:list xml:id="list230304819217698" text:continue-numbering="true" text:style-name="WW8Num24">
        <text:list-item>
          <text:list>
            <text:list-item>
              <text:list>
                <text:list-item>
                  <text:list>
                    <text:list-item>
                      <text:list>
                        <text:list-item>
                          <text:list>
                            <text:list-header>
                              <text:p text:style-name="P213"><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128"><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5"/>
      <text:p text:style-name="P74"><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128"><text:s/></text:span>Other highlighters in Lazarus can handle other types of tokens.</text:p></text:note-body></text:note></text:span></text:span><text:span text:style-name="T6">. New types can be created dynamically, but there are 8 pre-defined types:</text:span></text:p>
      <text:p text:style-name="P75"/>
      <text:list xml:id="list6084685674568831267" text:style-name="WW8Num25">
        <text:list-item>
          <text:p text:style-name="P214">End of line</text:p>
        </text:list-item>
        <text:list-item>
          <text:p text:style-name="P214">Symbols</text:p>
        </text:list-item>
        <text:list-item>
          <text:p text:style-name="P214"><text:span text:style-name="T157">S</text:span>pace<text:span text:style-name="T157">s</text:span></text:p>
        </text:list-item>
        <text:list-item>
          <text:p text:style-name="P214">Identifiers</text:p>
        </text:list-item>
        <text:list-item>
          <text:p text:style-name="P214">Numbers</text:p>
        </text:list-item>
        <text:list-item>
          <text:p text:style-name="P214">Keywords</text:p>
        </text:list-item>
        <text:list-item>
          <text:p text:style-name="P214">Strings</text:p>
        </text:list-item>
        <text:list-item>
          <text:p text:style-name="P214">Comments</text:p>
        </text:list-item>
      </text:list>
      <text:p text:style-name="P75"/>
      <text:p text:style-name="P75">These types of tokens exist for every highlighter and meet the basic needs of simple highlighters.</text:p>
      <text:p text:style-name="P75"/>
      <text:p text:style-name="P75">The other types of tokens like variables, constants, functions, procedures, types, etc. must be created before use within the highlighter. Section 4 and 5 discusses how you can create additional types of tokens.</text:p>
      <text:p text:style-name="P75"/>
      <text:p text:style-name="P75"><text:soft-page-break/>When the highlighter is linked to the text editor, all tokens are associated to any of the existing types:</text:p>
      <text:p text:style-name="P75"/>
      <text:p text:style-name="P91"><draw:g text:anchor-type="paragraph" draw:z-index="59" draw:name="Forma3" draw:style-name="gr7"><draw:g draw:style-name="gr8"><draw:g draw:style-name="gr8"><draw:polygon draw:style-name="gr9" draw:text-style-name="P273" svg:width="6.748cm" svg:height="2.5cm" svg:x="1.249cm" svg:y="4.82cm" svg:viewBox="0 0 6749 2501" draw:points="0,2501 6749,2501 6749,0 0,0"><text:p/></draw:polygon><draw:polygon draw:style-name="gr10" draw:text-style-name="P274" svg:width="6.748cm" svg:height="2.5cm" svg:x="1.249cm" svg:y="4.82cm" svg:viewBox="0 0 6749 2501" draw:points="0,2501 6749,2501 6749,0 0,0"><text:p/></draw:polygon></draw:g><draw:frame draw:style-name="gr17" draw:text-style-name="P280" svg:width="6.749cm" svg:height="2.5cm" svg:x="1.249cm" svg:y="4.821cm"><draw:text-box><text:p text:style-name="P279"><text:span text:style-name="T171"/></text:p><text:p text:style-name="P279"><text:span text:style-name="T171"><text:s text:c="2"/></text:span><text:span text:style-name="T171">cad = "hello world"</text:span></text:p><text:p text:style-name="P279"><text:span text:style-name="T171">//comment</text:span></text:p></draw:text-box></draw:frame></draw:g><draw:g draw:style-name="gr8"><draw:g draw:style-name="gr8"><draw:polygon draw:style-name="gr9" draw:text-style-name="P273" svg:width="4cm" svg:height="0.75cm" svg:x="9.749cm" svg:y="0.07cm" svg:viewBox="0 0 4001 751" draw:points="0,751 4001,751 4001,0 0,0"><text:p/></draw:polygon><draw:polygon draw:style-name="gr10" draw:text-style-name="P274" svg:width="4cm" svg:height="0.75cm" svg:x="9.749cm" svg:y="0.07cm" svg:viewBox="0 0 4001 751" draw:points="0,751 4001,751 4001,0 0,0"><text:p/></draw:polygon></draw:g><draw:frame draw:style-name="gr18" draw:text-style-name="P278" svg:width="4.001cm" svg:height="0.772cm" svg:x="9.749cm" svg:y="0.06cm"><draw:text-box><text:p text:style-name="P277"><text:span text:style-name="T172">tnEol</text:span></text:p></draw:text-box></draw:frame></draw:g><draw:g draw:style-name="gr8"><draw:g draw:style-name="gr8"><draw:polygon draw:style-name="gr9" draw:text-style-name="P273" svg:width="4cm" svg:height="0.75cm" svg:x="9.749cm" svg:y="3.82cm" svg:viewBox="0 0 4001 751" draw:points="0,751 4001,751 4001,0 0,0"><text:p/></draw:polygon><draw:polygon draw:style-name="gr10" draw:text-style-name="P274" svg:width="4cm" svg:height="0.75cm" svg:x="9.749cm" svg:y="3.82cm" svg:viewBox="0 0 4001 751" draw:points="0,751 4001,751 4001,0 0,0"><text:p/></draw:polygon></draw:g><draw:frame draw:style-name="gr18" draw:text-style-name="P278" svg:width="4.001cm" svg:height="0.772cm" svg:x="9.749cm" svg:y="3.81cm"><draw:text-box><text:p text:style-name="P277"><text:span text:style-name="T172">tnSymbol</text:span></text:p></draw:text-box></draw:frame></draw:g><draw:g draw:style-name="gr8"><draw:g draw:style-name="gr8"><draw:polygon draw:style-name="gr9" draw:text-style-name="P273" svg:width="4cm" svg:height="0.75cm" svg:x="9.749cm" svg:y="2.57cm" svg:viewBox="0 0 4001 751" draw:points="0,751 4001,751 4001,0 0,0"><text:p/></draw:polygon><draw:polygon draw:style-name="gr10" draw:text-style-name="P274" svg:width="4cm" svg:height="0.75cm" svg:x="9.749cm" svg:y="2.57cm" svg:viewBox="0 0 4001 751" draw:points="0,751 4001,751 4001,0 0,0"><text:p/></draw:polygon></draw:g><draw:frame draw:style-name="gr18" draw:text-style-name="P278" svg:width="4.001cm" svg:height="0.772cm" svg:x="9.749cm" svg:y="2.561cm"><draw:text-box><text:p text:style-name="P277"><text:span text:style-name="T172">tnIdentif</text:span></text:p></draw:text-box></draw:frame></draw:g><draw:g draw:style-name="gr8"><draw:g draw:style-name="gr8"><draw:polygon draw:style-name="gr9" draw:text-style-name="P273" svg:width="4cm" svg:height="0.75cm" svg:x="9.749cm" svg:y="5.071cm" svg:viewBox="0 0 4001 751" draw:points="0,751 4001,751 4001,0 0,0"><text:p/></draw:polygon><draw:polygon draw:style-name="gr10" draw:text-style-name="P274" svg:width="4cm" svg:height="0.75cm" svg:x="9.749cm" svg:y="5.071cm" svg:viewBox="0 0 4001 751" draw:points="0,751 4001,751 4001,0 0,0"><text:p/></draw:polygon></draw:g><draw:frame draw:style-name="gr18" draw:text-style-name="P278" svg:width="4.001cm" svg:height="0.772cm" svg:x="9.749cm" svg:y="5.061cm"><draw:text-box><text:p text:style-name="P277"><text:span text:style-name="T172">tnNumber</text:span></text:p></draw:text-box></draw:frame></draw:g><draw:g draw:style-name="gr8"><draw:g draw:style-name="gr8"><draw:polygon draw:style-name="gr9" draw:text-style-name="P273" svg:width="4cm" svg:height="0.75cm" svg:x="9.749cm" svg:y="6.32cm" svg:viewBox="0 0 4001 751" draw:points="0,751 4001,751 4001,0 0,0"><text:p/></draw:polygon><draw:polygon draw:style-name="gr10" draw:text-style-name="P274" svg:width="4cm" svg:height="0.75cm" svg:x="9.749cm" svg:y="6.32cm" svg:viewBox="0 0 4001 751" draw:points="0,751 4001,751 4001,0 0,0"><text:p/></draw:polygon></draw:g><draw:frame draw:style-name="gr18" draw:text-style-name="P278" svg:width="4.001cm" svg:height="0.772cm" svg:x="9.749cm" svg:y="6.311cm"><draw:text-box><text:p text:style-name="P277"><text:span text:style-name="T172">tnKeyword</text:span></text:p></draw:text-box></draw:frame></draw:g><draw:g draw:style-name="gr8"><draw:g draw:style-name="gr8"><draw:polygon draw:style-name="gr9" draw:text-style-name="P273" svg:width="4cm" svg:height="0.75cm" svg:x="9.749cm" svg:y="7.57cm" svg:viewBox="0 0 4001 751" draw:points="0,751 4001,751 4001,0 0,0"><text:p/></draw:polygon><draw:polygon draw:style-name="gr10" draw:text-style-name="P274" svg:width="4cm" svg:height="0.75cm" svg:x="9.749cm" svg:y="7.57cm" svg:viewBox="0 0 4001 751" draw:points="0,751 4001,751 4001,0 0,0"><text:p/></draw:polygon></draw:g><draw:frame draw:style-name="gr18" draw:text-style-name="P278" svg:width="4.001cm" svg:height="0.772cm" svg:x="9.749cm" svg:y="7.56cm"><draw:text-box><text:p text:style-name="P277"><text:span text:style-name="T172">tnString</text:span></text:p></draw:text-box></draw:frame></draw:g><draw:g draw:style-name="gr8"><draw:g draw:style-name="gr8"><draw:polygon draw:style-name="gr9" draw:text-style-name="P273" svg:width="4cm" svg:height="0.75cm" svg:x="9.749cm" svg:y="8.821cm" svg:viewBox="0 0 4001 751" draw:points="0,751 4001,751 4001,0 0,0"><text:p/></draw:polygon><draw:polygon draw:style-name="gr10" draw:text-style-name="P274" svg:width="4cm" svg:height="0.75cm" svg:x="9.749cm" svg:y="8.821cm" svg:viewBox="0 0 4001 751" draw:points="0,751 4001,751 4001,0 0,0"><text:p/></draw:polygon></draw:g><draw:frame draw:style-name="gr18" draw:text-style-name="P278" svg:width="4.001cm" svg:height="0.772cm" svg:x="9.749cm" svg:y="8.811cm"><draw:text-box><text:p text:style-name="P277"><text:span text:style-name="T172">tnComment</text:span></text:p></draw:text-box></draw:frame></draw:g><draw:line draw:style-name="gr19" draw:text-style-name="P274" svg:x1="4.198cm" svg:y1="6.664cm" svg:x2="9.5cm" svg:y2="9.171cm"><text:p/></draw:line><draw:line draw:style-name="gr19" draw:text-style-name="P274" svg:x1="6.298cm" svg:y1="6.364cm" svg:x2="9.5cm" svg:y2="7.971cm"><text:p/></draw:line><draw:line draw:style-name="gr19" draw:text-style-name="P274" svg:x1="3.399cm" svg:y1="5.922cm" svg:x2="9.65cm" svg:y2="4.071cm"><text:p/></draw:line><draw:line draw:style-name="gr19" draw:text-style-name="P274" svg:x1="2.599cm" svg:y1="5.821cm" svg:x2="9.5cm" svg:y2="2.92cm"><text:p/></draw:line><draw:g draw:style-name="gr8"><draw:g draw:style-name="gr8"><draw:polygon draw:style-name="gr9" draw:text-style-name="P273" svg:width="4cm" svg:height="0.75cm" svg:x="9.749cm" svg:y="1.321cm" svg:viewBox="0 0 4001 751" draw:points="0,751 4001,751 4001,0 0,0"><text:p/></draw:polygon><draw:polygon draw:style-name="gr10" draw:text-style-name="P274" svg:width="4cm" svg:height="0.75cm" svg:x="9.749cm" svg:y="1.321cm" svg:viewBox="0 0 4001 751" draw:points="0,751 4001,751 4001,0 0,0"><text:p/></draw:polygon></draw:g><draw:frame draw:style-name="gr18" draw:text-style-name="P278" svg:width="4.001cm" svg:height="0.772cm" svg:x="9.749cm" svg:y="1.311cm"><draw:text-box><text:p text:style-name="P277"><text:span text:style-name="T172">tnSpace</text:span></text:p></draw:text-box></draw:frame></draw:g><draw:line draw:style-name="gr19" draw:text-style-name="P274" svg:x1="1.649cm" svg:y1="5.923cm" svg:x2="9.5cm" svg:y2="1.672cm"><text:p/></draw:line><draw:frame draw:style-name="gr18" draw:text-style-name="P278" svg:width="5.363cm" svg:height="0.772cm" svg:x="9cm" svg:y="-0.917cm"><draw:text-box><text:p text:style-name="P277"><text:span text:style-name="T173">TOKEN TYPE</text:span></text:p></draw:text-box></draw:frame></draw:g></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75"/>
      <text:p text:style-name="P75">A token can only belong to one type of token.</text:p>
      <text:p text:style-name="P75"/>
      <text:p text:style-name="P75">The different token types are <text:span text:style-name="T150">identified by an ID in the highlighter</text:span>:</text:p>
      <text:p text:style-name="P75"/>
      <text:p text:style-name="P153"><text:span text:style-name="T24"><text:s text:c="3"/></text:span><text:span text:style-name="T56">tnEol <text:s text:c="4"/></text:span><text:span text:style-name="T83">:</text:span><text:span text:style-name="T24"> </text:span><text:span text:style-name="T56">integer</text:span><text:span text:style-name="T83">; <text:s/></text:span><text:span text:style-name="T101">//</text:span><text:span text:style-name="T103">id for tokens newline</text:span></text:p>
      <text:p text:style-name="P153"><text:span text:style-name="T24"><text:s text:c="3"/></text:span><text:span text:style-name="T56">tnSymbol <text:s/></text:span><text:span text:style-name="T83">:</text:span><text:span text:style-name="T24"> </text:span><text:span text:style-name="T56">integer</text:span><text:span text:style-name="T83">; <text:s/></text:span><text:span text:style-name="T101">//</text:span><text:span text:style-name="T103">id for symbols</text:span></text:p>
      <text:p text:style-name="P153"><text:span text:style-name="T24"><text:s text:c="3"/></text:span><text:span text:style-name="T56">tnSpace <text:s text:c="2"/></text:span><text:span text:style-name="T83">:</text:span><text:span text:style-name="T24"> </text:span><text:span text:style-name="T56">integer</text:span><text:span text:style-name="T83">; <text:s/></text:span><text:span text:style-name="T101">//</text:span><text:span text:style-name="T103">id for spaces</text:span></text:p>
      <text:p text:style-name="P153"><text:span text:style-name="T24"><text:s text:c="3"/></text:span><text:span text:style-name="T56">tnIdentif </text:span><text:span text:style-name="T83">:</text:span><text:span text:style-name="T24"> </text:span><text:span text:style-name="T56">integer</text:span><text:span text:style-name="T83">; </text:span><text:span text:style-name="T44"><text:s/></text:span><text:span text:style-name="T101">//</text:span><text:span text:style-name="T103">id for identifiers</text:span></text:p>
      <text:p text:style-name="P153"><text:span text:style-name="T24"><text:s text:c="3"/></text:span><text:span text:style-name="T56">tnNumber <text:s/></text:span><text:span text:style-name="T83">:</text:span><text:span text:style-name="T24"> </text:span><text:span text:style-name="T56">integer</text:span><text:span text:style-name="T83">; <text:s/></text:span><text:span text:style-name="T101">//</text:span><text:span text:style-name="T103">id for numbers</text:span></text:p>
      <text:p text:style-name="P153"><text:span text:style-name="T24"><text:s text:c="3"/></text:span><text:span text:style-name="T56">tnKeyword </text:span><text:span text:style-name="T83">:</text:span><text:span text:style-name="T24"> </text:span><text:span text:style-name="T56">integer</text:span><text:span text:style-name="T83">; <text:s/></text:span><text:span text:style-name="T101">//</text:span><text:span text:style-name="T103">id for keywords</text:span></text:p>
      <text:p text:style-name="P153"><text:span text:style-name="T24"><text:s text:c="3"/></text:span><text:span text:style-name="T56">tnString <text:s/></text:span><text:span text:style-name="T83">:</text:span><text:span text:style-name="T24"> </text:span><text:span text:style-name="T56">integer</text:span><text:span text:style-name="T83">; <text:s/></text:span><text:span text:style-name="T101">//</text:span><text:span text:style-name="T103">id for strings</text:span></text:p>
      <text:p text:style-name="P153"><text:span text:style-name="T24"><text:s text:c="3"/></text:span><text:span text:style-name="T56">tnComment </text:span><text:span text:style-name="T83">:</text:span><text:span text:style-name="T24"> </text:span><text:span text:style-name="T56">integer</text:span><text:span text:style-name="T83">; <text:s/></text:span><text:span text:style-name="T101">//</text:span><text:span text:style-name="T103">id for comments<text:tab/></text:span></text:p>
      <text:p text:style-name="P69"/>
      <text:p text:style-name="P47"><text:bookmark text:name="result_box83"/><text:tab/>In addition, for each identifier, it has an associated attribute: </text:p>
      <text:p text:style-name="P67"/>
      <text:p text:style-name="P117"><text:span text:style-name="T38"><text:s text:c="4"/></text:span><text:span text:style-name="T92">//</text:span><text:span text:style-name="T96">Predefined Attributes</text:span></text:p>
      <text:p text:style-name="P117"><text:span text:style-name="T38"><text:s text:c="4"/></text:span><text:span text:style-name="T26">tkEol </text:span><text:span text:style-name="T79">:</text:span><text:span text:style-name="T26"> TSynHighlighterAttributes</text:span><text:span text:style-name="T79">;</text:span><text:span text:style-name="T26"> <text:s text:c="3"/></text:span></text:p>
      <text:p text:style-name="P117"><text:span text:style-name="T38"><text:s text:c="4"/></text:span><text:span text:style-name="T26">tkSymbol </text:span><text:span text:style-name="T79">:</text:span><text:span text:style-name="T26"> TSynHighlighterAttributes</text:span><text:span text:style-name="T79">;</text:span><text:span text:style-name="T26"> </text:span></text:p>
      <text:p text:style-name="P117"><text:span text:style-name="T38"><text:s text:c="4"/></text:span><text:span text:style-name="T26">tkSpace </text:span><text:span text:style-name="T79">:</text:span><text:span text:style-name="T26"> TSynHighlighterAttributes</text:span><text:span text:style-name="T79">;</text:span><text:span text:style-name="T26"> <text:s/></text:span></text:p>
      <text:p text:style-name="P117"><text:span text:style-name="T38"><text:s text:c="4"/></text:span><text:span text:style-name="T26">tkIdentif </text:span><text:span text:style-name="T79">:</text:span><text:span text:style-name="T26"> TSynHighlighterAttributes</text:span><text:span text:style-name="T79">;</text:span></text:p>
      <text:p text:style-name="P117"><text:soft-page-break/><text:span text:style-name="T38"><text:s text:c="4"/></text:span><text:span text:style-name="T26">tkNumber </text:span><text:span text:style-name="T79">:</text:span><text:span text:style-name="T26"> TSynHighlighterAttributes</text:span><text:span text:style-name="T79">;</text:span><text:span text:style-name="T26"> <text:s/></text:span></text:p>
      <text:p text:style-name="P117"><text:span text:style-name="T38"><text:s text:c="4"/></text:span><text:span text:style-name="T26">tkKeyword </text:span><text:span text:style-name="T79">:</text:span><text:span text:style-name="T26"> TSynHighlighterAttributes</text:span><text:span text:style-name="T79">;</text:span><text:span text:style-name="T26"> </text:span></text:p>
      <text:p text:style-name="P117"><text:span text:style-name="T38"><text:s text:c="4"/></text:span><text:span text:style-name="T26">tkString </text:span><text:span text:style-name="T79">:</text:span><text:span text:style-name="T26"> TSynHighlighterAttributes</text:span><text:span text:style-name="T79">;</text:span><text:span text:style-name="T26"> <text:s/></text:span></text:p>
      <text:p text:style-name="P117"><text:span text:style-name="T38"><text:s text:c="4"/></text:span><text:span text:style-name="T26">tkComment </text:span><text:span text:style-name="T79">:</text:span><text:span text:style-name="T26"> TSynHighlighterAttributes</text:span><text:span text:style-name="T79">;</text:span><text:span text:style-name="T26"> </text:span></text:p>
      <text:p text:style-name="P21"/>
      <text:p text:style-name="P21"><text:tab/><text:span text:style-name="T151">The ID identifies a token within the highlighter, while the attribute let us define the visual appearance of the token.</text:span></text:p>
      <text:p text:style-name="P21"/>
      <text:p text:style-name="P15"/>
      <text:p text:style-name="P20"><draw:custom-shape text:anchor-type="char" draw:z-index="33" draw:style-name="gr1" draw:text-style-name="P265" svg:width="14.923cm" svg:height="2.297cm" svg:x="1.217cm" svg:y="0.566cm"><text:p text:style-name="P264"><text:span text:style-name="T164">Unlike existing highlighters in Lazarus, </text:span><text:span text:style-name="T165">in TSynFacilSyn </text:span><text:span text:style-name="T164">there are not enumerated variables to identify the token </text:span><text:span text:style-name="T165">types</text:span><text:span text:style-name="T164">. It's used an integer numb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text:tab/> </text:p>
      <text:p text:style-name="P75"/>
      <text:p text:style-name="P75">We need to know which type a token has, in order to associated it with the corresponding attribute. </text:p>
      <text:p text:style-name="P75"/>
      <text:p text:style-name="P75">The rule is that each token type, is associated with a single attribute, as shown in the following diagram:</text:p>
      <text:p text:style-name="P75"/>
      <text:p text:style-name="P170"><draw:g text:anchor-type="paragraph" draw:z-index="60" draw:name="Forma4" draw:style-name="gr7"><draw:g draw:style-name="gr8"><draw:g draw:style-name="gr8"><draw:polygon draw:style-name="gr9" draw:text-style-name="P273" svg:width="5.51cm" svg:height="2.119cm" svg:x="0.001cm" svg:y="4.946cm" svg:viewBox="0 0 5511 2120" draw:points="0,2120 5511,2120 5511,0 0,0"><text:p/></draw:polygon><draw:polygon draw:style-name="gr10" draw:text-style-name="P274" svg:width="5.51cm" svg:height="2.119cm" svg:x="0.001cm" svg:y="4.946cm" svg:viewBox="0 0 5511 2120" draw:points="0,2120 5511,2120 5511,0 0,0"><text:p/></draw:polygon></draw:g><draw:frame draw:style-name="gr20" draw:text-style-name="P276" svg:width="5.511cm" svg:height="2.521cm" svg:x="0cm" svg:y="4.747cm"><draw:text-box><text:p text:style-name="P275"><text:span text:style-name="T171"/></text:p><text:p text:style-name="P275"><text:span text:style-name="T171"><text:s/></text:span><text:span text:style-name="T171">cad </text:span><text:span text:style-name="T174">=</text:span><text:span text:style-name="T171"> </text:span><text:span text:style-name="T175">"hello world"</text:span></text:p><text:p text:style-name="P275"><text:span text:style-name="T176">//comment</text:span></text:p></draw:text-box></draw:frame></draw:g><draw:g draw:style-name="gr8"><draw:g draw:style-name="gr8"><draw:polygon draw:style-name="gr9" draw:text-style-name="P273" svg:width="3.391cm" svg:height="0.636cm" svg:x="7.037cm" svg:y="0.92cm" svg:viewBox="0 0 3392 637" draw:points="0,637 3392,637 3392,0 0,0"><text:p/></draw:polygon><draw:polygon draw:style-name="gr10" draw:text-style-name="P274" svg:width="3.391cm" svg:height="0.636cm" svg:x="7.037cm" svg:y="0.92cm" svg:viewBox="0 0 3392 637" draw:points="0,637 3392,637 3392,0 0,0"><text:p/></draw:polygon></draw:g><draw:frame draw:style-name="gr18" draw:text-style-name="P278" svg:width="3.393cm" svg:height="0.772cm" svg:x="7.036cm" svg:y="0.854cm"><draw:text-box><text:p text:style-name="P277"><text:span text:style-name="T172">tnNull</text:span></text:p></draw:text-box></draw:frame></draw:g><draw:g draw:style-name="gr8"><draw:g draw:style-name="gr8"><draw:polygon draw:style-name="gr9" draw:text-style-name="P273" svg:width="3.391cm" svg:height="0.636cm" svg:x="7.037cm" svg:y="4.101cm" svg:viewBox="0 0 3392 637" draw:points="0,637 3392,637 3392,0 0,0"><text:p/></draw:polygon><draw:polygon draw:style-name="gr10" draw:text-style-name="P274" svg:width="3.391cm" svg:height="0.636cm" svg:x="7.037cm" svg:y="4.101cm" svg:viewBox="0 0 3392 637" draw:points="0,637 3392,637 3392,0 0,0"><text:p/></draw:polygon></draw:g><draw:frame draw:style-name="gr18" draw:text-style-name="P278" svg:width="3.393cm" svg:height="0.772cm" svg:x="7.036cm" svg:y="4.033cm"><draw:text-box><text:p text:style-name="P277"><text:span text:style-name="T172">tnSymbol</text:span></text:p></draw:text-box></draw:frame></draw:g><draw:g draw:style-name="gr8"><draw:g draw:style-name="gr8"><draw:polygon draw:style-name="gr9" draw:text-style-name="P273" svg:width="3.391cm" svg:height="0.636cm" svg:x="7.037cm" svg:y="3.039cm" svg:viewBox="0 0 3392 637" draw:points="0,637 3392,637 3392,0 0,0"><text:p/></draw:polygon><draw:polygon draw:style-name="gr10" draw:text-style-name="P274" svg:width="3.391cm" svg:height="0.636cm" svg:x="7.037cm" svg:y="3.039cm" svg:viewBox="0 0 3392 637" draw:points="0,637 3392,637 3392,0 0,0"><text:p/></draw:polygon></draw:g><draw:frame draw:style-name="gr18" draw:text-style-name="P278" svg:width="3.393cm" svg:height="0.772cm" svg:x="7.036cm" svg:y="2.974cm"><draw:text-box><text:p text:style-name="P277"><text:span text:style-name="T172">tnIdentif</text:span></text:p></draw:text-box></draw:frame></draw:g><draw:g draw:style-name="gr8"><draw:g draw:style-name="gr8"><draw:polygon draw:style-name="gr9" draw:text-style-name="P273" svg:width="3.391cm" svg:height="0.636cm" svg:x="7.037cm" svg:y="5.158cm" svg:viewBox="0 0 3392 637" draw:points="0,637 3392,637 3392,0 0,0"><text:p/></draw:polygon><draw:polygon draw:style-name="gr10" draw:text-style-name="P274" svg:width="3.391cm" svg:height="0.636cm" svg:x="7.037cm" svg:y="5.158cm" svg:viewBox="0 0 3392 637" draw:points="0,637 3392,637 3392,0 0,0"><text:p/></draw:polygon></draw:g><draw:frame draw:style-name="gr18" draw:text-style-name="P278" svg:width="3.393cm" svg:height="0.772cm" svg:x="7.036cm" svg:y="5.093cm"><draw:text-box><text:p text:style-name="P277"><text:span text:style-name="T172">tnNumber</text:span></text:p></draw:text-box></draw:frame></draw:g><draw:g draw:style-name="gr8"><draw:g draw:style-name="gr8"><draw:polygon draw:style-name="gr9" draw:text-style-name="P273" svg:width="3.391cm" svg:height="0.636cm" svg:x="7.037cm" svg:y="6.218cm" svg:viewBox="0 0 3392 637" draw:points="0,637 3392,637 3392,0 0,0"><text:p/></draw:polygon><draw:polygon draw:style-name="gr10" draw:text-style-name="P274" svg:width="3.391cm" svg:height="0.636cm" svg:x="7.037cm" svg:y="6.218cm" svg:viewBox="0 0 3392 637" draw:points="0,637 3392,637 3392,0 0,0"><text:p/></draw:polygon></draw:g><draw:frame draw:style-name="gr18" draw:text-style-name="P278" svg:width="3.393cm" svg:height="0.772cm" svg:x="7.036cm" svg:y="6.153cm"><draw:text-box><text:p text:style-name="P277"><text:span text:style-name="T172">tnKeyword</text:span></text:p></draw:text-box></draw:frame></draw:g><draw:g draw:style-name="gr8"><draw:g draw:style-name="gr8"><draw:polygon draw:style-name="gr9" draw:text-style-name="P273" svg:width="3.391cm" svg:height="0.636cm" svg:x="7.037cm" svg:y="7.278cm" svg:viewBox="0 0 3392 637" draw:points="0,637 3392,637 3392,0 0,0"><text:p/></draw:polygon><draw:polygon draw:style-name="gr10" draw:text-style-name="P274" svg:width="3.391cm" svg:height="0.636cm" svg:x="7.037cm" svg:y="7.278cm" svg:viewBox="0 0 3392 637" draw:points="0,637 3392,637 3392,0 0,0"><text:p/></draw:polygon></draw:g><draw:frame draw:style-name="gr18" draw:text-style-name="P278" svg:width="3.393cm" svg:height="0.772cm" svg:x="7.036cm" svg:y="7.211cm"><draw:text-box><text:p text:style-name="P277"><text:span text:style-name="T172">tnString</text:span></text:p></draw:text-box></draw:frame></draw:g><draw:g draw:style-name="gr8"><draw:g draw:style-name="gr8"><draw:polygon draw:style-name="gr9" draw:text-style-name="P273" svg:width="3.391cm" svg:height="0.636cm" svg:x="7.037cm" svg:y="8.337cm" svg:viewBox="0 0 3392 637" draw:points="0,637 3392,637 3392,0 0,0"><text:p/></draw:polygon><draw:polygon draw:style-name="gr10" draw:text-style-name="P274" svg:width="3.391cm" svg:height="0.636cm" svg:x="7.037cm" svg:y="8.337cm" svg:viewBox="0 0 3392 637" draw:points="0,637 3392,637 3392,0 0,0"><text:p/></draw:polygon></draw:g><draw:frame draw:style-name="gr18" draw:text-style-name="P278" svg:width="3.393cm" svg:height="0.772cm" svg:x="7.036cm" svg:y="8.271cm"><draw:text-box><text:p text:style-name="P277"><text:span text:style-name="T172">tnComment</text:span></text:p></draw:text-box></draw:frame></draw:g><draw:line draw:style-name="gr19" draw:text-style-name="P274" svg:x1="2.332cm" svg:y1="6.558cm" svg:x2="6.827cm" svg:y2="8.635cm"><text:p/></draw:line><draw:line draw:style-name="gr19" draw:text-style-name="P274" svg:x1="4.494cm" svg:y1="6.006cm" svg:x2="6.826cm" svg:y2="7.617cm"><text:p/></draw:line><draw:line draw:style-name="gr19" draw:text-style-name="P274" svg:x1="1.654cm" svg:y1="5.88cm" svg:x2="6.953cm" svg:y2="4.311cm"><text:p/></draw:line><draw:line draw:style-name="gr19" draw:text-style-name="P274" svg:x1="0.976cm" svg:y1="5.795cm" svg:x2="6.826cm" svg:y2="3.336cm"><text:p/></draw:line><draw:g draw:style-name="gr8"><draw:g draw:style-name="gr8"><draw:polygon draw:style-name="gr9" draw:text-style-name="P273" svg:width="3.391cm" svg:height="0.636cm" svg:x="7.037cm" svg:y="1.979cm" svg:viewBox="0 0 3392 637" draw:points="0,637 3392,637 3392,0 0,0"><text:p/></draw:polygon><draw:polygon draw:style-name="gr10" draw:text-style-name="P274" svg:width="3.391cm" svg:height="0.636cm" svg:x="7.037cm" svg:y="1.979cm" svg:viewBox="0 0 3392 637" draw:points="0,637 3392,637 3392,0 0,0"><text:p/></draw:polygon></draw:g><draw:frame draw:style-name="gr18" draw:text-style-name="P278" svg:width="3.393cm" svg:height="0.772cm" svg:x="7.036cm" svg:y="1.914cm"><draw:text-box><text:p text:style-name="P277"><text:span text:style-name="T172">tnSpace</text:span></text:p></draw:text-box></draw:frame></draw:g><draw:line draw:style-name="gr19" draw:text-style-name="P274" svg:x1="0.171cm" svg:y1="5.881cm" svg:x2="6.826cm" svg:y2="2.277cm"><text:p/></draw:line><draw:g draw:style-name="gr8"><draw:g draw:style-name="gr8"><draw:polygon draw:style-name="gr9" draw:text-style-name="P273" svg:width="3.391cm" svg:height="0.636cm" svg:x="12.124cm" svg:y="3.039cm" svg:viewBox="0 0 3392 637" draw:points="0,637 3392,637 3392,0 0,0"><text:p/></draw:polygon><draw:polygon draw:style-name="gr10" draw:text-style-name="P274" svg:width="3.391cm" svg:height="0.636cm" svg:x="12.124cm" svg:y="3.039cm" svg:viewBox="0 0 3392 637" draw:points="0,637 3392,637 3392,0 0,0"><text:p/></draw:polygon></draw:g><draw:frame draw:style-name="gr18" draw:text-style-name="P278" svg:width="3.393cm" svg:height="0.772cm" svg:x="12.123cm" svg:y="2.974cm"><draw:text-box><text:p text:style-name="P277"><text:span text:style-name="T172">tkIdentif</text:span></text:p></draw:text-box></draw:frame></draw:g><draw:g draw:style-name="gr8"><draw:g draw:style-name="gr8"><draw:polygon draw:style-name="gr9" draw:text-style-name="P273" svg:width="3.391cm" svg:height="0.636cm" svg:x="12.124cm" svg:y="4.101cm" svg:viewBox="0 0 3392 637" draw:points="0,637 3392,637 3392,0 0,0"><text:p/></draw:polygon><draw:polygon draw:style-name="gr10" draw:text-style-name="P274" svg:width="3.391cm" svg:height="0.636cm" svg:x="12.124cm" svg:y="4.101cm" svg:viewBox="0 0 3392 637" draw:points="0,637 3392,637 3392,0 0,0"><text:p/></draw:polygon></draw:g><draw:frame draw:style-name="gr18" draw:text-style-name="P278" svg:width="3.393cm" svg:height="0.772cm" svg:x="12.123cm" svg:y="4.033cm"><draw:text-box><text:p text:style-name="P277"><text:span text:style-name="T172">tkSymbol</text:span></text:p></draw:text-box></draw:frame></draw:g><draw:g draw:style-name="gr8"><draw:g draw:style-name="gr8"><draw:polygon draw:style-name="gr9" draw:text-style-name="P273" svg:width="3.391cm" svg:height="0.636cm" svg:x="12.124cm" svg:y="1.979cm" svg:viewBox="0 0 3392 637" draw:points="0,637 3392,637 3392,0 0,0"><text:p/></draw:polygon><draw:polygon draw:style-name="gr10" draw:text-style-name="P274" svg:width="3.391cm" svg:height="0.636cm" svg:x="12.124cm" svg:y="1.979cm" svg:viewBox="0 0 3392 637" draw:points="0,637 3392,637 3392,0 0,0"><text:p/></draw:polygon></draw:g><draw:frame draw:style-name="gr18" draw:text-style-name="P278" svg:width="3.393cm" svg:height="0.772cm" svg:x="12.123cm" svg:y="1.914cm"><draw:text-box><text:p text:style-name="P277"><text:span text:style-name="T172">tkSpace</text:span></text:p></draw:text-box></draw:frame></draw:g><draw:g draw:style-name="gr8"><draw:g draw:style-name="gr8"><draw:polygon draw:style-name="gr9" draw:text-style-name="P273" svg:width="3.391cm" svg:height="0.636cm" svg:x="12.124cm" svg:y="5.158cm" svg:viewBox="0 0 3392 637" draw:points="0,637 3392,637 3392,0 0,0"><text:p/></draw:polygon><draw:polygon draw:style-name="gr10" draw:text-style-name="P274" svg:width="3.391cm" svg:height="0.636cm" svg:x="12.124cm" svg:y="5.158cm" svg:viewBox="0 0 3392 637" draw:points="0,637 3392,637 3392,0 0,0"><text:p/></draw:polygon></draw:g><draw:frame draw:style-name="gr18" draw:text-style-name="P278" svg:width="3.393cm" svg:height="0.772cm" svg:x="12.123cm" svg:y="5.093cm"><draw:text-box><text:p text:style-name="P277"><text:span text:style-name="T172">tkNumber</text:span></text:p></draw:text-box></draw:frame></draw:g><draw:g draw:style-name="gr8"><draw:g draw:style-name="gr8"><draw:polygon draw:style-name="gr9" draw:text-style-name="P273" svg:width="3.391cm" svg:height="0.636cm" svg:x="12.124cm" svg:y="6.218cm" svg:viewBox="0 0 3392 637" draw:points="0,637 3392,637 3392,0 0,0"><text:p/></draw:polygon><draw:polygon draw:style-name="gr10" draw:text-style-name="P274" svg:width="3.391cm" svg:height="0.636cm" svg:x="12.124cm" svg:y="6.218cm" svg:viewBox="0 0 3392 637" draw:points="0,637 3392,637 3392,0 0,0"><text:p/></draw:polygon></draw:g><draw:frame draw:style-name="gr18" draw:text-style-name="P278" svg:width="3.393cm" svg:height="0.772cm" svg:x="12.123cm" svg:y="6.153cm"><draw:text-box><text:p text:style-name="P277"><text:span text:style-name="T172">tkKeyword</text:span></text:p></draw:text-box></draw:frame></draw:g><draw:g draw:style-name="gr8"><draw:g draw:style-name="gr8"><draw:polygon draw:style-name="gr9" draw:text-style-name="P273" svg:width="3.391cm" svg:height="0.636cm" svg:x="12.124cm" svg:y="7.278cm" svg:viewBox="0 0 3392 637" draw:points="0,637 3392,637 3392,0 0,0"><text:p/></draw:polygon><draw:polygon draw:style-name="gr10" draw:text-style-name="P274" svg:width="3.391cm" svg:height="0.636cm" svg:x="12.124cm" svg:y="7.278cm" svg:viewBox="0 0 3392 637" draw:points="0,637 3392,637 3392,0 0,0"><text:p/></draw:polygon></draw:g><draw:frame draw:style-name="gr18" draw:text-style-name="P278" svg:width="3.393cm" svg:height="0.772cm" svg:x="12.123cm" svg:y="7.211cm"><draw:text-box><text:p text:style-name="P277"><text:span text:style-name="T172">tkString</text:span></text:p></draw:text-box></draw:frame></draw:g><draw:g draw:style-name="gr8"><draw:g draw:style-name="gr8"><draw:polygon draw:style-name="gr9" draw:text-style-name="P273" svg:width="3.391cm" svg:height="0.636cm" svg:x="12.124cm" svg:y="8.337cm" svg:viewBox="0 0 3392 637" draw:points="0,637 3392,637 3392,0 0,0"><text:p/></draw:polygon><draw:polygon draw:style-name="gr10" draw:text-style-name="P274" svg:width="3.391cm" svg:height="0.636cm" svg:x="12.124cm" svg:y="8.337cm" svg:viewBox="0 0 3392 637" draw:points="0,637 3392,637 3392,0 0,0"><text:p/></draw:polygon></draw:g><draw:frame draw:style-name="gr18" draw:text-style-name="P278" svg:width="3.393cm" svg:height="0.772cm" svg:x="12.123cm" svg:y="8.271cm"><draw:text-box><text:p text:style-name="P277"><text:span text:style-name="T172">tkComment</text:span></text:p></draw:text-box></draw:frame></draw:g><draw:frame draw:style-name="gr18" draw:text-style-name="P278" svg:width="4.546cm" svg:height="0.772cm" svg:x="6.401cm" svg:y="0.025cm"><draw:text-box><text:p text:style-name="P277"><text:span text:style-name="T173">TOKEN TYPE</text:span></text:p></draw:text-box></draw:frame><draw:frame draw:style-name="gr18" draw:text-style-name="P278" svg:width="4.546cm" svg:height="0.772cm" svg:x="11.546cm" svg:y="0.025cm"><draw:text-box><text:p text:style-name="P277"><text:span text:style-name="T173">ATTRIBUTE</text:span></text:p></draw:text-box></draw:frame><draw:line draw:style-name="gr19" draw:text-style-name="P274" svg:x1="10.64cm" svg:y1="1.217cm" svg:x2="13.395cm" svg:y2="1.217cm"><text:p/></draw:line><draw:frame draw:style-name="gr18" draw:text-style-name="P278" svg:width="3.393cm" svg:height="0.772cm" svg:x="12.123cm" svg:y="0.828cm"><draw:text-box><text:p text:style-name="P277"><text:span text:style-name="T172">NIL</text:span></text:p></draw:text-box></draw:frame><draw:line draw:style-name="gr19" draw:text-style-name="P274" svg:x1="10.64cm" svg:y1="2.319cm" svg:x2="11.912cm" svg:y2="2.319cm"><text:p/></draw:line><draw:line draw:style-name="gr19" draw:text-style-name="P274" svg:x1="10.64cm" svg:y1="3.378cm" svg:x2="11.912cm" svg:y2="3.378cm"><text:p/></draw:line><draw:line draw:style-name="gr19" draw:text-style-name="P274" svg:x1="10.64cm" svg:y1="4.417cm" svg:x2="11.912cm" svg:y2="4.417cm"><text:p/></draw:line><draw:line draw:style-name="gr19" draw:text-style-name="P274" svg:x1="10.64cm" svg:y1="5.476cm" svg:x2="11.912cm" svg:y2="5.476cm"><text:p/></draw:line><draw:line draw:style-name="gr19" draw:text-style-name="P274" svg:x1="10.64cm" svg:y1="6.547cm" svg:x2="11.912cm" svg:y2="6.547cm"><text:p/></draw:line><draw:line draw:style-name="gr19" draw:text-style-name="P274" svg:x1="10.64cm" svg:y1="7.607cm" svg:x2="11.912cm" svg:y2="7.607cm"><text:p/></draw:line><draw:line draw:style-name="gr19" draw:text-style-name="P274" svg:x1="10.64cm" svg:y1="8.645cm" svg:x2="11.912cm" svg:y2="8.645cm"><text:p/></draw:line></draw:g> </text:p>
      <text:p text:style-name="P106"/>
      <text:p text:style-name="P75"/>
      <text:p text:style-name="P75">The pre-defined types of tokens are listed in the following table:</text:p>
      <text:p text:style-name="P17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81"><text:s/>ATTRIBUTE TYPE</text:p>
          </table:table-cell>
          <table:table-cell table:style-name="Table2.A1" office:value-type="string">
            <text:p text:style-name="P183">NAME IN CODE</text:p>
          </table:table-cell>
          <table:table-cell table:style-name="Table2.A1" office:value-type="string">
            <text:p text:style-name="P181">NAME IN XML</text:p>
          </table:table-cell>
          <table:table-cell table:style-name="Table2.D1" office:value-type="string">
            <text:p text:style-name="P185">DESCRIPTION</text:p>
          </table:table-cell>
        </table:table-row>
        <table:table-row table:style-name="Table2.1">
          <table:table-cell table:style-name="Table2.A2" office:value-type="string">
            <text:p text:style-name="P182">End of line</text:p>
          </table:table-cell>
          <table:table-cell table:style-name="Table2.A2" office:value-type="string">
            <text:p text:style-name="P184">t<text:span text:style-name="T158">n</text:span>Eol</text:p>
          </table:table-cell>
          <table:table-cell table:style-name="Table2.A2" office:value-type="string">
            <text:p text:style-name="P182">EOL</text:p>
          </table:table-cell>
          <table:table-cell table:style-name="Table2.D2" office:value-type="string">
            <text:p text:style-name="P186">Used to detect the end of line. It has a fixed definition and can not be changed.</text:p>
          </table:table-cell>
        </table:table-row>
        <table:table-row table:style-name="Table2.1">
          <table:table-cell table:style-name="Table2.A2" office:value-type="string">
            <text:p text:style-name="P182">Symbol</text:p>
          </table:table-cell>
          <table:table-cell table:style-name="Table2.A2" office:value-type="string">
            <text:p text:style-name="P184">t<text:span text:style-name="T158">n</text:span>Symbol</text:p>
          </table:table-cell>
          <table:table-cell table:style-name="Table2.A2" office:value-type="string">
            <text:p text:style-name="P182">SYMBOL</text:p>
          </table:table-cell>
          <table:table-cell table:style-name="Table2.D2" office:value-type="string">
            <text:p text:style-name="P186">Represents the symbols that are not identifiers, numbers, spaces, strings or any other token type.</text:p>
          </table:table-cell>
        </table:table-row>
        <table:table-row table:style-name="Table2.1">
          <table:table-cell table:style-name="Table2.A2" office:value-type="string">
            <text:p text:style-name="P182">Whitespace</text:p>
          </table:table-cell>
          <table:table-cell table:style-name="Table2.A2" office:value-type="string">
            <text:p text:style-name="P184">t<text:span text:style-name="T158">n</text:span>Space</text:p>
          </table:table-cell>
          <table:table-cell table:style-name="Table2.A2" office:value-type="string">
            <text:p text:style-name="P182">SPACE</text:p>
          </table:table-cell>
          <table:table-cell table:style-name="Table2.D2" office:value-type="string">
            <text:p text:style-name="P186">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82">Identifier</text:p>
          </table:table-cell>
          <table:table-cell table:style-name="Table2.A2" office:value-type="string">
            <text:p text:style-name="P184">t<text:span text:style-name="T158">n</text:span>Identif</text:p>
          </table:table-cell>
          <table:table-cell table:style-name="Table2.A2" office:value-type="string">
            <text:p text:style-name="P182">IDENTIFIER</text:p>
          </table:table-cell>
          <table:table-cell table:style-name="Table2.D2" office:value-type="string">
            <text:p text:style-name="P186">Represent identifiers in language. These identifiers can be names of variables, functions, etc.</text:p>
          </table:table-cell>
        </table:table-row>
        <table:table-row table:style-name="Table2.1">
          <table:table-cell table:style-name="Table2.A2" office:value-type="string">
            <text:p text:style-name="P182">Numbers</text:p>
          </table:table-cell>
          <table:table-cell table:style-name="Table2.A2" office:value-type="string">
            <text:p text:style-name="P184">t<text:span text:style-name="T158">n</text:span>Number</text:p>
          </table:table-cell>
          <table:table-cell table:style-name="Table2.A2" office:value-type="string">
            <text:p text:style-name="P182">NUMBER</text:p>
          </table:table-cell>
          <table:table-cell table:style-name="Table2.D2" office:value-type="string">
            <text:p text:style-name="P186">Represents numeric constants in a language such as 99, 0243, 0xA0, $FF</text:p>
          </table:table-cell>
        </table:table-row>
        <table:table-row table:style-name="Table2.1">
          <table:table-cell table:style-name="Table2.A2" office:value-type="string">
            <text:p text:style-name="P182">Keyword</text:p>
          </table:table-cell>
          <table:table-cell table:style-name="Table2.A2" office:value-type="string">
            <text:p text:style-name="P184">t<text:span text:style-name="T158">n</text:span>Keyword</text:p>
          </table:table-cell>
          <table:table-cell table:style-name="Table2.A2" office:value-type="string">
            <text:p text:style-name="P182">KEYWORD</text:p>
          </table:table-cell>
          <table:table-cell table:style-name="Table2.D2" office:value-type="string">
            <text:p text:style-name="P186">They are special identifiers. Usually represents the reserved words in a language, such as FOR, BEGIN, RETURN.</text:p>
          </table:table-cell>
        </table:table-row>
        <table:table-row table:style-name="Table2.1">
          <table:table-cell table:style-name="Table2.A2" office:value-type="string">
            <text:p text:style-name="P182">String</text:p>
          </table:table-cell>
          <table:table-cell table:style-name="Table2.A2" office:value-type="string">
            <text:p text:style-name="P184">t<text:span text:style-name="T158">n</text:span>String</text:p>
          </table:table-cell>
          <table:table-cell table:style-name="Table2.A2" office:value-type="string">
            <text:p text:style-name="P182">STRING</text:p>
          </table:table-cell>
          <table:table-cell table:style-name="Table2.D2" office:value-type="string">
            <text:p text:style-name="P186">Represents to string constants used in most languages, such as "hello", "world".</text:p>
          </table:table-cell>
        </table:table-row>
        <table:table-row table:style-name="Table2.1">
          <table:table-cell table:style-name="Table2.A2" office:value-type="string">
            <text:p text:style-name="P182">Comments</text:p>
          </table:table-cell>
          <table:table-cell table:style-name="Table2.A2" office:value-type="string">
            <text:p text:style-name="P184">t<text:span text:style-name="T158">n</text:span>Comment</text:p>
          </table:table-cell>
          <table:table-cell table:style-name="Table2.A2" office:value-type="string">
            <text:p text:style-name="P182">COMMENT</text:p>
          </table:table-cell>
          <table:table-cell table:style-name="Table2.D2" office:value-type="string">
            <text:p text:style-name="P186">Represents the comments within the code of a program.</text:p>
          </table:table-cell>
        </table:table-row>
      </table:table>
      <text:p text:style-name="P75"/>
      <text:p text:style-name="P75">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5"/>
      <text:p text:style-name="P75">The amount of different types of tokens (attributes available) indicates the number of different visual features that can be applied to various elements of the text of a syntax. When the predefined types are not enough, custom token types can be created.</text:p>
      <text:p text:style-name="P75"/>
      <text:p text:style-name="P75"><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5"/>
      <text:p text:style-name="P75">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5"/>
      <text:list xml:id="list230305812667647" text:continue-list="list230304819217698" text:style-name="WW8Num24">
        <text:list-item>
          <text:list>
            <text:list-item>
              <text:list>
                <text:list-item>
                  <text:h text:style-name="P256" text:outline-level="3"><text:bookmark-start text:name="__RefHeading___Toc404419453"/>Identifiers<text:bookmark-end text:name="__RefHeading___Toc404419453"/></text:h>
                </text:list-item>
              </text:list>
            </text:list-item>
          </text:list>
        </text:list-item>
      </text:list>
      <text:p text:style-name="P75"/>
      <text:p text:style-name="P75">An identifier is a character string, usually alphanumeric and usually starting with a letter or symbol and followed by any letters, numbers or symbols.</text:p>
      <text:p text:style-name="P75"/>
      <text:p text:style-name="P75">Each language has its own identifier naming rules, but generally most of them share the same characteristics such as supporting all alphabetic characters.</text:p>
      <text:p text:style-name="P75"/>
      <text:p text:style-name="P75">Usually, identifiers are considered as a single token, but it is possible to define more extensive delimiter tokens that can be used to interpret the token as an identifier. </text:p>
      <text:p text:style-name="P15"/>
      <text:list xml:id="list230304962431198" text:continue-numbering="true" text:style-name="WW8Num24">
        <text:list-item>
          <text:list>
            <text:list-item>
              <text:list>
                <text:list-item>
                  <text:h text:style-name="P256" text:outline-level="3"><text:bookmark-start text:name="__RefHeading___Toc404419454"/>Numbers<text:bookmark-end text:name="__RefHeading___Toc404419454"/></text:h>
                </text:list-item>
              </text:list>
            </text:list-item>
          </text:list>
        </text:list-item>
      </text:list>
      <text:p text:style-name="P15"/>
      <text:p text:style-name="P75">In many languages numerical tokens are considered like strings containing numeric digits or some auxiliary character. For example: 5943, 0123, 05, etc.</text:p>
      <text:p text:style-name="P75"/>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230304084201203" text:continue-numbering="true" text:style-name="WW8Num24">
        <text:list-item>
          <text:list>
            <text:list-item>
              <text:list>
                <text:list-item>
                  <text:h text:style-name="P256" text:outline-level="3"><text:bookmark-start text:name="__RefHeading___Toc404419455"/>Whitespace<text:bookmark-end text:name="__RefHeading___Toc404419455"/></text:h>
                </text:list-item>
              </text:list>
            </text:list-item>
          </text:list>
        </text:list-item>
      </text:list>
      <text:p text:style-name="P15"/>
      <text:p text:style-name="P75">Whitespace are any characters with a character code less than #32. This includes real spaces, tabs, control characters, etc. </text:p>
      <text:p text:style-name="P80"><text:s/></text:p>
      <text:p text:style-name="P75">Any string of whitespace characters are considered as a single whitespace token.</text:p>
      <text:p text:style-name="P75"><text:soft-page-break/></text:p>
      <text:p text:style-name="P75">For example the following strings wille be interpreted are whitespace tokens:</text:p>
      <text:p text:style-name="P80"/>
      <text:p text:style-name="P180">' '</text:p>
      <text:p text:style-name="P180">#9#32#32</text:p>
      <text:p text:style-name="P180">#1#2#3</text:p>
      <text:p text:style-name="P75"/>
      <text:p text:style-name="P75">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5"/>
      <text:p text:style-name="P75">Characters #10 and #13 are considered like whitespaces inside the highlighter, but usually they are never processed because they are deleted when the text is loaded in SynEdit.</text:p>
      <text:list xml:id="list230304347581875" text:continue-numbering="true" text:style-name="WW8Num24">
        <text:list-item>
          <text:list>
            <text:list-item>
              <text:list>
                <text:list-item>
                  <text:h text:style-name="P256" text:outline-level="3"><text:bookmark-start text:name="__RefHeading___Toc404419456"/>Strings<text:bookmark-end text:name="__RefHeading___Toc404419456"/></text:h>
                </text:list-item>
              </text:list>
            </text:list-item>
          </text:list>
        </text:list-item>
      </text:list>
      <text:p text:style-name="P15"/>
      <text:p text:style-name="P167"><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5">The following example shows a piece of code where we have defined two types of strings delimited by quotation marks and apostrophes:</text:p>
      <text:p text:style-name="P15"/>
      <text:p text:style-name="P38"><text:bookmark text:name="_1441178941"/><text:bookmark text:name="_1441179499"/><draw:frame draw:style-name="fr9" draw:name="Object4" text:anchor-type="as-char" svg:width="12.317cm" svg:height="3.355cm" draw:z-index="2"><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1296774246378011337" text:style-name="WW8Num7">
        <text:list-item>
          <text:p text:style-name="P215">Strings may occupy one or more lines.</text:p>
        </text:list-item>
        <text:list-item>
          <text:p text:style-name="P215">Delimiters are also part of the string token.</text:p>
        </text:list-item>
        <text:list-item>
          <text:p text:style-name="P215"><text:soft-page-break/>Strings of a single line can contain any characters, including and other strings delimiters (which are ignored).</text:p>
        </text:list-item>
        <text:list-item>
          <text:p text:style-name="P215">Strings can not be nested. A string can not be nested within another string of the same token type.</text:p>
        </text:list-item>
        <text:list-item>
          <text:p text:style-name="P215">Strings are parsed as a single token, except when they occupy more than one line. </text:p>
        </text:list-item>
      </text:list>
      <text:p text:style-name="P187"/>
      <text:p text:style-name="P75">This last feature can be explained as follows. Imagine you have a text string which occupies several lines:</text:p>
      <text:p text:style-name="P187"/>
      <text:p text:style-name="P188"><draw:frame draw:style-name="fr10" draw:name="Object5" text:anchor-type="as-char" svg:width="8.647cm" svg:height="2.514cm" draw:z-index="3"><draw:object-ole xlink:href="./Object 5" xlink:type="simple" xlink:show="embed" xlink:actuate="onLoad"/><draw:image xlink:href="./ObjectReplacements/Object 5" xlink:type="simple" xlink:show="embed" xlink:actuate="onLoad"/></draw:frame></text:p>
      <text:p text:style-name="P187"/>
      <text:p text:style-name="P75">Normally the colored area should be interpreted as a single string token, but because of the way SynEdit works (scan by lines), a string token can only occupy a single line. So SynEdit will actually interpret this string as 3 seperate string tokens.</text:p>
      <text:list xml:id="list230305911663335" text:continue-list="list230304347581875" text:style-name="WW8Num24">
        <text:list-item>
          <text:list>
            <text:list-item>
              <text:list>
                <text:list-item>
                  <text:h text:style-name="P256" text:outline-level="3"><text:bookmark-start text:name="__RefHeading___Toc404419457"/>Comments<text:bookmark-end text:name="__RefHeading___Toc404419457"/></text:h>
                </text:list-item>
              </text:list>
            </text:list-item>
          </text:list>
        </text:list-item>
      </text:list>
      <text:p text:style-name="P15"/>
      <text:p text:style-name="P167"><text:tab/>Comments are usually tokens placed between two comment delimiters. These delimiters are often symbols which consist of one or more characters. </text:p>
      <text:p text:style-name="P167"/>
      <text:p text:style-name="P15"><text:tab/>Several types of comments can be defined with different delimiters. Common types of comments are:</text:p>
      <text:p text:style-name="P15"/>
      <text:list xml:id="list5554422251619673474" text:style-name="WW8Num16">
        <text:list-item>
          <text:p text:style-name="P216"><text:span text:style-name="T130">Single line</text:span> : occupy a single line. Usually specified by only a starting delimiter which implies that the comment extends to the end of the line.</text:p>
        </text:list-item>
        <text:list-item>
          <text:p text:style-name="P216"><text:span text:style-name="T130">Multi-line</text:span> comments can span multiple lines of text. They usually specified by a start and end delimiter.</text:p>
        </text:list-item>
      </text:list>
      <text:p text:style-name="P15"/>
      <text:p text:style-name="P187">Some key features of comments are:</text:p>
      <text:p text:style-name="P15"/>
      <text:list xml:id="list230305135536329" text:continue-list="list1296774246378011337" text:style-name="WW8Num7">
        <text:list-item>
          <text:p text:style-name="P215">They can span one single or multiple lines.</text:p>
        </text:list-item>
        <text:list-item>
          <text:p text:style-name="P215">The delimiters are also part of the comment token.</text:p>
        </text:list-item>
        <text:list-item>
          <text:p text:style-name="P215">The single-line comments can contain any characters inside, including delimiters used by other comment token types (which are ignored).</text:p>
        </text:list-item>
        <text:list-item>
          <text:p text:style-name="P215"><text:soft-page-break/>Comments can not be nested. A comment token can not be placed inside another comment of the same token type.</text:p>
        </text:list-item>
        <text:list-item>
          <text:p text:style-name="P215">Comments consist of a single token, except when they occupy several lines. </text:p>
        </text:list-item>
      </text:list>
      <text:p text:style-name="P188"/>
      <text:p text:style-name="P188"/>
      <text:p text:style-name="P188"/>
      <text:list xml:id="list230304524873456" text:continue-list="list230305911663335" text:style-name="WW8Num24">
        <text:list-item>
          <text:list>
            <text:list-item>
              <text:list>
                <text:list-item>
                  <text:h text:style-name="P256" text:outline-level="3"><text:bookmark-start text:name="__RefHeading___Toc404419458"/>Symbols<text:bookmark-end text:name="__RefHeading___Toc404419458"/></text:h>
                </text:list-item>
              </text:list>
            </text:list-item>
          </text:list>
        </text:list-item>
      </text:list>
      <text:p text:style-name="P15"/>
      <text:p text:style-name="P159">Symbols are tokens which are composed of characters that are not part of any other token (strings, comments, identifiers, numbers, etc.).</text:p>
      <text:p text:style-name="P159"/>
      <text:p text:style-name="P159">Usually symbols are no alphanumeric tokens but you can define symbol tokens that contain numeric or alphabetic characters in your syntax definition. </text:p>
      <text:p text:style-name="P159"/>
      <text:p text:style-name="P159">In the following example a language is shown that only recognizes whitespace, so that all other characters (with a light grey background) are interpreted as symbol tokens:</text:p>
      <text:p text:style-name="P159"/>
      <text:p text:style-name="P160"><draw:frame draw:style-name="fr11" draw:name="Object6" text:anchor-type="as-char" svg:width="8.35cm" svg:height="3.293cm" draw:z-index="4"><draw:object-ole xlink:href="./Object 6" xlink:type="simple" xlink:show="embed" xlink:actuate="onLoad"/><draw:image xlink:href="./ObjectReplacements/Object 6" xlink:type="simple" xlink:show="embed" xlink:actuate="onLoad"/></draw:frame></text:p>
      <text:p text:style-name="P187"/>
      <text:p text:style-name="P159">In this other example we have a language that also recognizes identifiers (green background), so that all other characters (with light grey background) are interpreted as symbol tokens:</text:p>
      <text:p text:style-name="P159"/>
      <text:p text:style-name="P188"><draw:frame draw:style-name="fr12" draw:name="Object7" text:anchor-type="as-char" svg:width="8.35cm" svg:height="3.602cm" draw:z-index="5"><draw:object-ole xlink:href="./Object 7" xlink:type="simple" xlink:show="embed" xlink:actuate="onLoad"/><draw:image xlink:href="./ObjectReplacements/Object 7" xlink:type="simple" xlink:show="embed" xlink:actuate="onLoad"/></draw:frame></text:p>
      <text:p text:style-name="P187"/>
      <text:p text:style-name="P15"><text:tab/>Like you can see the symbol tokens are formed by all characters that are not part of any other symbol. </text:p>
      <text:list xml:id="list230305707107531" text:continue-numbering="true" text:style-name="WW8Num24">
        <text:list-item>
          <text:list>
            <text:list-item>
              <text:h text:style-name="P250" text:outline-level="2"><text:bookmark-start text:name="_Ref373056946"/><text:bookmark-start text:name="__RefHeading___Toc404419459"/><text:bookmark-start text:name="_Ref371165189"/>Special <text:bookmark-end text:name="_Ref373056946"/>identifiers<text:bookmark-end text:name="__RefHeading___Toc404419459"/></text:h>
            </text:list-item>
          </text:list>
        </text:list-item>
      </text:list>
      <text:p text:style-name="P15"/>
      <text:p text:style-name="P167"><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131">x</text:span><text:tab/><text:tab/>-&gt; Variable (identifier)</text:p>
      <text:p text:style-name="P75"><text:span text:style-name="T131">VAL_INI</text:span><text:tab/>-&gt; Constant (identifier)</text:p>
      <text:p text:style-name="P15"><text:tab/><text:span text:style-name="T131">TObject</text:span><text:tab/>-&gt; Class (Identifier)</text:p>
      <text:p text:style-name="P15"><text:tab/><text:span text:style-name="T131">M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130">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7"><text:span text:style-name="T2"><text:tab/></text:span><draw:frame draw:style-name="fr13" draw:name="Object8" text:anchor-type="as-char" svg:width="8.35cm" svg:height="3.431cm" draw:z-index="6"><draw:object-ole xlink:href="./Object 8" xlink:type="simple" xlink:show="embed" xlink:actuate="onLoad"/><draw:image xlink:href="./ObjectReplacements/Object 8" xlink:type="simple" xlink:show="embed" xlink:actuate="onLoad"/></draw:frame></text:p>
      <text:p text:style-name="P75">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132">special identifiers</text:span>.</text:p>
      <text:p text:style-name="P75"/>
      <text:p text:style-name="P75">In our Pascal sample code, we could define the “begin” and “end” identifiers as special identifiers and assign them the attribute of reserved words (KEYWORD).</text:p>
      <text:p text:style-name="P91"/>
      <text:p text:style-name="P15"><text:tab/>The special identifiers can be any predefined type KEYWORD, NUMBER, or a custom type.</text:p>
      <text:list xml:id="list230305605258867" text:continue-numbering="true" text:style-name="WW8Num24">
        <text:list-item>
          <text:list>
            <text:list-item>
              <text:h text:style-name="P246" text:outline-level="2"><text:bookmark-start text:name="__RefHeading___Toc404419460"/><text:soft-page-break/>Special symbols<text:bookmark-end text:name="__RefHeading___Toc404419460"/></text:h>
            </text:list-item>
          </text:list>
        </text:list-item>
      </text:list>
      <text:p text:style-name="P15"/>
      <text:p text:style-name="P163"><text:span text:style-name="T4">At the same way we can define subsets os identifiers to assign a different token type (different from </text:span><text:span text:style-name="T134">tkIdentif</text:span><text:span text:style-name="T4">), we can also choose certain combinations of characters (used in symbols), to define special tokens, which may have any other attribute (different from </text:span><text:span text:style-name="T135">tkSymbol</text:span><text:span text:style-name="T4">).</text:span></text:p>
      <text:p text:style-name="P15"/>
      <text:p text:style-name="P159">These tokens, defined from symbols are called <text:span text:style-name="T130">Special Symbols</text:span>, and can be used to represent special tokens (such as operators or delimiters) in a programming language.</text:p>
      <text:p text:style-name="P159"/>
      <text:p text:style-name="P159">As an example consider a syntax in which defines identifiers (green background) and numbers (orange background):</text:p>
      <text:p text:style-name="P159"/>
      <text:p text:style-name="P160"><draw:frame draw:style-name="fr14" draw:name="Object9" text:anchor-type="as-char" svg:width="8.35cm" svg:height="1.916cm" draw:z-index="7"><draw:object-ole xlink:href="./Object 9" xlink:type="simple" xlink:show="embed" xlink:actuate="onLoad"/><draw:image xlink:href="./ObjectReplacements/Object 9" xlink:type="simple" xlink:show="embed" xlink:actuate="onLoad"/></draw:frame></text:p>
      <text:p text:style-name="P15"/>
      <text:p text:style-name="P159">The grey part represents the symbol tokens. Within these tokens however, we can identify the assignment operator ": =". In this case we can define the token ": =" as a special symbol and assign it to some other attribute.</text:p>
      <text:p text:style-name="P15"/>
      <text:p text:style-name="P159">Special symbols can be the KEYWORD, NUMBER, etc. <text:s/>token types or some custom type.</text:p>
      <text:p text:style-name="P75"/>
      <text:list xml:id="list230304549384093" text:continue-numbering="true" text:style-name="WW8Num24">
        <text:list-item>
          <text:list>
            <text:list-item>
              <text:h text:style-name="P250" text:outline-level="2"><text:bookmark-start text:name="__RefHeading___Toc404419461"/>Definition of tokens<text:bookmark-end text:name="__RefHeading___Toc404419461"/><text:bookmark-end text:name="_Ref371165189"/></text:h>
            </text:list-item>
          </text:list>
        </text:list-item>
      </text:list>
      <text:p text:style-name="P75"/>
      <text:p text:style-name="P75">In <text:s/>TSynFacilSyn, there are two ways to define a token:</text:p>
      <text:p text:style-name="P75"/>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5"/>
      <text:list xml:id="list230305752188196" text:continue-numbering="true" text:style-name="WW8Num24">
        <text:list-item>
          <text:list>
            <text:list-item>
              <text:list>
                <text:list-item>
                  <text:h text:style-name="P256" text:outline-level="3"><text:bookmark-start text:name="__RefHeading___Toc404419462"/>Tokens by content<text:bookmark-end text:name="__RefHeading___Toc404419462"/></text:h>
                </text:list-item>
              </text:list>
            </text:list-item>
          </text:list>
        </text:list-item>
      </text:list>
      <text:p text:style-name="P75"/>
      <text:p text:style-name="P75">When defined by content, the starting delimiter and a set of possible characters for the following characters is always supplied. They have to meet following rules:</text:p>
      <text:p text:style-name="P75"/>
      <text:list xml:id="list4197569846029954040" text:style-name="WW8Num15">
        <text:list-item>
          <text:p text:style-name="P217">They need to start with a specified initial boundary or start with a character that is in the list of "valid starting characters".</text:p>
        </text:list-item>
        <text:list-item>
          <text:p text:style-name="P217">The successive characters need to be in the "list of valid following characters".</text:p>
        </text:list-item>
      </text:list>
      <text:p text:style-name="P75"/>
      <text:p text:style-name="P75">The definition by content is commonly used to define numbers and identifiers (but can be defined some others tokens by content). Following examples show some valid definitions:</text:p>
      <text:p text:style-name="P75"/>
      <text:p text:style-name="P118"><text:span text:style-name="T79">&lt;</text:span><text:span text:style-name="T11">Identifiers </text:span><text:span text:style-name="T26">CharsStart</text:span><text:span text:style-name="T79">=</text:span><text:span text:style-name="T26"> </text:span><text:span text:style-name="T114">"$A..Za..z_"</text:span><text:span text:style-name="T26"> Content </text:span><text:span text:style-name="T79">=</text:span><text:span text:style-name="T26"> </text:span><text:span text:style-name="T114">"A..Za..z0..9_"</text:span><text:span text:style-name="T79">&gt;&lt;/</text:span><text:span text:style-name="T11">Identifiers</text:span><text:span text:style-name="T79">&gt;</text:span></text:p>
      <text:p text:style-name="P118"><text:span text:style-name="T79">&lt;</text:span><text:span text:style-name="T11">Token </text:span><text:span text:style-name="T26">CharsStart</text:span><text:span text:style-name="T79">=</text:span><text:span text:style-name="T114">"0..9"</text:span><text:span text:style-name="T26"> Content </text:span><text:span text:style-name="T79">=</text:span><text:span text:style-name="T26"> </text:span><text:span text:style-name="T114">"0..9"</text:span><text:span text:style-name="T26"> Attribute</text:span><text:span text:style-name="T79">=</text:span><text:span text:style-name="T114">'NUMBER'</text:span><text:span text:style-name="T79">&gt;&lt;/</text:span><text:span text:style-name="T11">Token</text:span><text:span text:style-name="T79">&gt;</text:span></text:p>
      <text:p text:style-name="P118"><text:span text:style-name="T79">&lt;</text:span><text:span text:style-name="T11">Token </text:span><text:span text:style-name="T26">Start</text:span><text:span text:style-name="T79">=</text:span><text:span text:style-name="T114">"0x"</text:span><text:span text:style-name="T26"> Content </text:span><text:span text:style-name="T79">=</text:span><text:span text:style-name="T26"> </text:span><text:span text:style-name="T114">"0..9a..fA..F"</text:span><text:span text:style-name="T26"> Attribute</text:span><text:span text:style-name="T79">=</text:span><text:span text:style-name="T114">'NUMBER'</text:span><text:span text:style-name="T79">&gt;&lt;/</text:span><text:span text:style-name="T11">Token</text:span><text:span text:style-name="T79">&gt;</text:span></text:p>
      <text:p text:style-name="P75"/>
      <text:p text:style-name="P75">These definitions are recognized because they always include the "Content" field. The content tokens are not multi-line.</text:p>
      <text:p text:style-name="P75"/>
      <text:p text:style-name="P75"/>
      <text:p text:style-name="P75"/>
      <text:p text:style-name="P75"/>
      <text:list xml:id="list230305158363833" text:continue-list="list230305752188196" text:style-name="WW8Num24">
        <text:list-item>
          <text:list>
            <text:list-item>
              <text:list>
                <text:list-item>
                  <text:h text:style-name="P256" text:outline-level="3"><text:bookmark-start text:name="__RefHeading___Toc404419463"/><text:soft-page-break/>Delimited tokens<text:bookmark-end text:name="__RefHeading___Toc404419463"/></text:h>
                </text:list-item>
              </text:list>
            </text:list-item>
          </text:list>
        </text:list-item>
      </text:list>
      <text:p text:style-name="P75"/>
      <text:p text:style-name="P75">When tokens are defined by delimiters, it works with more basic elements called Token delimiters. </text:p>
      <text:p text:style-name="P75"/>
      <text:p text:style-name="P75">The definition by delimiter is common used to define strings and comments, because these items are always delimited by fixed sequences of characters. </text:p>
      <text:p text:style-name="P75"/>
      <text:p text:style-name="P75">A typical definition of a string token type is:</text:p>
      <text:p text:style-name="P75"/>
      <text:p text:style-name="P118"><text:span text:style-name="T38"><text:s text:c="2"/></text:span><text:span text:style-name="T79">&lt;</text:span><text:span text:style-name="T11">Token </text:span><text:span text:style-name="T26">Start</text:span><text:span text:style-name="T79">=</text:span><text:span text:style-name="T115">"</text:span><text:span text:style-name="T114">""</text:span><text:span text:style-name="T26"> End</text:span><text:span text:style-name="T79">=</text:span><text:span text:style-name="T115">"</text:span><text:span text:style-name="T114">""</text:span><text:span text:style-name="T26"> Attribute</text:span><text:span text:style-name="T79">=</text:span><text:span text:style-name="T115">"</text:span><text:span text:style-name="T114">STRING"</text:span><text:span text:style-name="T79">&gt;</text:span><text:span text:style-name="T26"> </text:span><text:span text:style-name="T79">&lt;/</text:span><text:span text:style-name="T11">Token</text:span><text:span text:style-name="T79">&gt;</text:span></text:p>
      <text:p text:style-name="P75"/>
      <text:p text:style-name="P75">These definitions are recognized because they always include the parameter "Start". <text:s/>Delimited tokens can be multi-line.</text:p>
      <text:p text:style-name="P75"/>
      <text:list xml:id="list230305267357320" text:continue-numbering="true" text:style-name="WW8Num24">
        <text:list-item>
          <text:list>
            <text:list-item>
              <text:h text:style-name="P247" text:outline-level="2"><text:bookmark text:name="_Ref377495481"/><text:bookmark text:name="_Ref377495484"/><text:bookmark-start text:name="_Ref389415797"/><text:bookmark-start text:name="_Ref389415801"/><text:bookmark-start text:name="__RefHeading___Toc404419464"/>Token<text:bookmark-end text:name="_Ref389415797"/><text:bookmark-end text:name="_Ref389415801"/> Delimiters<text:bookmark-end text:name="__RefHeading___Toc404419464"/></text:h>
            </text:list-item>
          </text:list>
        </text:list-item>
      </text:list>
      <text:p text:style-name="P15"/>
      <text:p text:style-name="P167"><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96">{</text:p>
      <text:p text:style-name="P96">}</text:p>
      <text:p text:style-name="P96">BEGIN</text:p>
      <text:p text:style-name="P96">/ *</text:p>
      <text:p text:style-name="P96">END</text:p>
      <text:p text:style-name="P96">* /</text:p>
      <text:p text:style-name="P97">"" "</text:p>
      <text:p text:style-name="P96">&lt;! -</text:p>
      <text:p text:style-name="P96">REM</text:p>
      <text:p text:style-name="P75"><text:span text:style-name="T131">#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91"><text:soft-page-break/>The highlighter supports two basic types of delimiters:</text:p>
      <text:p text:style-name="P15"/>
      <text:list xml:id="list7908380804338356492" text:style-name="WW8Num10">
        <text:list-item>
          <text:p text:style-name="P235"><text:span text:style-name="T5">Delimiter identifier</text:span><text:span text:style-name="T4">. When is a special identifier as BEGIN or END.</text:span></text:p>
        </text:list-item>
        <text:list-item>
          <text:p text:style-name="P218"><text:span text:style-name="T130">Delimiter symbol</text:span>. When a special symbol, for example the characters: {}.</text:p>
        </text:list-item>
      </text:list>
      <text:p text:style-name="P15"/>
      <text:p text:style-name="P167"><text:tab/>The delimiters have the following restriction: if the starting character is an identifier, then all the delimiters must be an identifier. In other words the following list of delimiters are wrong:</text:p>
      <text:p text:style-name="P15"><text:tab/></text:p>
      <text:p text:style-name="P96">REM%</text:p>
      <text:p text:style-name="P41"><text:tab/>A&lt;</text:p>
      <text:p text:style-name="P41"><text:tab/>X?X</text:p>
      <text:p text:style-name="P15"><text:span text:style-name="T131"><text:tab/>INI$</text:span> (Will only be valid if defined $ as character identifier)</text:p>
      <text:p text:style-name="P192"/>
      <text:p text:style-name="P167"><text:tab/>According to its location within a block delimiters can be:</text:p>
      <text:p text:style-name="P192"/>
      <text:list xml:id="list230305930678346" text:continue-numbering="true" text:style-name="WW8Num10">
        <text:list-item>
          <text:p text:style-name="P218"><text:span text:style-name="T130">Of start:</text:span> the delimiter is indicating the start of a block, for example /*.</text:p>
        </text:list-item>
        <text:list-item>
          <text:p text:style-name="P218"><text:span text:style-name="T130">Of end</text:span>: the delimiter indicates the end of a block, for example */.</text:p>
        </text:list-item>
        <text:list-item>
          <text:p text:style-name="P218"><text:span text:style-name="T130">Of Start and end</text:span>: the delimiter is used for both the start and the end of a block. Examples include the string delimiters.</text:p>
        </text:list-item>
      </text:list>
      <text:p text:style-name="P192"/>
      <text:p text:style-name="P167"><text:tab/>We can also classify delimiters by their similarity to other delimiters.</text:p>
      <text:p text:style-name="P15"/>
      <text:list xml:id="list230305437800972" text:continue-numbering="true" text:style-name="WW8Num10">
        <text:list-item>
          <text:p text:style-name="P218"><text:span text:style-name="T130">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218"><text:span text:style-name="T130">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87"/>
      <text:p text:style-name="P75">This classification is important to optimize the processing of the highlighter syntax. The less exclusive delimiters with syntax, the slower the processing will be done. </text:p>
      <text:list xml:id="list230304907964970" text:continue-list="list230305267357320" text:style-name="WW8Num24">
        <text:list-item>
          <text:list>
            <text:list-item>
              <text:h text:style-name="P250" text:outline-level="2"><text:bookmark-start text:name="__RefHeading___Toc404419465"/>Codeblocks<text:bookmark-end text:name="__RefHeading___Toc404419465"/></text:h>
            </text:list-item>
          </text:list>
        </text:list-item>
      </text:list>
      <text:p text:style-name="P75"/>
      <text:p text:style-name="P75">A powerful feature in this highlighter is the way it can handle code blocks. These not only allow us to create blocks of folding code, but also let us define special regions within the text.</text:p>
      <text:p text:style-name="P75"/>
      <text:p text:style-name="P75">A text block is a logical structure representing a range of text that is enclosed by special tokens (block delimiters).</text:p>
      <text:p text:style-name="P75"/>
      <text:p text:style-name="P75">Consider for example, the following code in C:</text:p>
      <text:p text:style-name="P193"/>
      <text:p text:style-name="P96">void main () </text:p>
      <text:p text:style-name="P96">{</text:p>
      <text:p text:style-name="P98"><text:span text:style-name="T3"><text:s text:c="4"/></text:span><text:span text:style-name="T2">for (int i = 2; i &lt;= 10; i ++)</text:span></text:p>
      <text:p text:style-name="P98"><text:span text:style-name="T3"><text:s text:c="4"/></text:span><text:span text:style-name="T2">{</text:span></text:p>
      <text:p text:style-name="P98"><text:span text:style-name="T3"><text:s text:c="8"/></text:span><text:span text:style-name="T2">fact = fact * i;</text:span></text:p>
      <text:p text:style-name="P98"><text:span text:style-name="T3"><text:s text:c="4"/></text:span><text:span text:style-name="T2">}</text:span></text:p>
      <text:p text:style-name="P96">}</text:p>
      <text:p text:style-name="P193"/>
      <text:p text:style-name="P158"><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128"><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59"/>
      <text:p text:style-name="P159">We could also consider the body of the "for" loop as another block, also delimited by braces. This would be a simple case of nested blocks.</text:p>
      <text:p text:style-name="P159"/>
      <text:p text:style-name="P159">Going further, we might consider part of "for", which is in brackets “( … )”, as another block.</text:p>
      <text:p text:style-name="P159"/>
      <text:p text:style-name="P159">The blocks can be single or multiple lines, although it is common that occupy more than one line.</text:p>
      <text:p text:style-name="P159"/>
      <text:p text:style-name="P159">These blocks can be defined within the highlighter as valid blocks. But to what end?</text:p>
      <text:p text:style-name="P159"/>
      <text:p text:style-name="P159">The first utility of the blocks is that they can be folded. This would be the main use of the blocks code in the highlighter. Not all blocks have to be foldable, but usually when using block code are to be foldable.</text:p>
      <text:p text:style-name="P159"/>
      <text:p text:style-name="P159"><text:soft-page-break/>But, looking a little more utility of blocks, we see that we could make them similar to syntactic blocks of language, so allow us to analyse higher level than simply extracting tokens.</text:p>
      <text:p text:style-name="P159"/>
      <text:p text:style-name="P159">The following rules apply to the blocks:</text:p>
      <text:p text:style-name="P159"/>
      <text:list xml:id="list5349711656924675192" text:style-name="WW8Num14">
        <text:list-item>
          <text:p text:style-name="P219">The blocks can be single or multiple lines.</text:p>
        </text:list-item>
        <text:list-item>
          <text:p text:style-name="P219">Blocks can be nested, but not overlap. An inner block always ends before (or simultaneously) the block containing it.</text:p>
        </text:list-item>
        <text:list-item>
          <text:p text:style-name="P219">Block delimiters are always tokens. You can not create blocks if their bounding are not clearly defined tokens.</text:p>
        </text:list-item>
        <text:list-item>
          <text:p text:style-name="P219">The blocks are defined using tokens. Can not begin or end in the middle of a token. Ie always contain a whole number of tokens. This is a consequence of the rule 3.</text:p>
        </text:list-item>
        <text:list-item>
          <text:p text:style-name="P219">By design issues, the block begins just after the starting delimiter. Ie does not include the initial token. </text:p>
        </text:list-item>
        <text:list-item>
          <text:p text:style-name="P219">The block extends to the end of the final delimiter. Ie including the end delimiter.</text:p>
        </text:list-item>
        <text:list-item>
          <text:p text:style-name="P219">The multi-line tokens can not be block delimiters.</text:p>
        </text:list-item>
        <text:list-item>
          <text:p text:style-name="P236"><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128"><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79"/>
      <text:p text:style-name="P159">The process of building blocks will be later described in detail.</text:p>
      <text:p text:style-name="P159"/>
      <text:p text:style-name="P159"/>
      <text:list xml:id="list230304941749957" text:continue-list="list230304907964970" text:style-name="WW8Num24">
        <text:list-item>
          <text:list>
            <text:list-item>
              <text:h text:style-name="P246"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174"/>
      <text:p text:style-name="P75">In addition to the blocks, the TSynFacilSyn highlighter introduces the concept of <text:span text:style-name="T130">sections</text:span>.</text:p>
      <text:p text:style-name="P75"/>
      <text:p text:style-name="P75">A section is a block of code that originates from a starting delimiter, and ends where another section begins or where the block containing it ends.</text:p>
      <text:p text:style-name="P75"/>
      <text:p text:style-name="P75">An example of sections are found in Pascal class definitions:</text:p>
      <text:p text:style-name="P75"/>
      <text:p text:style-name="P75"/>
      <text:p text:style-name="P75"/>
      <text:p text:style-name="P75"/>
      <text:p text:style-name="P75"><text:soft-page-break/></text:p>
      <text:p text:style-name="P81"><draw:frame draw:style-name="fr15" draw:name="Object10" text:anchor-type="char" svg:x="1.24cm" svg:y="0.367cm" svg:width="9.599cm" svg:height="5.711cm" draw:z-index="29"><draw:object-ole xlink:href="./Object 10" xlink:type="simple" xlink:show="embed" xlink:actuate="onLoad"/><draw:image xlink:href="./ObjectReplacements/Object 10" xlink:type="simple" xlink:show="embed" xlink:actuate="onLoad"/></draw:frame></text:p>
      <text:p text:style-name="P75"/>
      <text:p text:style-name="P75"/>
      <text:p text:style-name="P75"/>
      <text:p text:style-name="P99"/>
      <text:p text:style-name="P99"/>
      <text:p text:style-name="P99"/>
      <text:p text:style-name="P99"/>
      <text:p text:style-name="P99"/>
      <text:p text:style-name="P99"/>
      <text:p text:style-name="P99"/>
      <text:p text:style-name="P99"/>
      <text:p text:style-name="P75"/>
      <text:p text:style-name="P75">This code structure presents two clearly defined code blocks, the first is the one that starts with the label "private"; and the other is one that starts with the label "public".</text:p>
      <text:p text:style-name="P75"/>
      <text:p text:style-name="P75">These code blocks are special, because they have a defined boundary. May end when another block (similar or different) starts, or may also be terminated when the main block ends.</text:p>
      <text:p text:style-name="P75"/>
      <text:p text:style-name="P75">To handle such blocks, highlighter implements the concept of "sections". It is not convenient to handle as nested blocks, because they have a slightly different behaviour.</text:p>
      <text:p text:style-name="P75"/>
      <text:p text:style-name="P75">The same rules that apply to blocks, also apply to the "sections", except that:</text:p>
      <text:p text:style-name="P75"/>
      <text:list xml:id="list6265690853752454555" text:style-name="WW8Num11">
        <text:list-item>
          <text:p text:style-name="P220"><text:span text:style-name="T161">S</text:span>ections can <text:span text:style-name="T161">only be </text:span>nested <text:span text:style-name="T161">once</text:span>. A section can contain other sections, <text:span text:style-name="T161">but these sections cannot contain another sections</text:span>.</text:p>
        </text:list-item>
        <text:list-item>
          <text:p text:style-name="P220">A section can contain blocks.</text:p>
        </text:list-item>
        <text:list-item>
          <text:p text:style-name="P220">A section ends when another section or block, of the same level, begins.</text:p>
        </text:list-item>
        <text:list-item>
          <text:p text:style-name="P220">A section ends when the block that contains it ends.</text:p>
        </text:list-item>
        <text:list-item>
          <text:p text:style-name="P220">If a delimiter is delimiter section and block delimiter. His section delimiter feature <text:s/>takes precedence over its block delimiter feature.</text:p>
        </text:list-item>
      </text:list>
      <text:p text:style-name="P195"/>
      <text:p text:style-name="P75">Sections usually are enclosed within blocks:</text:p>
      <text:p text:style-name="P75"/>
      <text:p text:style-name="P91"><text:soft-page-break/><draw:frame draw:style-name="fr16" draw:name="Object11" text:anchor-type="as-char" svg:width="10.333cm" svg:height="5.68cm" draw:z-index="8"><draw:object-ole xlink:href="./Object 11" xlink:type="simple" xlink:show="embed" xlink:actuate="onLoad"/><draw:image xlink:href="./ObjectReplacements/Object 11" xlink:type="simple" xlink:show="embed" xlink:actuate="onLoad"/></draw:frame></text:p>
      <text:p text:style-name="P75"/>
      <text:p text:style-name="P75">By definition, sections ends before another section begins, or when the block that contains it ends. Thus, the "public" Example section does not include the token "end", which, however, it is part of the block.</text:p>
      <text:p text:style-name="P75"/>
      <text:p text:style-name="P75">Despite the special treatment there, sections are basically blocks. They internally do share the same data structure and only differ by one flag. So when we talk about sections, we often refer to them as blocks.</text:p>
      <text:p text:style-name="P75"/>
      <text:p text:style-name="P159">Creation of sections will be described in detail later.</text:p>
      <text:p text:style-name="P193"/>
      <text:list xml:id="list230306020683064" text:continue-list="list230304941749957" text:style-name="WW8Num24">
        <text:list-item>
          <text:list>
            <text:list-item>
              <text:h text:style-name="P246" text:outline-level="2"><text:bookmark-start text:name="__RefHeading___Toc404419467"/>Lexical, syntactic and semantic levels<text:bookmark-end text:name="__RefHeading___Toc404419467"/></text:h>
            </text:list-item>
          </text:list>
        </text:list-item>
      </text:list>
      <text:p text:style-name="P15"/>
      <text:p text:style-name="P75">In the analysis of languages, for the purpose of processing by interpreters or compilers, usually separate levels of detail. Generally, the levels usually accept are:</text:p>
      <text:p text:style-name="P75"/>
      <text:list xml:id="list8979319090707842219" text:style-name="WW8Num17">
        <text:list-item>
          <text:p text:style-name="P221"><text:span text:style-name="T130">Lexical:</text:span> Referred to the identification and removal of tokens of a text, from the characters. Primarily used as the base level for parsing.</text:p>
        </text:list-item>
        <text:list-item>
          <text:p text:style-name="P221"><text:span text:style-name="T130">Syntactic</text:span>.- Use the tokens to form structures according to predefined rules (grammar). They tend to identify more complex elements such as Running, Variable, Constant, expressions, etc. </text:p>
        </text:list-item>
        <text:list-item>
          <text:p text:style-name="P221"><text:span text:style-name="T130">Semantic</text:span>.- It is based on higher level rules applied to a language. Gives meaning to expressions or sentences of the code. A code can be syntactically valid, but be semantically incorrect.</text:p>
        </text:list-item>
      </text:list>
      <text:p text:style-name="P75"/>
      <text:p text:style-name="P75">Speaking of a highlighter, usually understood as a machine to identify tokens and to assign attributes of color, background, font, etc.</text:p>
      <text:p text:style-name="P75"/>
      <text:p text:style-name="P75"><text:soft-page-break/>The highlighter TSynFacilSyn, is designed to be an efficient extractor mechanism for tokens. In this sense it is also what is called a lexical analyser or lexer.</text:p>
      <text:p text:style-name="P75"/>
      <text:p text:style-name="P75">TSynFacilSyn however, goes further because it allows handling code blocks that move in the syntactic level.</text:p>
      <text:p text:style-name="P75"/>
      <text:p text:style-name="P75">If we only use the highlighter to extract tokens, we are definitely moving in the lexical level, but managing blocks of code allows us to come closer to the syntactic level.</text:p>
      <text:p text:style-name="P75"/>
      <text:p text:style-name="P75">Therefore, to define blocks in our language, we must bear in mind not only the folding support we want to give the text but also what these should be according to the syntax of the language which we are working with.</text:p>
      <text:p text:style-name="P174"/>
      <text:list xml:id="list230305026364642" text:continue-list="list230306020683064" text:style-name="WW8Num24">
        <text:list-item>
          <text:h text:style-name="P244" text:outline-level="1"><text:bookmark-start text:name="__RefHeading___Toc404419468"/>Configuring Syntax using an external file.<text:bookmark-end text:name="__RefHeading___Toc404419468"/></text:h>
        </text:list-item>
      </text:list>
      <text:p text:style-name="P15"/>
      <text:p text:style-name="P75">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5">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17"><text:span text:style-name="T11">uses </text:span><text:span text:style-name="T26">..., SynFacilHighlighter</text:span><text:span text:style-name="T79">;</text:span></text:p>
      <text:p text:style-name="P123"/>
      <text:p text:style-name="P127">var</text:p>
      <text:p text:style-name="P117"><text:span text:style-name="T38"><text:s text:c="4"/></text:span><text:span text:style-name="T26">hlt </text:span><text:span text:style-name="T79">:</text:span><text:span text:style-name="T26"> TSynFacilSyn</text:span><text:span text:style-name="T79">;</text:span></text:p>
      <text:p text:style-name="P123"/>
      <text:p text:style-name="P125">...</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highlighter</text:span></text:p>
      <text:p text:style-name="P117"><text:span text:style-name="T38"><text:s text:c="2"/></text:span><text:span text:style-name="T26">editor.Highlighter </text:span><text:span text:style-name="T79">: =</text:span><text:span text:style-name="T26"> hlt</text:span><text:span text:style-name="T79">;</text:span></text:p>
      <text:p text:style-name="P117"><text:span text:style-name="T38"><text:s text:c="2"/></text:span><text:span text:style-name="T26">hlt.LoadFromFile</text:span><text:span text:style-name="T79">(</text:span><text:span text:style-name="T114">'SynPHP.xml'</text:span><text:span text:style-name="T79">);</text:span><text:span text:style-name="T26"> </text:span><text:span text:style-name="T92">//</text:span><text:span text:style-name="T96">Load file syntax</text:span></text:p>
      <text:p text:style-name="P117"><text:span text:style-name="T38"><text:s text:c="2"/></text:span><text:span text:style-name="T26">editor.Invalidate</text:span><text:span text:style-name="T79">;</text:span></text:p>
      <text:p text:style-name="P125">...</text:p>
      <text:p text:style-name="P117"><text:span text:style-name="T38"><text:s text:c="2"/></text:span><text:span text:style-name="T26">htl.Free</text:span><text:span text:style-name="T79">;</text:span><text:span text:style-name="T26"> </text:span><text:span text:style-name="T92">//</text:span><text:span text:style-name="T96">Free </text:span></text:p>
      <text:p text:style-name="P123"/>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136"><text:tab/>It is advisable to include exception handling routines, for errors when loading the syntax file.</text:span> </text:p>
      <text:p text:style-name="P15"/>
      <text:list xml:id="list230304337744684" text:continue-numbering="true" text:style-name="WW8Num24">
        <text:list-item>
          <text:list>
            <text:list-item>
              <text:h text:style-name="P246" text:outline-level="2"><text:bookmark-start text:name="__RefHeading___Toc404419469"/>The syntax file<text:bookmark-end text:name="__RefHeading___Toc404419469"/></text:h>
            </text:list-item>
          </text:list>
        </text:list-item>
      </text:list>
      <text:p text:style-name="P15"/>
      <text:p text:style-name="P75">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18"><text:span text:style-name="T79">&lt;</text:span><text:span text:style-name="T11">Language </text:span><text:span text:style-name="T26">name</text:span><text:span text:style-name="T79">=</text:span><text:span text:style-name="T114">"Php"</text:span><text:span text:style-name="T26"> ext</text:span><text:span text:style-name="T79">=</text:span><text:span text:style-name="T114">"Php"</text:span><text:span text:style-name="T79">&gt;</text:span></text:p>
      <text:p text:style-name="P118"><text:span text:style-name="T38"><text:s text:c="2"/></text:span><text:span text:style-name="T79">&lt;</text:span><text:span text:style-name="T11">Keywords</text:span><text:span text:style-name="T79">&gt;</text:span><text:span text:style-name="T26"> </text:span></text:p>
      <text:p text:style-name="P124">array and break case class const continue default do double echo die</text:p>
      <text:p text:style-name="P124">endfor endif elseif else endswitch empty eval exit extends endwhile </text:p>
      <text:p text:style-name="P124">false float for global function if isset include int integer list </text:p>
      <text:p text:style-name="P124">new object old_function actual print or require return show_source </text:p>
      <text:p text:style-name="P118"><text:span text:style-name="T26">static </text:span><text:span text:style-name="T11">string </text:span><text:span text:style-name="T26">unset var switch while true xor </text:span></text:p>
      <text:p text:style-name="P118"><text:span text:style-name="T38"><text:s/></text:span><text:span text:style-name="T79">&lt;/</text:span><text:span text:style-name="T11">Keywords</text:span><text:span text:style-name="T79">&gt;</text:span></text:p>
      <text:p text:style-name="P118"><text:span text:style-name="T79">&lt;/</text:span><text:span text:style-name="T11">Language</text:span><text:span text:style-name="T79">&gt;</text:span></text:p>
      <text:p text:style-name="P15"/>
      <text:p text:style-name="P75">In this case, the definition of identifiers is not specified, and a default definition is assumed. </text:p>
      <text:p text:style-name="P75"/>
      <text:p text:style-name="P75">This example only defines reserved words in the &lt;Keywords&gt; label. The list of words given can be specified in one or more lines, provided that only spaces or line breaks are used to separate words.</text:p>
      <text:p text:style-name="P75"/>
      <text:list xml:id="list230304812704068" text:continue-numbering="true" text:style-name="WW8Num24">
        <text:list-item>
          <text:list>
            <text:list-item>
              <text:list>
                <text:list-item>
                  <text:h text:style-name="P256" text:outline-level="3"><text:bookmark-start text:name="__RefHeading___Toc404419470"/>Special Characters<text:bookmark-end text:name="__RefHeading___Toc404419470"/></text:h>
                </text:list-item>
              </text:list>
            </text:list-item>
          </text:list>
        </text:list-item>
      </text:list>
      <text:p text:style-name="P193"/>
      <text:p text:style-name="P159">Like any XML file, the syntax file requires to take into account considerations of characters that can be included. </text:p>
      <text:p text:style-name="P159"/>
      <text:p text:style-name="P159"><text:soft-page-break/></text:p>
      <text:p text:style-name="P159">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5">Start = "&lt;"</text:p>
      <text:p text:style-name="P75"/>
      <text:p text:style-name="P75">It is not valid to define a field in XML form. Should be used instead:</text:p>
      <text:p text:style-name="P75"/>
      <text:p text:style-name="P75">Start = "&amp;lt;"</text:p>
      <text:p text:style-name="P75"/>
      <text:p text:style-name="P75">You can also use the form:</text:p>
      <text:p text:style-name="P15"/>
      <text:p text:style-name="P75">&amp;#&lt;ASCII character code&gt;;</text:p>
      <text:p text:style-name="P199"/>
      <text:p text:style-name="P75">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5"/>
      <text:list xml:id="list230305335488644" text:continue-numbering="true" text:style-name="WW8Num24">
        <text:list-item>
          <text:list>
            <text:list-item>
              <text:list>
                <text:list-item>
                  <text:h text:style-name="P256"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59">The following intervals are examples of simplified spellings:</text:p>
      <text:p text:style-name="P15"/>
      <text:p text:style-name="P159">A..Z = ABCDEFGHIJKLMNOPQRSTUVWXYZ</text:p>
      <text:p text:style-name="P159">a..z = abcdefghijklmnopqrstuvwxyz</text:p>
      <text:p text:style-name="P159">0..9 = 0123456789</text:p>
      <text:p text:style-name="P159"><text:soft-page-break/>a..f = abcdef</text:p>
      <text:p text:style-name="P159"/>
      <text:p text:style-name="P159">For example if you want to simplify this statement:</text:p>
      <text:p text:style-name="P159"/>
      <text:p text:style-name="P159">Start = "ABCDEFGHIJKLMNOPQRSTUVWXYZabcdefghijklmnopqrstuvwxyz"</text:p>
      <text:p text:style-name="P159"/>
      <text:p text:style-name="P159">You can use the short form:</text:p>
      <text:p text:style-name="P159"/>
      <text:p text:style-name="P159">Start = "A..Za..z"</text:p>
      <text:p text:style-name="P159"/>
      <text:p text:style-name="P159">There is additionally two predefined wildcards:</text:p>
      <text:p text:style-name="P159"/>
      <text:p text:style-name="P159">%HIGH%<text:tab/>-&gt; ASCII characters from # 128 to # 255 (not implemented)</text:p>
      <text:p text:style-name="P159">%ALL%<text:tab/><text:tab/>-&gt; All characters except # 0.</text:p>
      <text:p text:style-name="P15"/>
      <text:p text:style-name="P15"><text:tab/>Managing intervals and wildcards are not part of standard XML, but are interpreted by the highlighter own.</text:p>
      <text:p text:style-name="P15"/>
      <text:list xml:id="list230304786033660" text:continue-numbering="true" text:style-name="WW8Num24">
        <text:list-item>
          <text:list>
            <text:list-item>
              <text:list>
                <text:list-item>
                  <text:h text:style-name="P256" text:outline-level="3"><text:bookmark-start text:name="__RefHeading___Toc404419472"/>Using simplified forms<text:bookmark-end text:name="__RefHeading___Toc404419472"/></text:h>
                </text:list-item>
              </text:list>
            </text:list-item>
          </text:list>
        </text:list-item>
      </text:list>
      <text:p text:style-name="P15"/>
      <text:p text:style-name="P187">Most definitions in the syntax file will be of type:</text:p>
      <text:p text:style-name="P187"/>
      <text:p text:style-name="P189"><text:span text:style-name="T79">&lt;</text:span><text:span text:style-name="T11">token </text:span><text:span text:style-name="T26">attribute</text:span><text:span text:style-name="T79">=</text:span><text:span text:style-name="T26">"Attribute_name" value1</text:span><text:span text:style-name="T79">=</text:span><text:span text:style-name="T26">"XXX" value2</text:span><text:span text:style-name="T79">=</text:span><text:span text:style-name="T26">"YYY" ... </text:span><text:span text:style-name="T79">&gt;&lt;/</text:span><text:span text:style-name="T11">token</text:span><text:span text:style-name="T79">&gt;</text:span></text:p>
      <text:p text:style-name="P187"/>
      <text:p text:style-name="P187">To avoid typing too much text, the simplified form is allowed:</text:p>
      <text:p text:style-name="P187"/>
      <text:p text:style-name="P189"><text:span text:style-name="T79">&lt;</text:span><text:span text:style-name="T26">Attribute_name value1</text:span><text:span text:style-name="T79">=</text:span><text:span text:style-name="T26">"XXX" value2</text:span><text:span text:style-name="T79">=</text:span><text:span text:style-name="T26">"YYY" ... </text:span><text:span text:style-name="T79">&gt;&lt;/</text:span><text:span text:style-name="T26">Attribute_name</text:span><text:span text:style-name="T79">&gt;</text:span></text:p>
      <text:p text:style-name="P187"/>
      <text:p text:style-name="P75">This means that the attribute name as a label or marker is used, and thus, it is no longer necessary to specify the attribute.</text:p>
      <text:p text:style-name="P75"/>
      <text:p text:style-name="P75">Another simplified forms, is when you do not want to change the attributes of a label. If such a definition has the form:</text:p>
      <text:p text:style-name="P15"/>
      <text:p text:style-name="P189"><text:span text:style-name="T79">&lt;</text:span><text:span text:style-name="T26">LABEL value1</text:span><text:span text:style-name="T79">=</text:span><text:span text:style-name="T114">"XXX"</text:span><text:span text:style-name="T26"> value2</text:span><text:span text:style-name="T79">=</text:span><text:span text:style-name="T114">"YYY"</text:span><text:span text:style-name="T26"> </text:span><text:span text:style-name="T79">&gt;&lt;/</text:span><text:span text:style-name="T26">LABEL</text:span><text:span text:style-name="T79">&gt;</text:span></text:p>
      <text:p text:style-name="P15"/>
      <text:p text:style-name="P15"><text:tab/>If we write the definition in its simplified form:</text:p>
      <text:p text:style-name="P15"/>
      <text:p text:style-name="P189"><text:soft-page-break/><text:span text:style-name="T79">&lt;</text:span><text:span text:style-name="T26">LABEL</text:span><text:span text:style-name="T79">&gt;</text:span></text:p>
      <text:p text:style-name="P189"><text:span text:style-name="T79">&lt;/</text:span><text:span text:style-name="T26">LABEL</text:span><text:span text:style-name="T79">&gt;</text:span></text:p>
      <text:p text:style-name="P15"/>
      <text:p text:style-name="P37"><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230304006714103" text:continue-numbering="true" text:style-name="WW8Num24">
        <text:list-item>
          <text:list>
            <text:list-item>
              <text:list>
                <text:list-item>
                  <text:h text:style-name="P256" text:outline-level="3"><text:bookmark-start text:name="__RefHeading___Toc404419473"/>Using spaces, case sensitive.<text:bookmark-end text:name="__RefHeading___Toc404419473"/></text:h>
                </text:list-item>
              </text:list>
            </text:list-item>
          </text:list>
        </text:list-item>
      </text:list>
      <text:p text:style-name="P15"/>
      <text:p text:style-name="P75">Blank spaces and line breaks are ignored in the definition of a language. For example, The following definitions are equivalent:</text:p>
      <text:p text:style-name="P75"/>
      <text:p text:style-name="P189"><text:span text:style-name="T79">&lt;</text:span><text:span text:style-name="T26">LABEL value1</text:span><text:span text:style-name="T79">=</text:span><text:span text:style-name="T114">"XXX"</text:span><text:span text:style-name="T26"> value2</text:span><text:span text:style-name="T79">=</text:span><text:span text:style-name="T114">"YYY"</text:span><text:span text:style-name="T26"> </text:span><text:span text:style-name="T79">&gt; &lt;/</text:span><text:span text:style-name="T26">LABEL</text:span><text:span text:style-name="T79">&gt;</text:span></text:p>
      <text:p text:style-name="P75"/>
      <text:p text:style-name="P189"><text:span text:style-name="T79">&lt;</text:span><text:span text:style-name="T26">LABEL value1</text:span><text:span text:style-name="T79">=</text:span><text:span text:style-name="T114">"XXX"</text:span><text:span text:style-name="T26"> value2</text:span><text:span text:style-name="T79">=</text:span><text:span text:style-name="T114">"YYY"</text:span><text:span text:style-name="T26"> </text:span><text:span text:style-name="T79">&gt;</text:span></text:p>
      <text:p text:style-name="P189"><text:span text:style-name="T79">&lt;/</text:span><text:span text:style-name="T26">LABEL</text:span><text:span text:style-name="T79">&gt;</text:span></text:p>
      <text:p text:style-name="P75"/>
      <text:p text:style-name="P189"><text:span text:style-name="T79">&lt;</text:span><text:span text:style-name="T26">LABEL value1</text:span><text:span text:style-name="T79">=</text:span><text:span text:style-name="T114">"XXX"</text:span><text:span text:style-name="T26"> </text:span></text:p>
      <text:p text:style-name="P189"><text:span text:style-name="T26">value2</text:span><text:span text:style-name="T79">=</text:span><text:span text:style-name="T114">"YYY"</text:span><text:span text:style-name="T26"> </text:span><text:span text:style-name="T79">&gt;</text:span></text:p>
      <text:p text:style-name="P189"><text:span text:style-name="T79">&lt;/</text:span><text:span text:style-name="T26">LABEL</text:span><text:span text:style-name="T79">&gt;</text:span></text:p>
      <text:p text:style-name="P75"/>
      <text:p text:style-name="P75">Although XML is case sensitive by definition, the highlighter is not case sensitive. For example, the following definitions are similar.</text:p>
      <text:p text:style-name="P187"/>
      <text:p text:style-name="P189"><text:span text:style-name="T79">&lt;</text:span><text:span text:style-name="T46">label </text:span><text:span text:style-name="T26">Value1</text:span><text:span text:style-name="T79">=</text:span><text:span text:style-name="T114">"XXX"</text:span><text:span text:style-name="T26"> Value2</text:span><text:span text:style-name="T79">=</text:span><text:span text:style-name="T114">"YYY"</text:span><text:span text:style-name="T26"> </text:span><text:span text:style-name="T79">&gt;</text:span></text:p>
      <text:p text:style-name="P189"><text:span text:style-name="T79">&lt;/</text:span><text:span text:style-name="T26">label</text:span><text:span text:style-name="T79">&gt;</text:span></text:p>
      <text:p text:style-name="P15"/>
      <text:p text:style-name="P189"><text:span text:style-name="T79">&lt;</text:span><text:span text:style-name="T46">Label</text:span><text:span text:style-name="T26"> value1</text:span><text:span text:style-name="T79">=</text:span><text:span text:style-name="T114">"XXX"</text:span><text:span text:style-name="T26"> value2</text:span><text:span text:style-name="T79">=</text:span><text:span text:style-name="T114">"YYY"</text:span><text:span text:style-name="T26"> </text:span><text:span text:style-name="T79">&gt;</text:span></text:p>
      <text:p text:style-name="P189"><text:span text:style-name="T79">&lt;/</text:span><text:span text:style-name="T26">Label </text:span><text:span text:style-name="T79">&gt;</text:span></text:p>
      <text:p text:style-name="P15"/>
      <text:p text:style-name="P189"><text:span text:style-name="T79">&lt;</text:span><text:span text:style-name="T26">LABEL VALUE1</text:span><text:span text:style-name="T79">=</text:span><text:span text:style-name="T114">"XXX"</text:span><text:span text:style-name="T26"> VALUE2</text:span><text:span text:style-name="T79">=</text:span><text:span text:style-name="T114">"YYY"</text:span><text:span text:style-name="T26"> </text:span><text:span text:style-name="T79">&gt;</text:span></text:p>
      <text:p text:style-name="P189"><text:span text:style-name="T79">&lt;/</text:span><text:span text:style-name="T26">LABEL</text:span><text:span text:style-name="T79">&gt;</text:span></text:p>
      <text:p text:style-name="P15"/>
      <text:p text:style-name="P15"><text:tab/>However, by definition of XML, the start and end tag must match the case. The following statement is an error: </text:p>
      <text:p text:style-name="P15"/>
      <text:p text:style-name="P189"><text:span text:style-name="T79">&lt;</text:span><text:span text:style-name="T26">Label Value1</text:span><text:span text:style-name="T79">=</text:span><text:span text:style-name="T114">"XXX"</text:span><text:span text:style-name="T26"> Value2</text:span><text:span text:style-name="T79">=</text:span><text:span text:style-name="T114">"YYY"</text:span><text:span text:style-name="T26"> </text:span><text:span text:style-name="T79">&gt;</text:span></text:p>
      <text:p text:style-name="P190"><draw:custom-shape text:anchor-type="char" draw:z-index="27" draw:style-name="gr3" draw:text-style-name="P268"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9"><text:span text:style-name="T79">&lt;/</text:span><text:span text:style-name="T26">label</text:span><text:span text:style-name="T79">&gt;</text:span></text:p>
      <text:p text:style-name="P15"><text:soft-page-break/></text:p>
      <text:list xml:id="list230305952025688" text:continue-numbering="true" text:style-name="WW8Num24">
        <text:list-item>
          <text:list>
            <text:list-item>
              <text:list>
                <text:list-item>
                  <text:h text:style-name="P256" text:outline-level="3"><text:bookmark-start text:name="__RefHeading___Toc404419474"/>Colors in the XML file<text:bookmark-end text:name="__RefHeading___Toc404419474"/></text:h>
                </text:list-item>
              </text:list>
            </text:list-item>
          </text:list>
        </text:list-item>
      </text:list>
      <text:p text:style-name="P15"/>
      <text:p text:style-name="P75">The colors are defined by typing in #RRGGBB where format:</text:p>
      <text:p text:style-name="P75"/>
      <text:list xml:id="list5148286183190240411" text:style-name="WW8Num3">
        <text:list-item>
          <text:p text:style-name="P222">RR is the red component in hexadecimal format.</text:p>
        </text:list-item>
        <text:list-item>
          <text:p text:style-name="P222">GG is the green component in hexadecimal format.</text:p>
        </text:list-item>
        <text:list-item>
          <text:p text:style-name="P222">BB is the blue component in hexadecimal format.</text:p>
        </text:list-item>
      </text:list>
      <text:p text:style-name="P75"/>
      <text:p text:style-name="P179">For example to define the background of blue as an attribute, use: </text:p>
      <text:p text:style-name="P179"/>
      <text:p text:style-name="P194"><text:span text:style-name="T80"><text:s/></text:span><text:span text:style-name="T79">&lt;</text:span><text:span text:style-name="T26">Attribute Name</text:span><text:span text:style-name="T79">=</text:span><text:span text:style-name="T114">"Identifier"</text:span><text:span text:style-name="T26"> ForeCol</text:span><text:span text:style-name="T79">=</text:span><text:span text:style-name="T114">"#0000FF"</text:span><text:span text:style-name="T79">&gt;</text:span><text:span text:style-name="T38"> </text:span><text:span text:style-name="T79">&lt;/</text:span><text:span text:style-name="T26">Attribute</text:span><text:span text:style-name="T79">&gt;</text:span></text:p>
      <text:p text:style-name="P15"/>
      <text:p text:style-name="P15"><text:tab/>There are however some predefined constants that can be used instead of using this format. Thus, the previous sentence can also be written as:</text:p>
      <text:p text:style-name="P15"/>
      <text:p text:style-name="P194"><text:span text:style-name="T79">&lt;</text:span><text:span text:style-name="T26">Attribute Name</text:span><text:span text:style-name="T79">=</text:span><text:span text:style-name="T114">"Identifier"</text:span><text:span text:style-name="T26"> ForeCol</text:span><text:span text:style-name="T79">=</text:span><text:span text:style-name="T114">"Blue"</text:span><text:span text:style-name="T79">&gt;&lt;/</text:span><text:span text:style-name="T26">Attribute</text:span><text:span text:style-name="T79">&gt;</text:span></text:p>
      <text:p text:style-name="P15"/>
      <text:p text:style-name="P159">The constants supported are:</text:p>
      <text:p text:style-name="P159"/>
      <text:p text:style-name="P166">WHITE      =$FFFFFF</text:p>
      <text:p text:style-name="P65">SILVER     =$C0C0C0</text:p>
      <text:p text:style-name="P65">GRAY       =$808080</text:p>
      <text:p text:style-name="P65">BLACK      =$000000</text:p>
      <text:p text:style-name="P65">RED        =$FF0000</text:p>
      <text:p text:style-name="P65">MAROON     =$800000</text:p>
      <text:p text:style-name="P65">YELLOW     =$FFFF00</text:p>
      <text:p text:style-name="P65">OLIVE      =$808000</text:p>
      <text:p text:style-name="P65">LIME       =$00FF00</text:p>
      <text:p text:style-name="P65">GREEN      =$008000</text:p>
      <text:p text:style-name="P65">AQUA       =$00FFFF</text:p>
      <text:p text:style-name="P65">TEAL       =$008080</text:p>
      <text:p text:style-name="P65">BLUE       =$0000FF</text:p>
      <text:p text:style-name="P65">NAVY       =$000080</text:p>
      <text:p text:style-name="P65">FUCHSIA    =$FF00FF</text:p>
      <text:p text:style-name="P65">PURPLE     =$800080</text:p>
      <text:p text:style-name="P65">MAGENTA    =$FF00FF</text:p>
      <text:p text:style-name="P65">CYAN       =$00FFFF</text:p>
      <text:p text:style-name="P65">BLUE VIOLET=$8A2BE2</text:p>
      <text:p text:style-name="P65"><text:soft-page-break/>GOLD       =$FFD700</text:p>
      <text:p text:style-name="P65">BROWN      =$A52A2A</text:p>
      <text:p text:style-name="P65">CORAL      =$FF7F50</text:p>
      <text:p text:style-name="P65">VIOLET     =$EE82EE</text:p>
      <text:p text:style-name="P159"/>
      <text:list xml:id="list230304419433955" text:continue-list="list230305952025688" text:style-name="WW8Num24">
        <text:list-item>
          <text:list>
            <text:list-item>
              <text:list>
                <text:list-item>
                  <text:h text:style-name="P256"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18"><text:span text:style-name="T79">&lt;</text:span><text:span text:style-name="T26">? Xml version</text:span><text:span text:style-name="T79">=</text:span><text:span text:style-name="T114">"1.0"</text:span><text:span text:style-name="T26">?</text:span><text:span text:style-name="T79">&gt;</text:span></text:p>
      <text:p text:style-name="P118"><text:span text:style-name="T79">&lt;</text:span><text:span text:style-name="T26">!</text:span><text:span text:style-name="T92">--</text:span></text:p>
      <text:p text:style-name="P133">This is a comment</text:p>
      <text:p text:style-name="P133">--&gt;</text:p>
      <text:p text:style-name="P15"/>
      <text:p text:style-name="P75">Be careful with the combination of characters: --&gt; Or "--"&gt; because they are considered as XML comment delimiter.</text:p>
      <text:p text:style-name="P15"><text:tab/></text:p>
      <text:list xml:id="list230305437519457" text:continue-numbering="true" text:style-name="WW8Num24">
        <text:list-item>
          <text:list>
            <text:list-item>
              <text:h text:style-name="P251" text:outline-level="2"><text:bookmark-start text:name="__RefHeading___Toc404419476"/>Language Definition <text:bookmark-end text:name="__RefHeading___Toc404419476"/></text:h>
            </text:list-item>
          </text:list>
        </text:list-item>
      </text:list>
      <text:p text:style-name="P159"/>
      <text:p text:style-name="P159">The main tag &lt;Language&gt; supports the following attributes:</text:p>
      <text:p text:style-name="P15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59"/>
      <text:p text:style-name="P159">There can be only one definition language file.</text:p>
      <text:p text:style-name="P159"/>
      <text:p text:style-name="P159">A minimum definition of typical language would be:</text:p>
      <text:p text:style-name="P159"/>
      <text:p text:style-name="P118"><text:span text:style-name="T79">&lt;</text:span><text:span text:style-name="T11">Language </text:span><text:span text:style-name="T26">name</text:span><text:span text:style-name="T79">=</text:span><text:span text:style-name="T114">"Pascal"</text:span><text:span text:style-name="T79">&gt;&lt;/</text:span><text:span text:style-name="T11">Language</text:span><text:span text:style-name="T79">&gt;</text:span></text:p>
      <text:p text:style-name="P159"/>
      <text:p text:style-name="P159">Another definition language could be:</text:p>
      <text:p text:style-name="P159"/>
      <text:p text:style-name="P118"><text:span text:style-name="T79">&lt;</text:span><text:span text:style-name="T11">Language </text:span><text:span text:style-name="T26">name</text:span><text:span text:style-name="T79">=</text:span><text:span text:style-name="T114">"Php"</text:span><text:span text:style-name="T26"> ext</text:span><text:span text:style-name="T79">=</text:span><text:span text:style-name="T114">"php3 php phtml"</text:span><text:span text:style-name="T79">&gt;&lt;/</text:span><text:span text:style-name="T11">Language</text:span><text:span text:style-name="T79">&gt;</text:span></text:p>
      <text:p text:style-name="P159"/>
      <text:p text:style-name="P159">Both examples are empty definitions, but the framework in which all definitions of language must be created.</text:p>
      <text:p text:style-name="P159"/>
      <text:p text:style-name="P159">If the "CaseSensitive" attribute is not specified, it is assumed to be false, ie there will be case-sensitive. To activate, you must assign the string "TRUE":</text:p>
      <text:p text:style-name="P159"/>
      <text:p text:style-name="P118"><text:span text:style-name="T79">&lt;</text:span><text:span text:style-name="T11">Language </text:span><text:span text:style-name="T26">name</text:span><text:span text:style-name="T79">=</text:span><text:span text:style-name="T114">"Pascal"</text:span><text:span text:style-name="T26"> ext</text:span><text:span text:style-name="T79">=</text:span><text:span text:style-name="T114">"pas pp"</text:span><text:span text:style-name="T26"> CaseSensitive</text:span><text:span text:style-name="T79">=</text:span><text:span text:style-name="T114">"TRUE"</text:span><text:span text:style-name="T79">&gt;&lt;/</text:span><text:span text:style-name="T11">Language</text:span><text:span text:style-name="T79">&gt;</text:span></text:p>
      <text:p text:style-name="P159"/>
      <text:p text:style-name="P159">The "ColorBlock" parameter allows to display blocks with a different background color according to the value it contains. The values ​​that can take are:</text:p>
      <text:p text:style-name="P159"/>
      <text:p text:style-name="P159"/>
      <table:table table:name="Table6" table:style-name="Table6">
        <table:table-column table:style-name="Table6.A"/>
        <table:table-column table:style-name="Table6.B"/>
        <table:table-row table:style-name="Table6.1">
          <table:table-cell table:style-name="Table6.A1" office:value-type="string">
            <text:p text:style-name="P37"><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7"><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7"><text:span text:style-name="T3">"</text:span><text:span text:style-name="T2">Block"</text:span></text:p>
          </table:table-cell>
          <table:table-cell table:style-name="Table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59"><text:soft-page-break/></text:p>
      <text:p text:style-name="P159">The following definition is an example of how to activate the colored blocks by level:</text:p>
      <text:p text:style-name="P159"/>
      <text:p text:style-name="P118"><text:span text:style-name="T79">&lt;</text:span><text:span text:style-name="T11">Language </text:span><text:span text:style-name="T26">name</text:span><text:span text:style-name="T79">=</text:span><text:span text:style-name="T114">"Php"</text:span><text:span text:style-name="T26"> ext</text:span><text:span text:style-name="T79">=</text:span><text:span text:style-name="T114">"Php3 php phtml"</text:span><text:span text:style-name="T26"> ColorBlock</text:span><text:span text:style-name="T79">=</text:span><text:span text:style-name="T114">"Level"</text:span><text:span text:style-name="T79">&gt;&lt;/</text:span><text:span text:style-name="T11">Language</text:span><text:span text:style-name="T79">&gt;</text:span></text:p>
      <text:p text:style-name="P159"/>
      <text:p text:style-name="P160"><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59"/>
      <text:p text:style-name="P164">It's also possible to include a sample code , using the label &lt;SAMPLE&gt;:</text:p>
      <text:p text:style-name="P62"> </text:p>
      <text:p text:style-name="P147"><text:span text:style-name="T83">&lt;</text:span><text:span text:style-name="T16">Language </text:span><text:span text:style-name="T56">name</text:span><text:span text:style-name="T83">=</text:span><text:span text:style-name="T118">"Pascal"</text:span><text:span text:style-name="T24"> </text:span><text:span text:style-name="T56">ext</text:span><text:span text:style-name="T83">=</text:span><text:span text:style-name="T118">"pas"</text:span><text:span text:style-name="T83">&gt;</text:span></text:p>
      <text:p text:style-name="P147"><text:span text:style-name="T83">&lt;</text:span><text:span text:style-name="T16">Sample</text:span><text:span text:style-name="T83">&gt;</text:span></text:p>
      <text:p text:style-name="P147"><text:span text:style-name="T24">  </text:span><text:span text:style-name="T56">procedure test</text:span><text:span text:style-name="T83">(</text:span><text:span text:style-name="T56">var x</text:span><text:span text:style-name="T83">:</text:span><text:span text:style-name="T24"> </text:span><text:span text:style-name="T56">byte</text:span><text:span text:style-name="T83">);</text:span></text:p>
      <text:p text:style-name="P141">  <text:span text:style-name="T138">begin</text:span></text:p>
      <text:p text:style-name="P147"><text:span text:style-name="T24">    </text:span><text:span text:style-name="T56">x </text:span><text:span text:style-name="T83">:=</text:span><text:span text:style-name="T24"> </text:span><text:span text:style-name="T56">x </text:span><text:span text:style-name="T83">+</text:span><text:span text:style-name="T56">1</text:span><text:span text:style-name="T83">;</text:span></text:p>
      <text:p text:style-name="P147"><text:span text:style-name="T24">  </text:span><text:span text:style-name="T16">end</text:span><text:span text:style-name="T83">;</text:span></text:p>
      <text:p text:style-name="P147"><text:span text:style-name="T83">&lt;/</text:span><text:span text:style-name="T16">Sample</text:span><text:span text:style-name="T83">&gt;</text:span></text:p>
      <text:p text:style-name="P147"><text:span text:style-name="T83">&lt;/</text:span><text:span text:style-name="T16">Language</text:span><text:span text:style-name="T83">&gt;</text:span></text:p>
      <text:p text:style-name="P62"> </text:p>
      <text:p text:style-name="P49"><text:tab/>The sample text, can be later accessed from the highlighterm using the property “SampleSource”.</text:p>
      <text:p text:style-name="P159"/>
      <text:list xml:id="list230304213256964" text:continue-numbering="true" text:style-name="WW8Num24">
        <text:list-item>
          <text:list>
            <text:list-item>
              <text:h text:style-name="P246"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15"/>
      <text:p text:style-name="P75">The attributes of the tokens, you can configure or create from within the XML file, so you can fully define the look you have each of the categories of tokens within the highlighter.</text:p>
      <text:p text:style-name="P75"/>
      <text:p text:style-name="P75">To set an attribute, the &lt;ATTRIBUTE&gt; is used. For example, to change the appearance of all identifiers of a text, you can use the following definition:</text:p>
      <text:p text:style-name="P75"/>
      <text:p text:style-name="P194"><text:span text:style-name="T38"><text:s/></text:span><text:span text:style-name="T79">&lt;</text:span><text:span text:style-name="T26">Attribute Name</text:span><text:span text:style-name="T79">=</text:span><text:span text:style-name="T114">"Identifier"</text:span><text:span text:style-name="T26"> ForeCol</text:span><text:span text:style-name="T79">=</text:span><text:span text:style-name="T114">"#800000"</text:span><text:span text:style-name="T26"> Bold</text:span><text:span text:style-name="T79">=</text:span><text:span text:style-name="T114">"True"</text:span><text:span text:style-name="T79">&gt;</text:span><text:span text:style-name="T38"> <text:s/></text:span><text:span text:style-name="T79">&lt;/</text:span><text:span text:style-name="T26">Attribute</text:span><text:span text:style-name="T79">&gt;</text:span></text:p>
      <text:p text:style-name="P196"/>
      <text:p text:style-name="P75">This definition shall make all identifiers with red text color and bold. Color parameters must follow the format of three components: #RRGGBB or the name of the color.</text:p>
      <text:p text:style-name="P75"/>
      <text:p text:style-name="P75">If the attribute name already exists, its properties are updated. If the specified attribute does not exist, it first creates the attribute.</text:p>
      <text:p text:style-name="P75"/>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5"/>
      <text:p text:style-name="P75">They can express multiple definitions of attributes in a syntax file:</text:p>
      <text:p text:style-name="P75"/>
      <text:p text:style-name="P118"><text:span text:style-name="T79">&lt;</text:span><text:span text:style-name="T26">?Xml version</text:span><text:span text:style-name="T79">=</text:span><text:span text:style-name="T114">"1.0"</text:span><text:span text:style-name="T26">?</text:span><text:span text:style-name="T79">&gt;</text:span></text:p>
      <text:p text:style-name="P118"><text:span text:style-name="T79">&lt;</text:span><text:span text:style-name="T11">Language </text:span><text:span text:style-name="T26">name</text:span><text:span text:style-name="T79">=</text:span><text:span text:style-name="T114">"Oracle SQL"</text:span><text:span text:style-name="T26"> ext</text:span><text:span text:style-name="T79">=</text:span><text:span text:style-name="T114">"Psql"</text:span><text:span text:style-name="T26"> ColorBlock</text:span><text:span text:style-name="T79">=</text:span><text:span text:style-name="T114">"</text:span><text:span text:style-name="T115">Block</text:span><text:span text:style-name="T114">"</text:span><text:span text:style-name="T79">&gt;</text:span></text:p>
      <text:p text:style-name="P118"><text:span text:style-name="T38"><text:s text:c="2"/></text:span><text:span text:style-name="T79">&lt;</text:span><text:span text:style-name="T26">Attribute Name</text:span><text:span text:style-name="T79">=</text:span><text:span text:style-name="T114">"</text:span><text:span text:style-name="T115">Keyword</text:span><text:span text:style-name="T114">"</text:span><text:span text:style-name="T26"> ForeCol</text:span><text:span text:style-name="T79">=</text:span><text:span text:style-name="T114">"#40a040"</text:span><text:span text:style-name="T26"> Bold</text:span><text:span text:style-name="T79">=</text:span><text:span text:style-name="T114">"False"</text:span><text:span text:style-name="T79">&gt;</text:span></text:p>
      <text:p text:style-name="P118"><text:span text:style-name="T38"><text:s text:c="2"/></text:span><text:span text:style-name="T79">&lt;/</text:span><text:span text:style-name="T26">Attribute</text:span><text:span text:style-name="T79">&gt;</text:span></text:p>
      <text:p text:style-name="P118"><text:span text:style-name="T38"><text:s text:c="2"/></text:span><text:span text:style-name="T79">&lt;</text:span><text:span text:style-name="T26">Attribute Name</text:span><text:span text:style-name="T79">=</text:span><text:span text:style-name="T114">"Directive"</text:span><text:span text:style-name="T26"> FrameCol</text:span><text:span text:style-name="T79">=</text:span><text:span text:style-name="T114">"#4040a0"</text:span><text:span text:style-name="T26"> Italic</text:span><text:span text:style-name="T79">=</text:span><text:span text:style-name="T114">"True"</text:span><text:span text:style-name="T26"> Strikeout</text:span><text:span text:style-name="T79">=</text:span><text:span text:style-name="T114">"True"</text:span><text:span text:style-name="T79">&gt;</text:span></text:p>
      <text:p text:style-name="P118"><text:span text:style-name="T38"><text:s text:c="2"/></text:span><text:span text:style-name="T79">&lt;/</text:span><text:span text:style-name="T26">Attribute</text:span><text:span text:style-name="T79">&gt;</text:span></text:p>
      <text:p text:style-name="P118"><text:span text:style-name="T38"><text:s text:c="2"/></text:span><text:span text:style-name="T26">...</text:span></text:p>
      <text:p text:style-name="P118"><text:span text:style-name="T79">&lt;/</text:span><text:span text:style-name="T11">Language</text:span><text:span text:style-name="T79">&gt;</text:span></text:p>
      <text:p text:style-name="P75"/>
      <text:p text:style-name="P75">These definitions of attributes may have the following result:</text:p>
      <text:p text:style-name="P75"/>
      <text:p text:style-name="P75"><draw:frame draw:style-name="fr4" draw:name="Image4" text:anchor-type="as-char" svg:width="10.343cm" svg:height="3.678cm" draw:z-index="9"><draw:image xlink:href="Pictures/10000000000001870000008BDC6DB08240CE2672.png" xlink:type="simple" xlink:show="embed" xlink:actuate="onLoad"/></draw:frame></text:p>
      <text:p text:style-name="P75"/>
      <text:p text:style-name="P75">When "FrameCol" parameter is used, the "FrameEdg" parameter allows you to specify where in the edge of the text appears. Its possible values ​​are:</text:p>
      <text:p text:style-name="P75"/>
      <text:list xml:id="list3814463522651149842" text:style-name="WW8Num12">
        <text:list-item>
          <text:p text:style-name="P237"><text:span text:style-name="T3">"</text:span><text:span text:style-name="T2">Around "-&gt; Full Rim.</text:span></text:p>
        </text:list-item>
        <text:list-item>
          <text:p text:style-name="P237"><text:span text:style-name="T3">"</text:span><text:span text:style-name="T2">Bottom "-&gt; Only one line down.</text:span></text:p>
        </text:list-item>
        <text:list-item>
          <text:p text:style-name="P237"><text:soft-page-break/><text:span text:style-name="T3">"</text:span><text:span text:style-name="T2">Left "-&gt; Just a line to the left.</text:span></text:p>
        </text:list-item>
        <text:list-item>
          <text:p text:style-name="P237"><text:span text:style-name="T3">"</text:span><text:span text:style-name="T2">None "-&gt; No border.</text:span></text:p>
        </text:list-item>
      </text:list>
      <text:p text:style-name="P75"/>
      <text:p text:style-name="P75">The "Style" parameter is a shorthand for the "Bold", "Italic", "Underline" and "strikeout" parameters. It can contain:</text:p>
      <text:p text:style-name="P75"/>
      <text:p text:style-name="P75">b-&gt; Bold text</text:p>
      <text:p text:style-name="P75">i -&gt; Text in italics</text:p>
      <text:p text:style-name="P75">u&gt; underlined text</text:p>
      <text:p text:style-name="P75">s-&gt; strikethrough text</text:p>
      <text:p text:style-name="P75"/>
      <text:p text:style-name="P75">If you want to specify an underlined and bold text, you can use this definition:</text:p>
      <text:p text:style-name="P75"/>
      <text:p text:style-name="P118"><text:span text:style-name="T38"><text:s text:c="2"/></text:span><text:span text:style-name="T79">&lt;</text:span><text:span text:style-name="T26">Attribute Name</text:span><text:span text:style-name="T79">=</text:span><text:span text:style-name="T114">"</text:span><text:span text:style-name="T115">Keyword</text:span><text:span text:style-name="T114">"</text:span><text:span text:style-name="T26"> Style</text:span><text:span text:style-name="T79">=</text:span><text:span text:style-name="T114">"ub"</text:span><text:span text:style-name="T79">&gt;</text:span><text:span text:style-name="T38"> </text:span></text:p>
      <text:p text:style-name="P118"><text:span text:style-name="T47"><text:s text:c="2"/></text:span><text:span text:style-name="T79">&lt;/</text:span><text:span text:style-name="T26">Attribute</text:span><text:span text:style-name="T79">&gt;</text:span></text:p>
      <text:p text:style-name="P75"/>
      <text:p text:style-name="P75">Do not use the "Bold", "Italic", "Underline" and "strikeout" parameters if "Style" is used.</text:p>
      <text:p text:style-name="P75"/>
      <text:p text:style-name="P75">If the properties of the attributes are not specified, the defaults values are maintained. These default values, <text:span text:style-name="T136">usually, do not apply highlighting options, ie, no colors or for text or for the background or for the edge apply. In addition, all attributes are Boolean false.</text:span> </text:p>
      <text:p text:style-name="P75"/>
      <text:p text:style-name="P75">Most attributes have their properties by default disabled, ie no colors or for text or for the background or for the edge apply. Besides all attributes are boolean false. </text:p>
      <text:p text:style-name="P75"/>
      <text:p text:style-name="P75">However, some attributes have default properties set as keywords and comments. So chains are initially shown with blue text, comments in italics and gray, while the keywords are displayed in green.</text:p>
      <text:p text:style-name="P75"/>
      <text:p text:style-name="P75">A new attribute is created in the same way as an existing attribute is configured. In the following definition, we created the "Specials" attribute and configure two special identifiers in "Specials" attribute:</text:p>
      <text:p text:style-name="P75"/>
      <text:p text:style-name="P118"><text:span text:style-name="T79">&lt;</text:span><text:span text:style-name="T26">?Xml version</text:span><text:span text:style-name="T79">=</text:span><text:span text:style-name="T114">"1.0"</text:span><text:span text:style-name="T26">?</text:span><text:span text:style-name="T79">&gt;</text:span></text:p>
      <text:p text:style-name="P118"><text:span text:style-name="T79">&lt;</text:span><text:span text:style-name="T11">Language </text:span><text:span text:style-name="T26">name</text:span><text:span text:style-name="T79">=</text:span><text:span text:style-name="T114">"Pascal"</text:span><text:span text:style-name="T26"> ext</text:span><text:span text:style-name="T79">=</text:span><text:span text:style-name="T114">"Pas inc pp"</text:span><text:span text:style-name="T26"> ColorBlock</text:span><text:span text:style-name="T79">=</text:span><text:span text:style-name="T114">"Level"</text:span><text:span text:style-name="T79">&gt;</text:span></text:p>
      <text:p text:style-name="P118"><text:span text:style-name="T38"><text:s text:c="2"/></text:span><text:span text:style-name="T79">&lt;</text:span><text:span text:style-name="T11">Attribute</text:span><text:span text:style-name="T26"> Name</text:span><text:span text:style-name="T79">=</text:span><text:span text:style-name="T114">"Specials"</text:span><text:span text:style-name="T26"> ForeCol</text:span><text:span text:style-name="T79">=</text:span><text:span text:style-name="T114">"#008000"</text:span><text:span text:style-name="T26"> Bold</text:span><text:span text:style-name="T79">=</text:span><text:span text:style-name="T114">"True"</text:span><text:span text:style-name="T79">&gt;</text:span><text:span text:style-name="T26"> </text:span><text:span text:style-name="T79">&lt;/</text:span><text:span text:style-name="T11">Attribute</text:span><text:span text:style-name="T79">&gt;</text:span></text:p>
      <text:p text:style-name="P118"><text:span text:style-name="T38"><text:s text:c="2"/></text:span><text:span text:style-name="T79">&lt;</text:span><text:span text:style-name="T11">Identifiers </text:span><text:span text:style-name="T26">CharsStart</text:span><text:span text:style-name="T79">=</text:span><text:span text:style-name="T26"> </text:span><text:span text:style-name="T114">"A..Za..z_"</text:span><text:span text:style-name="T26"> Content </text:span><text:span text:style-name="T79">=</text:span><text:span text:style-name="T26"> </text:span><text:span text:style-name="T114">"A..Za..z0..9_"</text:span><text:span text:style-name="T79">&gt;</text:span><text:span text:style-name="T26"> </text:span></text:p>
      <text:p text:style-name="P118"><text:span text:style-name="T38"><text:s text:c="4"/></text:span><text:span text:style-name="T79">&lt;</text:span><text:span text:style-name="T26">Specials</text:span><text:span text:style-name="T79">&gt;</text:span></text:p>
      <text:p text:style-name="P126"><text:s text:c="7"/>foo bar</text:p>
      <text:p text:style-name="P118"><text:span text:style-name="T38"><text:s text:c="4"/></text:span><text:span text:style-name="T79">&lt;/</text:span><text:span text:style-name="T26">Specials</text:span><text:span text:style-name="T79">&gt;</text:span></text:p>
      <text:p text:style-name="P118"><text:soft-page-break/><text:span text:style-name="T38"><text:s text:c="2"/></text:span><text:span text:style-name="T79">&lt;/</text:span><text:span text:style-name="T11">Identifiers</text:span><text:span text:style-name="T79">&gt;</text:span></text:p>
      <text:p text:style-name="P118"><text:span text:style-name="T79">&lt;/</text:span><text:span text:style-name="T11">Language</text:span><text:span text:style-name="T79">&gt;</text:span></text:p>
      <text:p text:style-name="P75"/>
      <text:p text:style-name="P75">The attribute name is specified in the property "Name =". It can be any length and contain almost any character, but it is recommended that a short name, to improve speed searches.</text:p>
      <text:p text:style-name="P75"/>
      <text:p text:style-name="P75">The name of a new attribute must not be equal to any of the pre-defined attributes in the highlight:</text:p>
      <text:p text:style-name="P75"/>
      <text:p text:style-name="P75"/>
      <text:list xml:id="list4413216128725966900" text:style-name="WW8Num20">
        <text:list-item>
          <text:p text:style-name="P223">EOL</text:p>
        </text:list-item>
        <text:list-item>
          <text:p text:style-name="P223">SYMBOL</text:p>
        </text:list-item>
        <text:list-item>
          <text:p text:style-name="P223">SPACE</text:p>
        </text:list-item>
        <text:list-item>
          <text:p text:style-name="P223">IDENTIFIER</text:p>
        </text:list-item>
        <text:list-item>
          <text:p text:style-name="P223">NUMBER</text:p>
        </text:list-item>
        <text:list-item>
          <text:p text:style-name="P223">KEYWORD</text:p>
        </text:list-item>
        <text:list-item>
          <text:p text:style-name="P223">STRING</text:p>
        </text:list-item>
        <text:list-item>
          <text:p text:style-name="P223">COMMENT</text:p>
        </text:list-item>
      </text:list>
      <text:p text:style-name="P75"/>
      <text:p text:style-name="P75">There is no practical limit to the number of attributes that can be created. It is limited only by the amount of memory available in the system.</text:p>
      <text:list xml:id="list230305227802763" text:continue-list="list230304213256964" text:style-name="WW8Num24">
        <text:list-item>
          <text:list>
            <text:list-item>
              <text:h text:style-name="P250" text:outline-level="2"><text:bookmark-start text:name="__RefHeading___Toc404419478"/>Defining Symbols<text:bookmark-end text:name="__RefHeading___Toc404419478"/></text:h>
            </text:list-item>
          </text:list>
        </text:list-item>
      </text:list>
      <text:p text:style-name="P193"/>
      <text:p text:style-name="P159">Within the highlighter, tokens that will never be absent, are the symbols. This is due to the way the highlighter works internally.</text:p>
      <text:p text:style-name="P159"/>
      <text:p text:style-name="P159">The symbols are the first elements to be defined in a syntax. However, the highlighter makes a default definition, it would be something like this:</text:p>
      <text:p text:style-name="P159"/>
      <text:p text:style-name="P118"><text:span text:style-name="T79">&lt;</text:span><text:span text:style-name="T11">Symbols </text:span><text:span text:style-name="T26">Content </text:span><text:span text:style-name="T79">=</text:span><text:span text:style-name="T26"> </text:span><text:span text:style-name="T114">"%ALL%"</text:span><text:span text:style-name="T26"> </text:span><text:span text:style-name="T79">&gt;&lt;/</text:span><text:span text:style-name="T11">Symbols</text:span><text:span text:style-name="T79">&gt;</text:span></text:p>
      <text:p text:style-name="P159"/>
      <text:p text:style-name="P159">And this is the first definition applied, and it is expected, that the following definitions will restrict the scope of the symbols.</text:p>
      <text:p text:style-name="P159"/>
      <text:p text:style-name="P159">In fact, the symbol definition excludes white characters #1 .. #31 and #0 null character, for security purposes.</text:p>
      <text:p text:style-name="P159"/>
      <text:p text:style-name="P159">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59"/>
      <text:p text:style-name="P118"><text:span text:style-name="T79">&lt;</text:span><text:span text:style-name="T11">Symbols</text:span><text:span text:style-name="T79">&gt;</text:span></text:p>
      <text:p text:style-name="P118"><text:span text:style-name="T38"><text:s text:c="2"/></text:span><text:span text:style-name="T79">&lt;</text:span><text:span text:style-name="T11">Token </text:span><text:span text:style-name="T26">Attribute </text:span><text:span text:style-name="T79">=</text:span><text:span text:style-name="T26"> </text:span><text:span text:style-name="T114">"OPERATOR"</text:span><text:span text:style-name="T79">&gt;</text:span></text:p>
      <text:p text:style-name="P118"><text:span text:style-name="T38"><text:s text:c="2"/></text:span><text:span text:style-name="T79">+</text:span><text:span text:style-name="T26"> </text:span><text:span text:style-name="T79">-</text:span><text:span text:style-name="T26"> </text:span><text:span text:style-name="T79">*</text:span><text:span text:style-name="T26"> </text:span><text:span text:style-name="T79">/</text:span></text:p>
      <text:p text:style-name="P118"><text:span text:style-name="T38"><text:s text:c="2"/></text:span><text:span text:style-name="T79">&lt;/</text:span><text:span text:style-name="T11">Token</text:span><text:span text:style-name="T79">&gt;</text:span></text:p>
      <text:p text:style-name="P118"><text:span text:style-name="T79">&lt;/</text:span><text:span text:style-name="T11">Symbols</text:span><text:span text:style-name="T79">&gt;</text:span></text:p>
      <text:p text:style-name="P159"/>
      <text:list xml:id="list230305189855357" text:continue-numbering="true" text:style-name="WW8Num24">
        <text:list-item>
          <text:list>
            <text:list-item>
              <text:list>
                <text:list-item>
                  <text:h text:style-name="P256"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15"/>
      <text:p text:style-name="P75">Special symbols are defined in the label SYMBOLS:</text:p>
      <text:p text:style-name="P75"/>
      <text:p text:style-name="P118"><text:span text:style-name="T79">&lt;</text:span><text:span text:style-name="T11">Symbols</text:span><text:span text:style-name="T79">&gt;</text:span><text:span text:style-name="T26"> </text:span></text:p>
      <text:p text:style-name="P118"><text:span text:style-name="T38"><text:s text:c="2"/></text:span><text:span text:style-name="T79">&lt;</text:span><text:span text:style-name="T11">Operator</text:span><text:span text:style-name="T79">&gt;</text:span><text:span text:style-name="T26"> </text:span></text:p>
      <text:p text:style-name="P118"><text:span text:style-name="T38"><text:s text:c="4"/></text:span><text:span text:style-name="T26">list of symbols</text:span></text:p>
      <text:p text:style-name="P118"><text:span text:style-name="T38"><text:s text:c="2"/></text:span><text:span text:style-name="T79">&lt;/</text:span><text:span text:style-name="T11">Operator</text:span><text:span text:style-name="T79">&gt;</text:span></text:p>
      <text:p text:style-name="P124"/>
      <text:p text:style-name="P118"><text:span text:style-name="T38"><text:s text:c="2"/></text:span><text:span text:style-name="T79">&lt;</text:span><text:span text:style-name="T11">Delimiter</text:span><text:span text:style-name="T79">&gt;</text:span><text:span text:style-name="T26"> </text:span></text:p>
      <text:p text:style-name="P118"><text:span text:style-name="T38"><text:s text:c="4"/></text:span><text:span text:style-name="T26">list of symbols</text:span></text:p>
      <text:p text:style-name="P118"><text:span text:style-name="T38"><text:s text:c="2"/></text:span><text:span text:style-name="T79">&lt;/</text:span><text:span text:style-name="T11">Delimiter</text:span><text:span text:style-name="T79">&gt;</text:span></text:p>
      <text:p text:style-name="P124"/>
      <text:p text:style-name="P118"><text:soft-page-break/><text:span text:style-name="T38"><text:s text:c="2"/></text:span><text:span text:style-name="T26">...</text:span></text:p>
      <text:p text:style-name="P124"/>
      <text:p text:style-name="P118"><text:span text:style-name="T79">&lt;/</text:span><text:span text:style-name="T11">Symbols</text:span><text:span text:style-name="T79">&gt;</text:span></text:p>
      <text:p text:style-name="P196"/>
      <text:p text:style-name="P75">Each of these groups may have a different attribute, if it is defined separately.</text:p>
      <text:p text:style-name="P75"/>
      <text:p text:style-name="P75">A common use for special symbols is to define operators:</text:p>
      <text:p text:style-name="P15"/>
      <text:p text:style-name="P118"><text:span text:style-name="T38"><text:s text:c="2"/></text:span><text:span text:style-name="T79">&lt;</text:span><text:span text:style-name="T11">Operators</text:span><text:span text:style-name="T79">&gt;</text:span><text:span text:style-name="T26"> </text:span></text:p>
      <text:p text:style-name="P118"><text:span text:style-name="T38"><text:s text:c="4"/></text:span><text:span text:style-name="T26">+ - * / =</text:span></text:p>
      <text:p text:style-name="P118"><text:span text:style-name="T38"><text:s text:c="2"/></text:span><text:span text:style-name="T79">&lt;/</text:span><text:span text:style-name="T11">Operators</text:span><text:span text:style-name="T79">&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5">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18"><text:span text:style-name="T79">&lt;</text:span><text:span text:style-name="T11">Symbols</text:span><text:span text:style-name="T79">&gt;</text:span><text:span text:style-name="T26"> </text:span></text:p>
      <text:p text:style-name="P118"><text:span text:style-name="T38"><text:s text:c="2"/></text:span><text:span text:style-name="T79">&lt;</text:span><text:span text:style-name="T11">Special </text:span><text:span text:style-name="T26">TokPos</text:span><text:span text:style-name="T79">=</text:span><text:span text:style-name="T114">"1"</text:span><text:span text:style-name="T79">&gt;</text:span><text:span text:style-name="T26"> </text:span></text:p>
      <text:p text:style-name="P118"><text:soft-page-break/><text:span text:style-name="T38"><text:s text:c="4"/></text:span><text:span text:style-name="T26">/</text:span></text:p>
      <text:p text:style-name="P118"><text:span text:style-name="T38"><text:s text:c="2"/></text:span><text:span text:style-name="T79">&lt;/</text:span><text:span text:style-name="T11">Special</text:span><text:span text:style-name="T79">&gt;</text:span></text:p>
      <text:p text:style-name="P118"><text:span text:style-name="T38"><text:s text:c="2"/></text:span><text:span text:style-name="T26">...</text:span></text:p>
      <text:p text:style-name="P124"/>
      <text:p text:style-name="P118"><text:span text:style-name="T79">&lt;/</text:span><text:span text:style-name="T11">Symbols</text:span><text:span text:style-name="T79">&gt;</text:span></text:p>
      <text:p text:style-name="P46"/>
      <text:p text:style-name="P37"/>
      <text:list xml:id="list230305775895765" text:continue-numbering="true" text:style-name="WW8Num24">
        <text:list-item>
          <text:list>
            <text:list-item>
              <text:h text:style-name="P250"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18"><text:span text:style-name="T79">&lt;</text:span><text:span text:style-name="T11">Identifiers </text:span><text:span text:style-name="T26">CharsStart</text:span><text:span text:style-name="T79">=</text:span><text:span text:style-name="T26"> </text:span><text:span text:style-name="T114">"A..Za..z"</text:span><text:span text:style-name="T26"> Content </text:span><text:span text:style-name="T79">=</text:span><text:span text:style-name="T26"> </text:span><text:span text:style-name="T114">"A..Za..z0..9_"</text:span><text:span text:style-name="T79">&gt;&lt;/</text:span><text:span text:style-name="T11">Identifiers</text:span><text:span text:style-name="T79">&gt;</text:span></text:p>
      <text:p text:style-name="P75"/>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18"><text:span text:style-name="T79">&lt;</text:span><text:span text:style-name="T11">Identifiers </text:span><text:span text:style-name="T26">CharsStart</text:span><text:span text:style-name="T79">=</text:span><text:span text:style-name="T26"> </text:span><text:span text:style-name="T114">"A..Za..z $ _"</text:span><text:span text:style-name="T26"> Content </text:span><text:span text:style-name="T79">=</text:span><text:span text:style-name="T26"> </text:span><text:span text:style-name="T114">"A..Za..z0..9_"</text:span><text:span text:style-name="T79">&gt;&lt;/</text:span><text:span text:style-name="T11">Identifiers</text:span><text:span text:style-name="T79">&gt;</text:span></text:p>
      <text:p text:style-name="P15"/>
      <text:p text:style-name="P15"><text:tab/>If for some reason, it is wanted to delete the default definition of identifiers, we have to add the following line to your syntax definition:</text:p>
      <text:p text:style-name="P15"/>
      <text:p text:style-name="P118"><text:span text:style-name="T79">&lt;</text:span><text:span text:style-name="T11">Identifiers </text:span><text:span text:style-name="T26">CharsStart</text:span><text:span text:style-name="T79">=</text:span><text:span text:style-name="T26"> </text:span><text:span text:style-name="T114">""</text:span><text:span text:style-name="T26"> Content </text:span><text:span text:style-name="T79">=</text:span><text:span text:style-name="T26"> </text:span><text:span text:style-name="T114">""</text:span><text:span text:style-name="T79">&gt;&lt;/</text:span><text:span text:style-name="T11">Identifiers</text:span><text:span text:style-name="T79">&gt;</text:span></text:p>
      <text:p text:style-name="P15"/>
      <text:p text:style-name="P37"><text:span text:style-name="T2"><text:tab/>Identifiers support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
      <text:p text:style-name="P15"><text:soft-page-break/><text:tab/>Do not confuse the definition of identifiers (which are special elements in the highlighter) with the simplified form of tokens for content (see next section).</text:p>
      <text:p text:style-name="P15"/>
      <text:list xml:id="list230305311196835" text:continue-numbering="true" text:style-name="WW8Num24">
        <text:list-item>
          <text:list>
            <text:list-item>
              <text:list>
                <text:list-item>
                  <text:h text:style-name="P257" text:outline-level="3"><text:bookmark-start text:name="_Ref395466433"/><text:bookmark-start text:name="__RefHeading___Toc404419481"/>UTF-8<text:bookmark-end text:name="_Ref395466433"/> Identifiers <text:bookmark-end text:name="__RefHeading___Toc404419481"/></text:h>
                </text:list-item>
              </text:list>
            </text:list-item>
          </text:list>
        </text:list-item>
      </text:list>
      <text:p text:style-name="P15"/>
      <text:p text:style-name="P75">The UTF-8 characters like “ñ” are stored as two bytes instead of one. This means it can not be handled directly by the highlighter like single byte characters.</text:p>
      <text:p text:style-name="P75"/>
      <text:p text:style-name="P75">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2">CHARACTER</text:p>
          </table:table-cell>
          <table:table-cell table:style-name="Table9.B1" office:value-type="string">
            <text:p text:style-name="P42">BYTES</text:p>
          </table:table-cell>
        </table:table-row>
        <table:table-row table:style-name="Table9.1">
          <table:table-cell table:style-name="Table9.A2" office:value-type="string">
            <text:p text:style-name="P43">Á</text:p>
          </table:table-cell>
          <table:table-cell table:style-name="Table9.B2" office:value-type="string">
            <text:p text:style-name="P43">c3 81</text:p>
          </table:table-cell>
        </table:table-row>
        <table:table-row table:style-name="Table9.1">
          <table:table-cell table:style-name="Table9.A2" office:value-type="string">
            <text:p text:style-name="P43">É</text:p>
          </table:table-cell>
          <table:table-cell table:style-name="Table9.B2" office:value-type="string">
            <text:p text:style-name="P43">c3 89</text:p>
          </table:table-cell>
        </table:table-row>
        <table:table-row table:style-name="Table9.1">
          <table:table-cell table:style-name="Table9.A2" office:value-type="string">
            <text:p text:style-name="P43">Í</text:p>
          </table:table-cell>
          <table:table-cell table:style-name="Table9.B2" office:value-type="string">
            <text:p text:style-name="P43">c3 8d</text:p>
          </table:table-cell>
        </table:table-row>
        <table:table-row table:style-name="Table9.1">
          <table:table-cell table:style-name="Table9.A2" office:value-type="string">
            <text:p text:style-name="P43">Ñ</text:p>
          </table:table-cell>
          <table:table-cell table:style-name="Table9.B2" office:value-type="string">
            <text:p text:style-name="P43">c3 91</text:p>
          </table:table-cell>
        </table:table-row>
        <table:table-row table:style-name="Table9.1">
          <table:table-cell table:style-name="Table9.A2" office:value-type="string">
            <text:p text:style-name="P43">Ó</text:p>
          </table:table-cell>
          <table:table-cell table:style-name="Table9.B2" office:value-type="string">
            <text:p text:style-name="P43">c3 93</text:p>
          </table:table-cell>
        </table:table-row>
        <table:table-row table:style-name="Table9.1">
          <table:table-cell table:style-name="Table9.A2" office:value-type="string">
            <text:p text:style-name="P43">Ú</text:p>
          </table:table-cell>
          <table:table-cell table:style-name="Table9.B2" office:value-type="string">
            <text:p text:style-name="P43">c3 9a</text:p>
          </table:table-cell>
        </table:table-row>
        <table:table-row table:style-name="Table9.1">
          <table:table-cell table:style-name="Table9.A2" office:value-type="string">
            <text:p text:style-name="P43">á</text:p>
          </table:table-cell>
          <table:table-cell table:style-name="Table9.B2" office:value-type="string">
            <text:p text:style-name="P43">c3 a1</text:p>
          </table:table-cell>
        </table:table-row>
        <table:table-row table:style-name="Table9.1">
          <table:table-cell table:style-name="Table9.A2" office:value-type="string">
            <text:p text:style-name="P43">é</text:p>
          </table:table-cell>
          <table:table-cell table:style-name="Table9.B2" office:value-type="string">
            <text:p text:style-name="P43">c3 a9</text:p>
          </table:table-cell>
        </table:table-row>
        <table:table-row table:style-name="Table9.1">
          <table:table-cell table:style-name="Table9.A2" office:value-type="string">
            <text:p text:style-name="P43">í</text:p>
          </table:table-cell>
          <table:table-cell table:style-name="Table9.B2" office:value-type="string">
            <text:p text:style-name="P43">c3 ad</text:p>
          </table:table-cell>
        </table:table-row>
        <table:table-row table:style-name="Table9.1">
          <table:table-cell table:style-name="Table9.A2" office:value-type="string">
            <text:p text:style-name="P43">ñ</text:p>
          </table:table-cell>
          <table:table-cell table:style-name="Table9.B2" office:value-type="string">
            <text:p text:style-name="P43">c3 b1</text:p>
          </table:table-cell>
        </table:table-row>
        <table:table-row table:style-name="Table9.1">
          <table:table-cell table:style-name="Table9.A2" office:value-type="string">
            <text:p text:style-name="P43">ó</text:p>
          </table:table-cell>
          <table:table-cell table:style-name="Table9.B2" office:value-type="string">
            <text:p text:style-name="P43">c3 b3</text:p>
          </table:table-cell>
        </table:table-row>
        <table:table-row table:style-name="Table9.1">
          <table:table-cell table:style-name="Table9.A2" office:value-type="string">
            <text:p text:style-name="P43">ú</text:p>
          </table:table-cell>
          <table:table-cell table:style-name="Table9.B2" office:value-type="string">
            <text:p text:style-name="P43">c3 ba</text:p>
          </table:table-cell>
        </table:table-row>
      </table:table>
      <text:p text:style-name="P15"/>
      <text:p text:style-name="P159">The definition to accept identifiers in Spanish, will allow C3 page, valid as the first character and C3, 81, 89, 8D, 91, 93, 9A, A1, A9, AD, B1, B3, and BA bytes as characters below. The definition would be:</text:p>
      <text:p text:style-name="P159"/>
      <text:p text:style-name="P118"><text:span text:style-name="T38"><text:s text:c="2"/></text:span><text:span text:style-name="T79">&lt;</text:span><text:span text:style-name="T11">Identifiers </text:span><text:span text:style-name="T26">CharsStart</text:span><text:span text:style-name="T79">=</text:span><text:span text:style-name="T26"> </text:span><text:span text:style-name="T114">"A..Za..z _ &amp;#xc3</text:span><text:span text:style-name="T115">;</text:span><text:span text:style-name="T114">"</text:span><text:span text:style-name="T26"> </text:span></text:p>
      <text:p text:style-name="P118"><text:span text:style-name="T26">Content</text:span><text:span text:style-name="T79">=</text:span><text:span text:style-name="T114">"A..Za..z0..9_&amp;#xc3</text:span><text:span text:style-name="T115">;</text:span><text:span text:style-name="T114">&amp;#X81</text:span><text:span text:style-name="T115">;</text:span><text:span text:style-name="T114">&amp;#X89</text:span><text:span text:style-name="T115">;</text:span><text:span text:style-name="T114">&amp;#X8D</text:span><text:span text:style-name="T115">;</text:span><text:span text:style-name="T114">&amp;#X91</text:span><text:span text:style-name="T115">;</text:span><text:span text:style-name="T114">&amp;#X93</text:span><text:span text:style-name="T115">;</text:span><text:span text:style-name="T114">&amp;#X9a</text:span><text:span text:style-name="T115">;</text:span><text:span text:style-name="T114">&amp;#XA1</text:span><text:span text:style-name="T115">;</text:span><text:span text:style-name="T114">&amp;# XA9</text:span><text:span text:style-name="T115">;</text:span><text:span text:style-name="T114">&amp;#XAD</text:span><text:span text:style-name="T115">;</text:span><text:span text:style-name="T114">&amp;#XB1</text:span><text:span text:style-name="T115">;</text:span><text:span text:style-name="T114">&amp;#XB3</text:span><text:span text:style-name="T115">;</text:span><text:span text:style-name="T114">&amp;#XBA</text:span><text:span text:style-name="T115">;</text:span><text:span text:style-name="T114">"</text:span><text:span text:style-name="T79">&gt;</text:span><text:span text:style-name="T26"> </text:span></text:p>
      <text:p text:style-name="P118"><text:span text:style-name="T38"><text:s text:c="2"/></text:span><text:span text:style-name="T79">&lt;/</text:span><text:span text:style-name="T11">Identifiers</text:span><text:span text:style-name="T79">&gt;</text:span></text:p>
      <text:p text:style-name="P159"><text:tab/></text:p>
      <text:p text:style-name="P159">When the highlighter find the character C3, as the first character for identifiers, know that it is the beginning of a UTF-8 character and consider all C3 page as valid, causing identifiers can begin with accented vowels. The definition of these characters is not accurate, because the highlighter always treat these characters as a single byte, but work quite well for the Spanish.</text:p>
      <text:p text:style-name="P159"><text:soft-page-break/></text:p>
      <text:p text:style-name="P159">A simplified form for the definition would be:</text:p>
      <text:p text:style-name="P159"/>
      <text:p text:style-name="P118"><text:span text:style-name="T38"><text:s text:c="2"/></text:span><text:span text:style-name="T79">&lt;</text:span><text:span text:style-name="T11">Identifiers </text:span><text:span text:style-name="T26">CharsStart</text:span><text:span text:style-name="T79">=</text:span><text:span text:style-name="T26"> </text:span><text:span text:style-name="T114">"A..Za..z_&amp;#xc3</text:span><text:span text:style-name="T115">;</text:span><text:span text:style-name="T114">"</text:span><text:span text:style-name="T26"> Content</text:span><text:span text:style-name="T79">=</text:span><text:span text:style-name="T114">"A..Za..z0..9_%HIGH%"</text:span><text:span text:style-name="T79">&gt;</text:span><text:span text:style-name="T26"> </text:span></text:p>
      <text:p text:style-name="P118"><text:span text:style-name="T38"><text:s text:c="2"/></text:span><text:span text:style-name="T79">&lt;/</text:span><text:span text:style-name="T11">Identifiers</text:span><text:span text:style-name="T79">&gt;</text:span></text:p>
      <text:p text:style-name="P159"/>
      <text:p text:style-name="P159">In this case, any UTF-8 character as a valid character for the following characters are allowed.</text:p>
      <text:p text:style-name="P159"/>
      <text:p text:style-name="P159">With these definitions, the words "ícaro", "ñandú" and "así" are recognized as identifiers.</text:p>
      <text:p text:style-name="P159"/>
      <text:p text:style-name="P160"><text:span text:style-name="T2">For more information about identifiers with UTF-8, see section </text:span><text:span text:style-name="T2"><text:bookmark-ref text:reference-format="number" text:ref-name="_Ref395458450">5.5</text:bookmark-ref></text:span><text:span text:style-name="T2"> - </text:span><text:span text:style-name="T2"><text:bookmark-ref text:reference-format="text" text:ref-name="_Ref395458452">Defining identifiers</text:bookmark-ref></text:span><text:span text:style-name="T2">.</text:span></text:p>
      <text:p text:style-name="P159"/>
      <text:list xml:id="list230306046123192" text:continue-numbering="true" text:style-name="WW8Num24">
        <text:list-item>
          <text:list>
            <text:list-item>
              <text:list>
                <text:list-item>
                  <text:h text:style-name="P246"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list-item>
      </text:list>
      <text:p text:style-name="P15"/>
      <text:p text:style-name="P75">The special identifiers are defined in the IDENTIFIERS element:</text:p>
      <text:p text:style-name="P75"/>
      <text:p text:style-name="P118"><text:span text:style-name="T79">&lt;</text:span><text:span text:style-name="T11">Identifiers</text:span><text:span text:style-name="T79">&gt;</text:span><text:span text:style-name="T26"> </text:span></text:p>
      <text:p text:style-name="P118"><text:span text:style-name="T38"><text:s text:c="2"/></text:span><text:span text:style-name="T79">&lt;</text:span><text:span text:style-name="T11">Keyword</text:span><text:span text:style-name="T79">&gt;</text:span><text:span text:style-name="T26"> </text:span></text:p>
      <text:p text:style-name="P118"><text:span text:style-name="T38"><text:s text:c="4"/></text:span><text:span text:style-name="T26">list of identifiers</text:span></text:p>
      <text:p text:style-name="P118"><text:span text:style-name="T38"><text:s text:c="2"/></text:span><text:span text:style-name="T79">&lt;/</text:span><text:span text:style-name="T11">Keyword</text:span><text:span text:style-name="T79">&gt;</text:span></text:p>
      <text:p text:style-name="P124"/>
      <text:p text:style-name="P118"><text:span text:style-name="T38"><text:s text:c="2"/></text:span><text:span text:style-name="T79">&lt;</text:span><text:span text:style-name="T11">Variable</text:span><text:span text:style-name="T79">&gt;</text:span><text:span text:style-name="T26"> </text:span></text:p>
      <text:p text:style-name="P118"><text:span text:style-name="T38"><text:s text:c="4"/></text:span><text:span text:style-name="T26">list of identifiers</text:span></text:p>
      <text:p text:style-name="P118"><text:span text:style-name="T38"><text:s text:c="2"/></text:span><text:span text:style-name="T79">&lt;/</text:span><text:span text:style-name="T11">Variable</text:span><text:span text:style-name="T79">&gt;</text:span></text:p>
      <text:p text:style-name="P124"/>
      <text:p text:style-name="P118"><text:span text:style-name="T38"><text:s text:c="2"/></text:span><text:span text:style-name="T26">...</text:span></text:p>
      <text:p text:style-name="P124"/>
      <text:p text:style-name="P118"><text:span text:style-name="T79">&lt;/</text:span><text:span text:style-name="T11">Identifiers</text:span><text:span text:style-name="T79">&gt;</text:span></text:p>
      <text:p text:style-name="P75"/>
      <text:p text:style-name="P75">Defined separately, each of these groups can be associated with a different attribute.</text:p>
      <text:p text:style-name="P167"/>
      <text:p text:style-name="P75">Reserved words are identified as "Keyword" in the syntax file: </text:p>
      <text:p text:style-name="P15"/>
      <text:p text:style-name="P118"><text:span text:style-name="T38"><text:s text:c="2"/></text:span><text:span text:style-name="T79">&lt;</text:span><text:span text:style-name="T11">Keyword</text:span><text:span text:style-name="T79">&gt;</text:span><text:span text:style-name="T26"> </text:span></text:p>
      <text:p text:style-name="P118"><text:span text:style-name="T38"><text:s text:c="4"/></text:span><text:span text:style-name="T26">List of keywords</text:span></text:p>
      <text:p text:style-name="P118"><text:span text:style-name="T38"><text:s text:c="2"/></text:span><text:span text:style-name="T79">&lt;/</text:span><text:span text:style-name="T11">Keyword</text:span><text:span text:style-name="T79">&gt;</text:span></text:p>
      <text:p text:style-name="P15"><text:tab/>These reserved words are defined for each language. For example Pascal keywords could be defined like:</text:p>
      <text:p text:style-name="P15"/>
      <text:p text:style-name="P118"><text:soft-page-break/><text:span text:style-name="T38"><text:s text:c="2"/></text:span><text:span text:style-name="T79">&lt;</text:span><text:span text:style-name="T11">Keyword</text:span><text:span text:style-name="T79">&gt;</text:span><text:span text:style-name="T26"> </text:span></text:p>
      <text:p text:style-name="P118"><text:span text:style-name="T38"><text:s text:c="4"/></text:span><text:span text:style-name="T26">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1">string </text:span><text:span text:style-name="T26">then a true try to use var type unit Until With virtual while xor </text:span></text:p>
      <text:p text:style-name="P118"><text:span text:style-name="T79">&lt;/</text:span><text:span text:style-name="T11">Keyword</text:span><text:span text:style-name="T79">&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5">For example you can not add the special identifier "#uno" even though the "#" is a valid initial character for identifiers.</text:p>
      <text:p text:style-name="P75"/>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5">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
      <text:p text:style-name="P15"><text:tab/>For example, if in a given language the keyword END appears more frequently than the word ECHO the list should be:</text:p>
      <text:p text:style-name="P15"><text:soft-page-break/></text:p>
      <text:p text:style-name="P118"><text:span text:style-name="T79">&lt;</text:span><text:span text:style-name="T11">Keyword</text:span><text:span text:style-name="T79">&gt;</text:span><text:span text:style-name="T26"> </text:span></text:p>
      <text:p text:style-name="P118"><text:span text:style-name="T38"><text:s text:c="4"/></text:span><text:span text:style-name="T26">...</text:span></text:p>
      <text:p text:style-name="P124">end echo</text:p>
      <text:p text:style-name="P118"><text:span text:style-name="T38"><text:s text:c="4"/></text:span><text:span text:style-name="T26">...</text:span></text:p>
      <text:p text:style-name="P118"><text:span text:style-name="T79">&lt;/</text:span><text:span text:style-name="T11">Keyword</text:span><text:span text:style-name="T79">&gt;</text:span></text:p>
      <text:p text:style-name="P15"/>
      <text:p text:style-name="P15"><text:tab/>There is an alternative way to declare the special identifiers from outside the &lt;IDENTIFIERS&gt; element:</text:p>
      <text:p text:style-name="P15"/>
      <text:p text:style-name="P118"><text:span text:style-name="T79">&lt;</text:span><text:span text:style-name="T11">Identifiers</text:span><text:span text:style-name="T79">&gt;</text:span><text:span text:style-name="T26"> </text:span></text:p>
      <text:p text:style-name="P118"><text:span text:style-name="T38"><text:s text:c="2"/></text:span><text:span text:style-name="T26">...</text:span></text:p>
      <text:p text:style-name="P124"/>
      <text:p text:style-name="P118"><text:span text:style-name="T79">&lt;/</text:span><text:span text:style-name="T11">Identifiers</text:span><text:span text:style-name="T79">&gt;</text:span></text:p>
      <text:p text:style-name="P115"/>
      <text:p text:style-name="P118"><text:span text:style-name="T79">&lt;</text:span><text:span text:style-name="T11">Keyword</text:span><text:span text:style-name="T79">&gt;</text:span><text:span text:style-name="T26"> </text:span></text:p>
      <text:p text:style-name="P118"><text:span text:style-name="T38"><text:s text:c="2"/></text:span><text:span text:style-name="T26">list of identifiers</text:span></text:p>
      <text:p text:style-name="P118"><text:span text:style-name="T79">&lt;/</text:span><text:span text:style-name="T11">Keyword</text:span><text:span text:style-name="T79">&gt;</text:span></text:p>
      <text:p text:style-name="P15"/>
      <text:p text:style-name="P159">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18"><text:span text:style-name="T38"><text:s text:c="2"/></text:span><text:span text:style-name="T79">&lt;</text:span><text:span text:style-name="T11">Identifiers</text:span><text:span text:style-name="T79">&gt;</text:span><text:span text:style-name="T26"> </text:span></text:p>
      <text:p text:style-name="P118"><text:span text:style-name="T38"><text:s text:c="4"/></text:span><text:span text:style-name="T79">&lt;</text:span><text:span text:style-name="T11">Keyword </text:span><text:span text:style-name="T26">TokPos</text:span><text:span text:style-name="T79">=</text:span><text:span text:style-name="T114">"1"</text:span><text:span text:style-name="T79">&gt;</text:span><text:span text:style-name="T26"> </text:span></text:p>
      <text:p text:style-name="P118"><text:span text:style-name="T38"><text:s text:c="4"/></text:span><text:span text:style-name="T26">initiation </text:span></text:p>
      <text:p text:style-name="P118"><text:span text:style-name="T38"><text:s text:c="4"/></text:span><text:span text:style-name="T79">&lt;/</text:span><text:span text:style-name="T11">Keyword</text:span><text:span text:style-name="T79">&gt;</text:span><text:span text:style-name="T26"> </text:span></text:p>
      <text:p text:style-name="P124"/>
      <text:p text:style-name="P118"><text:span text:style-name="T38"><text:s text:c="2"/></text:span><text:span text:style-name="T79">&lt;/</text:span><text:span text:style-name="T11">Identifiers</text:span><text:span text:style-name="T79">&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
      <text:p text:style-name="P15"><text:soft-page-break/><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18"><text:span text:style-name="T38"><text:s text:c="2"/></text:span><text:span text:style-name="T79">&lt;</text:span><text:span text:style-name="T11">Identifiers</text:span><text:span text:style-name="T79">&gt;</text:span><text:span text:style-name="T26"> </text:span></text:p>
      <text:p text:style-name="P118"><text:span text:style-name="T38"><text:s text:c="4"/></text:span><text:span text:style-name="T79">&lt;</text:span><text:span text:style-name="T11">Keyword </text:span><text:span text:style-name="T26">TokPos</text:span><text:span text:style-name="T79">=</text:span><text:span text:style-name="T114">"1"</text:span><text:span text:style-name="T79">&gt;</text:span><text:span text:style-name="T26"> </text:span></text:p>
      <text:p text:style-name="P118"><text:span text:style-name="T38"><text:s text:c="4"/></text:span><text:span text:style-name="T26">initiation </text:span></text:p>
      <text:p text:style-name="P118"><text:span text:style-name="T38"><text:s text:c="4"/></text:span><text:span text:style-name="T79">&lt;/</text:span><text:span text:style-name="T11">Keyword</text:span><text:span text:style-name="T79">&gt;</text:span><text:span text:style-name="T26"> </text:span></text:p>
      <text:p text:style-name="P118"><text:span text:style-name="T38"><text:s text:c="4"/></text:span><text:span text:style-name="T79">&lt;</text:span><text:span text:style-name="T11">Keyword </text:span><text:span text:style-name="T26">TokPos</text:span><text:span text:style-name="T79">=</text:span><text:span text:style-name="T114">"3"</text:span><text:span text:style-name="T79">&gt;</text:span><text:span text:style-name="T26"> </text:span></text:p>
      <text:p text:style-name="P118"><text:span text:style-name="T38"><text:s text:c="4"/></text:span><text:span text:style-name="T26">initiation </text:span></text:p>
      <text:p text:style-name="P118"><text:span text:style-name="T38"><text:s text:c="4"/></text:span><text:span text:style-name="T79">&lt;/</text:span><text:span text:style-name="T11">Keyword</text:span><text:span text:style-name="T79">&gt;</text:span><text:span text:style-name="T26"> </text:span></text:p>
      <text:p text:style-name="P124"/>
      <text:p text:style-name="P118"><text:span text:style-name="T38"><text:s text:c="2"/></text:span><text:span text:style-name="T79">&lt;/</text:span><text:span text:style-name="T11">Identifiers</text:span><text:span text:style-name="T79">&gt;</text:span></text:p>
      <text:p text:style-name="P15"/>
      <text:p text:style-name="P15"><text:tab/>However, if the following definition will fail, since there is a crossing in the definitions:</text:p>
      <text:p text:style-name="P15"/>
      <text:p text:style-name="P118"><text:span text:style-name="T38"><text:s text:c="2"/></text:span><text:span text:style-name="T79">&lt;</text:span><text:span text:style-name="T11">Identifiers</text:span><text:span text:style-name="T79">&gt;</text:span><text:span text:style-name="T26"> </text:span></text:p>
      <text:p text:style-name="P118"><text:span text:style-name="T38"><text:s text:c="4"/></text:span><text:span text:style-name="T79">&lt;</text:span><text:span text:style-name="T11">Keyword </text:span><text:span text:style-name="T26">TokPos</text:span><text:span text:style-name="T79">=</text:span><text:span text:style-name="T114">"1"</text:span><text:span text:style-name="T79">&gt;</text:span><text:span text:style-name="T26"> </text:span></text:p>
      <text:p text:style-name="P118"><text:span text:style-name="T38"><text:s text:c="4"/></text:span><text:span text:style-name="T26">initiation </text:span></text:p>
      <text:p text:style-name="P118"><text:span text:style-name="T38"><text:s text:c="4"/></text:span><text:span text:style-name="T79">&lt;/</text:span><text:span text:style-name="T11">Keyword</text:span><text:span text:style-name="T79">&gt;</text:span><text:span text:style-name="T26"> </text:span></text:p>
      <text:p text:style-name="P118"><text:span text:style-name="T38"><text:s text:c="4"/></text:span><text:span text:style-name="T79">&lt;</text:span><text:span text:style-name="T11">Keyword</text:span><text:span text:style-name="T79">&gt;</text:span><text:span text:style-name="T26"> </text:span></text:p>
      <text:p text:style-name="P118"><text:span text:style-name="T38"><text:s text:c="4"/></text:span><text:span text:style-name="T26">initiation </text:span></text:p>
      <text:p text:style-name="P118"><text:span text:style-name="T38"><text:s text:c="4"/></text:span><text:span text:style-name="T79">&lt;/</text:span><text:span text:style-name="T11">Keyword</text:span><text:span text:style-name="T79">&gt;</text:span><text:span text:style-name="T26"> </text:span></text:p>
      <text:p text:style-name="P124"/>
      <text:p text:style-name="P118"><text:span text:style-name="T38"><text:s text:c="2"/></text:span><text:span text:style-name="T79">&lt;/</text:span><text:span text:style-name="T11">Identifiers</text:span><text:span text:style-name="T79">&gt;</text:span></text:p>
      <text:p text:style-name="P15"/>
      <text:list xml:id="list230305152265664" text:continue-numbering="true" text:style-name="WW8Num24">
        <text:list-item>
          <text:list>
            <text:list-item>
              <text:list>
                <text:list-item>
                  <text:h text:style-name="P256"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7"><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
      <text:p text:style-name="P15"><text:soft-page-break/><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18"><text:span text:style-name="T38"><text:s text:c="2"/></text:span><text:span text:style-name="T79">&lt;</text:span><text:span text:style-name="T11">Identifiers </text:span><text:span text:style-name="T26">CharsStart</text:span><text:span text:style-name="T79">=</text:span><text:span text:style-name="T26"> </text:span><text:span text:style-name="T114">"A..Za..z_&amp;#xc3</text:span><text:span text:style-name="T115">;</text:span><text:span text:style-name="T114">"</text:span><text:span text:style-name="T26"> Content </text:span><text:span text:style-name="T79">=</text:span><text:span text:style-name="T26"> </text:span><text:span text:style-name="T114">"A..Za..z0..9_%HIGH%"</text:span><text:span text:style-name="T79">&gt;</text:span><text:span text:style-name="T26"> </text:span></text:p>
      <text:p text:style-name="P118"><text:span text:style-name="T38"><text:s text:c="4"/></text:span><text:span text:style-name="T79">&lt;</text:span><text:span text:style-name="T11">keyword</text:span><text:span text:style-name="T79">&gt;</text:span></text:p>
      <text:p text:style-name="P118"><text:span text:style-name="T26">&amp;#xc3</text:span><text:span text:style-name="T79">;</text:span><text:span text:style-name="T26">&amp;#XAD</text:span><text:span text:style-name="T79">;</text:span><text:span text:style-name="T26">cono &amp;#xc3</text:span><text:span text:style-name="T79">;</text:span><text:span text:style-name="T26">&amp;#Xb1</text:span><text:span text:style-name="T79">;</text:span><text:span text:style-name="T26">and&amp;#xc3</text:span><text:span text:style-name="T79">;</text:span><text:span text:style-name="T26">&amp;#xba</text:span><text:span text:style-name="T79">;</text:span><text:span text:style-name="T26"> </text:span></text:p>
      <text:p text:style-name="P118"><text:span text:style-name="T38"><text:s text:c="4"/></text:span><text:span text:style-name="T79">&lt;/</text:span><text:span text:style-name="T11">keyword</text:span><text:span text:style-name="T79">&gt;</text:span></text:p>
      <text:p text:style-name="P118"><text:span text:style-name="T38"><text:s text:c="2"/></text:span><text:span text:style-name="T79">&lt;/</text:span><text:span text:style-name="T11">Identifiers</text:span><text:span text:style-name="T79">&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71"/>
      <text:list xml:id="list230305023812116" text:continue-numbering="true" text:style-name="WW8Num24">
        <text:list-item>
          <text:list>
            <text:list-item>
              <text:h text:style-name="P246"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230304891903821" text:continue-numbering="true" text:style-name="WW8Num24">
        <text:list-item>
          <text:list>
            <text:list-item>
              <text:list>
                <text:list-item>
                  <text:h text:style-name="P260" text:outline-level="3">Simple definition</text:h>
                </text:list-item>
              </text:list>
            </text:list-item>
          </text:list>
        </text:list-item>
      </text:list>
      <text:p text:style-name="P15"/>
      <text:p text:style-name="P75"><text:bookmark text:name="result_box"/><text:span text:style-name="T136">The tokens by content, are defined rather like identifiers, but with more freedom in the start delimiter.</text:span> </text:p>
      <text:p text:style-name="P75"/>
      <text:p text:style-name="P15"><text:tab/>They are defined with the label &lt;Token&gt;, and <text:s/>using always the parameter “Content”.</text:p>
      <text:p text:style-name="P75"/>
      <text:p text:style-name="P75">It has the following valid parameters:</text:p>
      <text:p text:style-name="P7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5"/>
      <text:p text:style-name="P75">The definition of tokens by content, can take two forms:</text:p>
      <text:p text:style-name="P75"/>
      <text:p text:style-name="P118"><text:span text:style-name="T80"><text:s text:c="3"/></text:span><text:span text:style-name="T79">&lt;</text:span><text:span text:style-name="T11">Token </text:span><text:span text:style-name="T26">CharsStart</text:span><text:span text:style-name="T79">=</text:span><text:span text:style-name="T26">... Content</text:span><text:span text:style-name="T79">=</text:span><text:span text:style-name="T26"> ... </text:span><text:span text:style-name="T79">&gt;</text:span><text:span text:style-name="T26"> </text:span><text:span text:style-name="T79">&lt;/</text:span><text:span text:style-name="T11">Token</text:span><text:span text:style-name="T79">&gt;</text:span></text:p>
      <text:p text:style-name="P124"/>
      <text:p text:style-name="P118"><text:span text:style-name="T80"><text:s text:c="3"/></text:span><text:span text:style-name="T79">&lt;</text:span><text:span text:style-name="T11">Token </text:span><text:span text:style-name="T26">Start</text:span><text:span text:style-name="T79">=</text:span><text:span text:style-name="T26">... Content</text:span><text:span text:style-name="T79">=</text:span><text:span text:style-name="T26"> ... </text:span><text:span text:style-name="T79">&gt;</text:span><text:span text:style-name="T26"> </text:span><text:span text:style-name="T79">&lt;/</text:span><text:span text:style-name="T11">Token</text:span><text:span text:style-name="T79">&gt;</text:span></text:p>
      <text:p text:style-name="P75"/>
      <text:p text:style-name="P75"><text:soft-page-break/>The "Content" parameter is required, but the "CharsStart" and "Start", parameters can be exchanged.</text:p>
      <text:p text:style-name="P75"/>
      <text:p text:style-name="P75">We use "CharsStart" when we mean that a character (from a list) is sufficient to determine the start of a delimited token. </text:p>
      <text:p text:style-name="P75"/>
      <text:p text:style-name="P15"><text:tab/>For example a definition of this type would be:</text:p>
      <text:p text:style-name="P15"/>
      <text:p text:style-name="P118"><text:span text:style-name="T79">&lt;</text:span><text:span text:style-name="T11">Token </text:span><text:span text:style-name="T26">CharsStart</text:span><text:span text:style-name="T79">=</text:span><text:span text:style-name="T114">"0..9"</text:span><text:span text:style-name="T26"> Content </text:span><text:span text:style-name="T79">=</text:span><text:span text:style-name="T26"> </text:span><text:span text:style-name="T114">'0..9'</text:span><text:span text:style-name="T26"> Attribute</text:span><text:span text:style-name="T79">=</text:span><text:span text:style-name="T114">'NUMBER'</text:span><text:span text:style-name="T79">&gt;</text:span><text:span text:style-name="T26"> </text:span></text:p>
      <text:p text:style-name="P118"><text:span text:style-name="T79">&lt;/</text:span><text:span text:style-name="T11">Token</text:span><text:span text:style-name="T79">&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18"><text:span text:style-name="T38"><text:s text:c="2"/></text:span><text:span text:style-name="T79">&lt;</text:span><text:span text:style-name="T11">Token Start</text:span><text:span text:style-name="T79">=</text:span><text:span text:style-name="T114">"0x"</text:span><text:span text:style-name="T26"> Content </text:span><text:span text:style-name="T79">=</text:span><text:span text:style-name="T26"> </text:span><text:span text:style-name="T114">'0..9A..Ha.h'</text:span><text:span text:style-name="T26"> Attribute</text:span><text:span text:style-name="T79">=</text:span><text:span text:style-name="T114">'STRING'</text:span><text:span text:style-name="T79">&gt;</text:span><text:span text:style-name="T26"> </text:span><text:span text:style-name="T79">&lt;/</text:span><text:span text:style-name="T11">Token</text:span><text:span text:style-name="T79">&gt;</text:span></text:p>
      <text:p text:style-name="P15"/>
      <text:p text:style-name="P15"><text:tab/>This example can be used to identify the hexadecimal numbers in C.</text:p>
      <text:p text:style-name="P15"/>
      <text:p text:style-name="P37"><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18"><text:span text:style-name="T79">&lt;</text:span><text:span text:style-name="T11">Token </text:span><text:span text:style-name="T26">CharsStart</text:span><text:span text:style-name="T79">=</text:span><text:span text:style-name="T114">".0..9"</text:span><text:span text:style-name="T26"> Content </text:span><text:span text:style-name="T79">=</text:span><text:span text:style-name="T26"> </text:span><text:span text:style-name="T114">'0..9'</text:span><text:span text:style-name="T26"> Attribute</text:span><text:span text:style-name="T79">=</text:span><text:span text:style-name="T114">'NUMBER'</text:span><text:span text:style-name="T79">&gt;&lt;/</text:span><text:span text:style-name="T11">Token</text:span><text:span text:style-name="T79">&gt;</text:span></text:p>
      <text:p text:style-name="P15"/>
      <text:p text:style-name="P159">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18"><text:span text:style-name="T79">&lt;</text:span><text:span text:style-name="T11">Token </text:span><text:span text:style-name="T26">CharsStart</text:span><text:span text:style-name="T79">=</text:span><text:span text:style-name="T114">"#"</text:span><text:span text:style-name="T26"> Content </text:span><text:span text:style-name="T79">=</text:span><text:span text:style-name="T26"> </text:span><text:span text:style-name="T114">'0..9'</text:span><text:span text:style-name="T26"> Attribute</text:span><text:span text:style-name="T79">=</text:span><text:span text:style-name="T114">"</text:span><text:span text:style-name="T115">STRING</text:span><text:span text:style-name="T114">"</text:span><text:span text:style-name="T79">&gt;&lt;/</text:span><text:span text:style-name="T11">Token</text:span><text:span text:style-name="T79">&gt;</text:span></text:p>
      <text:p text:style-name="P15"><text:tab/></text:p>
      <text:p text:style-name="P15"><text:soft-page-break/></text:p>
      <text:list xml:id="list230304545677240" text:continue-numbering="true" text:style-name="WW8Num24">
        <text:list-item>
          <text:list>
            <text:list-item>
              <text:list>
                <text:list-item>
                  <text:h text:style-name="P256"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5">The simplified definition of tokens by content, can lead to confusion with the definition of identifiers.</text:p>
      <text:p text:style-name="P179"/>
      <text:p text:style-name="P15"><text:tab/>Note that the simplified form:</text:p>
      <text:p text:style-name="P15"/>
      <text:p text:style-name="P118"><text:span text:style-name="T79">&lt;</text:span><text:span text:style-name="T11">Identifier </text:span><text:span text:style-name="T26">CharsStart</text:span><text:span text:style-name="T79">=</text:span><text:span text:style-name="T26"> </text:span><text:span text:style-name="T114">"A..Za..z"</text:span><text:span text:style-name="T26"> Content </text:span><text:span text:style-name="T79">=</text:span><text:span text:style-name="T26"> </text:span><text:span text:style-name="T114">"A..Za..z0..9_"</text:span><text:span text:style-name="T79">&gt;&lt;/</text:span><text:span text:style-name="T11">Identifier</text:span><text:span text:style-name="T79">&gt;</text:span></text:p>
      <text:p text:style-name="P15"/>
      <text:p text:style-name="P15"><text:tab/>It is different from the definition of identifiers:</text:p>
      <text:p text:style-name="P15"/>
      <text:p text:style-name="P118"><text:span text:style-name="T79">&lt;</text:span><text:span text:style-name="T11">Identifiers </text:span><text:span text:style-name="T26">CharsStart</text:span><text:span text:style-name="T79">=</text:span><text:span text:style-name="T26"> </text:span><text:span text:style-name="T114">"A..Za..z"</text:span><text:span text:style-name="T26"> Content </text:span><text:span text:style-name="T79">=</text:span><text:span text:style-name="T26"> </text:span><text:span text:style-name="T114">"A..Za..z0..9_"</text:span><text:span text:style-name="T79">&gt;&lt;/</text:span><text:span text:style-name="T11">Identifiers</text:span><text:span text:style-name="T79">&gt;</text:span></text:p>
      <text:p text:style-name="P15"/>
      <text:p text:style-name="P15"><text:tab/>The first is a simplified form of:</text:p>
      <text:p text:style-name="P15"/>
      <text:p text:style-name="P118"><text:span text:style-name="T79">&lt;</text:span><text:span text:style-name="T11">Token </text:span><text:span text:style-name="T26">CharsStart</text:span><text:span text:style-name="T79">=</text:span><text:span text:style-name="T26"> </text:span><text:span text:style-name="T114">"A..Za..z"</text:span><text:span text:style-name="T26"> Content </text:span><text:span text:style-name="T79">=</text:span><text:span text:style-name="T26"> </text:span><text:span text:style-name="T114">"A..Za..z0..9_" </text:span><text:span text:style-name="T26">Attribute</text:span><text:span text:style-name="T79">=</text:span><text:span text:style-name="T114">'IDENTIFIER'</text:span><text:span text:style-name="T79">&gt;</text:span></text:p>
      <text:p text:style-name="P118"><text:span text:style-name="T79">&lt;/</text:span><text:span text:style-name="T11">Token</text:span><text:span text:style-name="T79">&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230305213656956" text:continue-numbering="true" text:style-name="WW8Num24">
        <text:list-item>
          <text:list>
            <text:list-item>
              <text:list>
                <text:list-item>
                  <text:h text:style-name="P262"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able:table table:name="Tabla8" table:style-name="Tabla8">
        <table:table-column table:style-name="Tabla8.A"/>
        <table:table-column table:style-name="Tabla8.B"/>
        <table:table-row table:style-name="Tabla8.1">
          <table:table-cell table:style-name="Tabla8.A1" office:value-type="string">
            <text:p text:style-name="P201">SECUENCIA</text:p>
          </table:table-cell>
          <table:table-cell table:style-name="Tabla8.B1" office:value-type="string">
            <text:p text:style-name="P201">SIGNIFICADO</text:p>
          </table:table-cell>
        </table:table-row>
        <table:table-row table:style-name="Tabla8.2">
          <table:table-cell table:style-name="Tabla8.A2" office:value-type="string">
            <text:p text:style-name="P202">\d</text:p>
          </table:table-cell>
          <table:table-cell table:style-name="Tabla8.B2" office:value-type="string">
            <text:p text:style-name="P202">It indicates a numeric character. It is equivalent to [0-9]</text:p>
          </table:table-cell>
        </table:table-row>
        <table:table-row table:style-name="Tabla8.2">
          <table:table-cell table:style-name="Tabla8.A2" office:value-type="string">
            <text:p text:style-name="P202">\D</text:p>
          </table:table-cell>
          <table:table-cell table:style-name="Tabla8.B2" office:value-type="string">
            <text:p text:style-name="P202">It indicates a non numeric character. It is equivalent to [^0-9]</text:p>
          </table:table-cell>
        </table:table-row>
        <table:table-row table:style-name="Tabla8.4">
          <table:table-cell table:style-name="Tabla8.A2" office:value-type="string">
            <text:p text:style-name="P202">\a</text:p>
          </table:table-cell>
          <table:table-cell table:style-name="Tabla8.B2" office:value-type="string">
            <text:p text:style-name="P202">It is equivalent to [A-Za-z]</text:p>
          </table:table-cell>
        </table:table-row>
        <table:table-row table:style-name="Tabla8.4">
          <table:table-cell table:style-name="Tabla8.A2" office:value-type="string">
            <text:p text:style-name="P202">\w</text:p>
          </table:table-cell>
          <table:table-cell table:style-name="Tabla8.B2" office:value-type="string">
            <text:p text:style-name="P202">It indicates an alphanumeric character. It is equivalent to [A-Za-z0-9]</text:p>
          </table:table-cell>
        </table:table-row>
        <table:table-row table:style-name="Tabla8.4">
          <table:table-cell table:style-name="Tabla8.A2" office:value-type="string">
            <text:p text:style-name="P202">\W</text:p>
          </table:table-cell>
          <table:table-cell table:style-name="Tabla8.B2" office:value-type="string">
            <text:p text:style-name="P202">It indicates an non alphanumeric character. It is equivalent to [^A-Za-z0-9]</text:p>
          </table:table-cell>
        </table:table-row>
        <table:table-row table:style-name="Tabla8.7">
          <table:table-cell table:style-name="Tabla8.A2" office:value-type="string">
            <text:p text:style-name="P202">\s</text:p>
          </table:table-cell>
          <table:table-cell table:style-name="Tabla8.B2" office:value-type="string">
            <text:p text:style-name="P202">It indicates an space.</text:p>
          </table:table-cell>
        </table:table-row>
        <table:table-row table:style-name="Tabla8.8">
          <table:table-cell table:style-name="Tabla8.A2" office:value-type="string">
            <text:p text:style-name="P202">\S</text:p>
          </table:table-cell>
          <table:table-cell table:style-name="Tabla8.B2" office:value-type="string">
            <text:p text:style-name="P202">It indicates an non space.</text:p>
          </table:table-cell>
        </table:table-row>
        <table:table-row table:style-name="Tabla8.9">
          <table:table-cell table:style-name="Tabla8.A2" office:value-type="string">
            <text:p text:style-name="P202">\t</text:p>
          </table:table-cell>
          <table:table-cell table:style-name="Tabla8.B2" office:value-type="string">
            <text:p text:style-name="P202">The tab character</text:p>
          </table:table-cell>
        </table:table-row>
        <table:table-row table:style-name="Tabla8.10">
          <table:table-cell table:style-name="Tabla8.A2" office:value-type="string">
            <text:p text:style-name="P202">.</text:p>
          </table:table-cell>
          <table:table-cell table:style-name="Tabla8.B2" office:value-type="string">
            <text:p text:style-name="P202">Any character.</text:p>
          </table:table-cell>
        </table:table-row>
        <table:table-row table:style-name="Tabla8.10">
          <table:table-cell table:style-name="Tabla8.A2" office:value-type="string">
            <text:p text:style-name="P202">\x$$</text:p>
          </table:table-cell>
          <table:table-cell table:style-name="Tabla8.B2" office:value-type="string">
            <text:p text:style-name="P202">It indicates an ASCII character, where "$$" is the hexadecimal ASCII code .</text:p>
          </table:table-cell>
        </table:table-row>
      </table:table>
      <text:p text:style-name="P26"/>
      <text:p text:style-name="P26"/>
      <text:p text:style-name="P54"> </text:p>
      <text:list xml:id="list230306216876428" text:continue-numbering="true" text:style-name="WW8Num24">
        <text:list-item>
          <text:list>
            <text:list-item>
              <text:list>
                <text:list-item>
                  <text:h text:style-name="P262" text:outline-level="3">Definition using Regex</text:h>
                </text:list-item>
              </text:list>
            </text:list-item>
          </text:list>
        </text:list-item>
      </text:list>
      <text:p text:style-name="P62"> </text:p>
      <text:p text:style-name="P62"><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9"/>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6">Regular expressions to define the scope of the token.</text:p>
          </table:table-cell>
        </table:table-row>
        <table:table-row table:style-name="Tabla4.1">
          <table:table-cell table:style-name="Tabla4.A1" office:value-type="string">
            <text:p text:style-name="P17"><text:span text:style-name="T133">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136">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52"/>
      <text:p text:style-name="P62">             <text:bookmark text:name="result_box19"/><text:span text:style-name="T7">An example of definition to extract numbers, would be:</text:span><text:span text:style-name="T1"> </text:span></text:p>
      <text:p text:style-name="P62"> </text:p>
      <text:p text:style-name="P147"><text:span text:style-name="T83">&lt;</text:span><text:span text:style-name="T16">Token </text:span><text:span text:style-name="T56">CharsStart</text:span><text:span text:style-name="T83">=</text:span><text:span text:style-name="T118">"0..9"</text:span><text:span text:style-name="T24"> </text:span><text:span text:style-name="T56">Regex</text:span><text:span text:style-name="T83">=</text:span><text:span text:style-name="T118">"[0</text:span><text:span text:style-name="T119">-</text:span><text:span text:style-name="T118">9]</text:span><text:span text:style-name="T119">*</text:span><text:span text:style-name="T118">"</text:span><text:span text:style-name="T24"> </text:span><text:span text:style-name="T56">Attribute</text:span><text:span text:style-name="T83">=</text:span><text:span text:style-name="T118">'NUMBER'</text:span><text:span text:style-name="T83">&gt;</text:span><text:span text:style-name="T24"> </text:span></text:p>
      <text:p text:style-name="P147"><text:span text:style-name="T83">&lt;/</text:span><text:span text:style-name="T16">Token</text:span><text:span text:style-name="T83">&gt;</text:span></text:p>
      <text:p text:style-name="P62"> </text:p>
      <text:p text:style-name="P62">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62"> </text:p>
      <text:p text:style-name="P157"><text:span text:style-name="Source_20_Text"><text:span text:style-name="T76">   </text:span></text:span><text:span text:style-name="Source_20_Text"><text:span text:style-name="T89">&lt;</text:span></text:span><text:span text:style-name="Source_20_Text"><text:span text:style-name="T19">Token </text:span></text:span><text:span text:style-name="T19">Start</text:span><text:span text:style-name="T89">=</text:span><text:span text:style-name="T127">"a"</text:span><text:span text:style-name="T76"> </text:span><text:span text:style-name="Source_20_Text"><text:span text:style-name="T76">Regex</text:span></text:span><text:span text:style-name="Source_20_Text"><text:span text:style-name="T89">=</text:span></text:span><text:span text:style-name="Source_20_Text"><text:span text:style-name="T127">"[0</text:span></text:span><text:span text:style-name="Source_20_Text"><text:span text:style-name="T126">-</text:span></text:span><text:span text:style-name="Source_20_Text"><text:span text:style-name="T127">9]b"</text:span></text:span><text:span text:style-name="Source_20_Text"><text:span text:style-name="T76"> </text:span></text:span><text:span text:style-name="Source_20_Text"><text:span text:style-name="T19">Attribute</text:span></text:span><text:span text:style-name="Source_20_Text"><text:span text:style-name="T89">=</text:span></text:span><text:span text:style-name="Source_20_Text"><text:span text:style-name="T127">'Number'</text:span></text:span><text:span text:style-name="Source_20_Text"><text:span text:style-name="T89">&gt;</text:span></text:span><text:span text:style-name="Source_20_Text"><text:span text:style-name="T76"> </text:span></text:span><text:span text:style-name="Source_20_Text"><text:span text:style-name="T89">&lt;/</text:span></text:span><text:span text:style-name="Source_20_Text"><text:span text:style-name="T19">Token</text:span></text:span><text:span text:style-name="Source_20_Text"><text:span text:style-name="T89">&gt;</text:span></text:span></text:p>
      <text:p text:style-name="P62"> </text:p>
      <text:p text:style-name="P62">            <text:span text:style-name="T2">W</text:span><text:span text:style-name="T8">ill </text:span><text:span text:style-name="T7">coincide with "A1b" or "A1B" if it has "CaseSensitive" set to FALSE. The ranges in brackets are always case sensitive.<text:line-break/><text:line-break/><text:tab/>A more elaborate example, to recognize decimal number would be:</text:span><text:span text:style-name="T1"> </text:span></text:p>
      <text:p text:style-name="P62"><text:soft-page-break/> </text:p>
      <text:p text:style-name="P147"><text:span text:style-name="T83">&lt;</text:span><text:span text:style-name="T16">Token </text:span><text:span text:style-name="T56">CharsStart</text:span><text:span text:style-name="T83">=</text:span><text:span text:style-name="T118">"0..9"</text:span><text:span text:style-name="T24"> </text:span><text:span text:style-name="T56">Regex </text:span><text:span text:style-name="T83">=</text:span><text:span text:style-name="T24"> </text:span><text:span text:style-name="T118">'[0</text:span><text:span text:style-name="T119">-</text:span><text:span text:style-name="T118">9]</text:span><text:span text:style-name="T119">*</text:span><text:span text:style-name="T118">[\.]?[0</text:span><text:span text:style-name="T119">-</text:span><text:span text:style-name="T118">9]+'</text:span><text:span text:style-name="T24"> </text:span><text:span text:style-name="T56">Attribute</text:span><text:span text:style-name="T83">=</text:span><text:span text:style-name="T118">'NUMBER'</text:span><text:span text:style-name="T83">&gt;</text:span></text:p>
      <text:p text:style-name="P147"><text:span text:style-name="T83">&lt;/</text:span><text:span text:style-name="T16">Token</text:span><text:span text:style-name="T83">&gt;</text:span></text:p>
      <text:p text:style-name="P62"> </text:p>
      <text:p text:style-name="P62">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62"> </text:p>
      <text:p text:style-name="P147"><text:span text:style-name="T83">&lt;</text:span><text:span text:style-name="T16">Token </text:span><text:span text:style-name="T56">CharsStart</text:span><text:span text:style-name="T83">=</text:span><text:span text:style-name="T118">"0..9"</text:span><text:span text:style-name="T24"> </text:span><text:span text:style-name="T56">Regex</text:span><text:span text:style-name="T83">="</text:span><text:span text:style-name="T118">[a-z][0-9]</text:span><text:span text:style-name="T83">"</text:span><text:span text:style-name="T24"> </text:span><text:span text:style-name="T56">Attribute</text:span><text:span text:style-name="T83">=</text:span><text:span text:style-name="T118">'EJEMPLO'</text:span><text:span text:style-name="T83">&gt;</text:span><text:span text:style-name="T24"> </text:span></text:p>
      <text:p text:style-name="P147"><text:span text:style-name="T83">&lt;/</text:span><text:span text:style-name="T16">Token</text:span><text:span text:style-name="T83">&gt;</text:span></text:p>
      <text:p text:style-name="P62"> </text:p>
      <text:p text:style-name="P62">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62"> </text:p>
      <text:p text:style-name="P147"><text:span text:style-name="T83">&lt;</text:span><text:span text:style-name="T16">Token </text:span><text:span text:style-name="T56">CharsStart</text:span><text:span text:style-name="T83">=</text:span><text:span text:style-name="T118">"0..9"</text:span><text:span text:style-name="T24"> </text:span><text:span text:style-name="T56">Regex</text:span><text:span text:style-name="T83">=</text:span><text:span text:style-name="T118">"[a</text:span><text:span text:style-name="T119">-</text:span><text:span text:style-name="T118">z][0</text:span><text:span text:style-name="T119">-</text:span><text:span text:style-name="T118">9]"</text:span><text:span text:style-name="T24"> </text:span><text:span text:style-name="T56">RegexMatch</text:span><text:span text:style-name="T83">=</text:span><text:span text:style-name="T118">"Complete"</text:span></text:p>
      <text:p text:style-name="P147"><text:span text:style-name="T24">       </text:span><text:span text:style-name="T56">Attribute</text:span><text:span text:style-name="T83">=</text:span><text:span text:style-name="T118">'SAMPLE'</text:span><text:span text:style-name="T83">&gt;</text:span><text:span text:style-name="T24"> </text:span></text:p>
      <text:p text:style-name="P147"><text:span text:style-name="T83">&lt;/</text:span><text:span text:style-name="T16">Token</text:span><text:span text:style-name="T83">&gt;</text:span></text:p>
      <text:p text:style-name="P63"> </text:p>
      <text:p text:style-name="P63">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7"><text:line-break/><text:tab/>If you try to define a token with an invalid expression, the highlighter will generate an exception with an error message.</text:p>
      <text:p text:style-name="P63"><text:span text:style-name="T7"><text:line-break/><text:tab/>Unlike the simple definition, tokens with regular expressions, allowing more power to define the characters following the starting delimiter.</text:span><text:span text:style-name="T1"> </text:span></text:p>
      <text:p text:style-name="P66"/>
      <text:list xml:id="list230304643877061" text:continue-numbering="true" text:style-name="WW8Num24">
        <text:list-item>
          <text:list>
            <text:list-item>
              <text:list>
                <text:list-item>
                  <text:h text:style-name="P259" text:outline-level="3"><text:bookmark text:name="result_box30"/><text:soft-page-break/><text:span text:style-name="T142">Simplified definition using regular expressions</text:span><text:span text:style-name="T140"> </text:span></text:h>
                </text:list-item>
              </text:list>
            </text:list-item>
          </text:list>
        </text:list-item>
      </text:list>
      <text:p text:style-name="P62"> </text:p>
      <text:p text:style-name="P8"><text:bookmark text:name="result_box23"/><text:span text:style-name="T136"><text:tab/>It is possible to dispense with the "Start" and "CharsStart" parameters to define a token by content, so that only the regular expression is specified:<text:line-break/><text:line-break/><text:tab/>For example, it can be easily defined numbers with decimal:</text:span> </text:p>
      <text:p text:style-name="P62"> </text:p>
      <text:p text:style-name="P147"><text:span text:style-name="T83">&lt;</text:span><text:span text:style-name="T16">Token </text:span><text:span text:style-name="T56">regex </text:span><text:span text:style-name="T83">=</text:span><text:span text:style-name="T24"> </text:span><text:span text:style-name="T118">'[0</text:span><text:span text:style-name="T119">-</text:span><text:span text:style-name="T118">9][0</text:span><text:span text:style-name="T119">-</text:span><text:span text:style-name="T118">9]</text:span><text:span text:style-name="T119">*</text:span><text:span text:style-name="T118">[\.][0</text:span><text:span text:style-name="T119">-</text:span><text:span text:style-name="T118">9]</text:span><text:span text:style-name="T119">*</text:span><text:span text:style-name="T118">'</text:span><text:span text:style-name="T24"> </text:span><text:span text:style-name="T56">Attribute</text:span><text:span text:style-name="T83">=</text:span><text:span text:style-name="T118">'NUMBER'</text:span><text:span text:style-name="T83">&gt;</text:span><text:span text:style-name="T24"> </text:span></text:p>
      <text:p text:style-name="P147"><text:span text:style-name="T83">&lt;/</text:span><text:span text:style-name="T16">Token</text:span><text:span text:style-name="T83">&gt;</text:span></text:p>
      <text:p text:style-name="P62"> </text:p>
      <text:p text:style-name="P8"><text:bookmark text:name="result_box24"/><text:span text:style-name="T136"><text:tab/>And floating point numbers with scientific notation:</text:span> </text:p>
      <text:p text:style-name="P62"> </text:p>
      <text:p text:style-name="P147"><text:span text:style-name="T83">&lt;</text:span><text:span text:style-name="T16">Token </text:span><text:span text:style-name="T56">regex </text:span><text:span text:style-name="T83">=</text:span><text:span text:style-name="T24"> </text:span><text:span text:style-name="T118">'[0</text:span><text:span text:style-name="T119">-</text:span><text:span text:style-name="T118">9][0</text:span><text:span text:style-name="T119">-</text:span><text:span text:style-name="T118">9]</text:span><text:span text:style-name="T119">*</text:span><text:span text:style-name="T118">[\.]?[0</text:span><text:span text:style-name="T119">-</text:span><text:span text:style-name="T118">9]</text:span><text:span text:style-name="T119">*</text:span><text:span text:style-name="T118">[eE][</text:span><text:span text:style-name="T119">+-</text:span><text:span text:style-name="T118">]?[0</text:span><text:span text:style-name="T119">-</text:span><text:span text:style-name="T118">9]</text:span><text:span text:style-name="T119">+</text:span><text:span text:style-name="T118">'</text:span><text:span text:style-name="T24"> </text:span><text:span text:style-name="T56">Attribute</text:span><text:span text:style-name="T83">=</text:span><text:span text:style-name="T118">'NUMBER'</text:span><text:span text:style-name="T83">&gt;</text:span></text:p>
      <text:p text:style-name="P147"><text:span text:style-name="T83">&lt;/</text:span><text:span text:style-name="T16">Token</text:span><text:span text:style-name="T83">&gt;</text:span></text:p>
      <text:p text:style-name="P62"> </text:p>
      <text:p text:style-name="P62">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62"> </text:p>
      <text:p text:style-name="P147"><text:span text:style-name="T83">&lt;</text:span><text:span text:style-name="T16">Token </text:span><text:span text:style-name="T56">Regex</text:span><text:span text:style-name="T83">="</text:span><text:span text:style-name="T118">[0-9][0-9]*</text:span><text:span text:style-name="T83">"</text:span><text:span text:style-name="T24"> </text:span><text:span text:style-name="T56">Attribute</text:span><text:span text:style-name="T83">=</text:span><text:span text:style-name="T118">'NUMBER'</text:span><text:span text:style-name="T83">&gt;</text:span><text:span text:style-name="T24"> </text:span></text:p>
      <text:p text:style-name="P147"><text:span text:style-name="T83">&lt;/</text:span><text:span text:style-name="T16">Token</text:span><text:span text:style-name="T83">&gt;</text:span></text:p>
      <text:p text:style-name="P62"> </text:p>
      <text:p text:style-name="P62">            <text:bookmark text:name="result_box26"/><text:span text:style-name="T7">It is equivalent to</text:span><text:span text:style-name="T1">:</text:span></text:p>
      <text:p text:style-name="P62"> </text:p>
      <text:p text:style-name="P147"><text:span text:style-name="T83">&lt;</text:span><text:span text:style-name="T16">Token </text:span><text:span text:style-name="T56">CharsStart</text:span><text:span text:style-name="T83">=</text:span><text:span text:style-name="T118">"0..9"</text:span><text:span text:style-name="T24"> </text:span><text:span text:style-name="T56">Regex</text:span><text:span text:style-name="T83">="</text:span><text:span text:style-name="T118">[0-9]*</text:span><text:span text:style-name="T83">"</text:span><text:span text:style-name="T24"> </text:span><text:span text:style-name="T56">Attribute</text:span><text:span text:style-name="T83">=</text:span><text:span text:style-name="T118">'NUMBER'</text:span><text:span text:style-name="T83">&gt;</text:span><text:span text:style-name="T24"> </text:span></text:p>
      <text:p text:style-name="P147"><text:span text:style-name="T83">&lt;/</text:span><text:span text:style-name="T16">Token</text:span><text:span text:style-name="T83">&gt;</text:span></text:p>
      <text:p text:style-name="P62"> </text:p>
      <text:p text:style-name="P62">            <text:bookmark text:name="result_box27"/><text:span text:style-name="T7">As the first part of "regex" is used to define the starting delimiter, it can be deduced that the following considerations apply:</text:span><text:span text:style-name="T1"> </text:span></text:p>
      <text:p text:style-name="P62">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8" office:value-type="string">
            <text:p text:style-name="P73"><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73">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200"/>
          </table:table-cell>
        </table:table-row>
        <table:table-row>
          <table:table-cell table:style-name="Tabla2.A8" office:value-type="string">
            <text:p text:style-name="P24">CONSIDERATION 2: </text:p>
          </table:table-cell>
        </table:table-row>
        <table:table-row>
          <table:table-cell table:style-name="Tabla2.A8" office:value-type="string">
            <text:p text:style-name="P172"><text:bookmark text:name="result_box31"/><text:span text:style-name="T136"><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8" office:value-type="string">
            <text:p text:style-name="P24">CONSIDERATION 3: </text:p>
          </table:table-cell>
        </table:table-row>
        <table:table-row>
          <table:table-cell table:style-name="Tabla2.A8" office:value-type="string">
            <text:p text:style-name="P172"><text:bookmark text:name="result_box32"/><text:span text:style-name="T136"><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8" office:value-type="string">
            <text:p text:style-name="P24">CONSIDERATION 4: </text:p>
          </table:table-cell>
        </table:table-row>
        <table:table-row>
          <table:table-cell table:style-name="Tabla2.A8" office:value-type="string">
            <text:p text:style-name="P172"><text:bookmark text:name="result_box33"/><text:span text:style-name="T136"><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62"/>
      <text:p text:style-name="P62"/>
      <text:list xml:id="list230305140567595" text:continue-numbering="true" text:style-name="WW8Num24">
        <text:list-item>
          <text:list>
            <text:list-item>
              <text:list>
                <text:list-item>
                  <text:h text:style-name="P258" text:outline-level="3"><text:bookmark text:name="result_box34"/><text:span text:style-name="T136">Advanced Definition using regular expressions</text:span> </text:h>
                </text:list-item>
              </text:list>
            </text:list-item>
          </text:list>
        </text:list-item>
      </text:list>
      <text:p text:style-name="P62"> </text:p>
      <text:p text:style-name="P8"><text:bookmark text:name="result_box35"/><text:span text:style-name="T136"><text:tab/>The common definition of tokens using regular expressions, or the simplified definition, can not take too much control over the extraction of tokens. Just extract to where the expression is </text:span><text:soft-page-break/><text:span text:style-name="T136">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62"> </text:p>
      <text:p text:style-name="P147"><text:span text:style-name="T83">&lt;</text:span><text:span text:style-name="T16">Token </text:span><text:span text:style-name="T56">CharsStart</text:span><text:span text:style-name="T83">=</text:span><text:span text:style-name="T118">"0..9"</text:span><text:span text:style-name="T24"> </text:span><text:span text:style-name="T56">Regex </text:span><text:span text:style-name="T83">=</text:span><text:span text:style-name="T24"> </text:span><text:span text:style-name="T118">'[0</text:span><text:span text:style-name="T119">-</text:span><text:span text:style-name="T118">9]</text:span><text:span text:style-name="T119">*</text:span><text:span text:style-name="T118">\.?[0</text:span><text:span text:style-name="T119">-</text:span><text:span text:style-name="T118">9]</text:span><text:span text:style-name="T119">*</text:span><text:span text:style-name="T118"> '</text:span><text:span text:style-name="T24"> </text:span><text:span text:style-name="T16">Attribute</text:span><text:span text:style-name="T83">=</text:span><text:span text:style-name="T118">'NUMBER'</text:span><text:span text:style-name="T83">&gt;</text:span><text:span text:style-name="T24"> </text:span><text:span text:style-name="T83">&lt;/</text:span><text:span text:style-name="T16">Token</text:span><text:span text:style-name="T83">&gt;</text:span></text:p>
      <text:p text:style-name="P62">  </text:p>
      <text:p text:style-name="P8"><text:span text:style-name="T136"><text:tab/>Expressed in the advanced form, would be:</text:span> </text:p>
      <text:p text:style-name="P62"> </text:p>
      <text:p text:style-name="P147"><text:span text:style-name="T83">&lt;</text:span><text:span text:style-name="T16">Token </text:span><text:span text:style-name="T56">CharsStart</text:span><text:span text:style-name="T83">=</text:span><text:span text:style-name="T118">"0..9"</text:span><text:span text:style-name="T24"> </text:span><text:span text:style-name="T16">Attribute</text:span><text:span text:style-name="T83">=</text:span><text:span text:style-name="T118">'NUMBER'</text:span><text:span text:style-name="T83">&gt;</text:span><text:span text:style-name="T24"> </text:span></text:p>
      <text:p text:style-name="P147"><text:span text:style-name="T24">  </text:span><text:span text:style-name="T83">&lt;</text:span><text:span text:style-name="T56">Regex Text</text:span><text:span text:style-name="T83">=</text:span><text:span text:style-name="T118">"[0</text:span><text:span text:style-name="T119">-</text:span><text:span text:style-name="T118">9]</text:span><text:span text:style-name="T119">*</text:span><text:span text:style-name="T118">"</text:span><text:span text:style-name="T24"> </text:span><text:span text:style-name="T83">&gt;&lt;/</text:span><text:span text:style-name="T56">Regex</text:span><text:span text:style-name="T83">&gt;</text:span></text:p>
      <text:p text:style-name="P147"><text:span text:style-name="T24">  </text:span><text:span text:style-name="T83">&lt;</text:span><text:span text:style-name="T56">Regex Text</text:span><text:span text:style-name="T83">=</text:span><text:span text:style-name="T118">"\.?"</text:span><text:span text:style-name="T24"> </text:span><text:span text:style-name="T83">&gt;&lt;/</text:span><text:span text:style-name="T56">Regex</text:span><text:span text:style-name="T83">&gt;</text:span></text:p>
      <text:p text:style-name="P147"><text:span text:style-name="T24">  </text:span><text:span text:style-name="T83">&lt;</text:span><text:span text:style-name="T56">Regex Text</text:span><text:span text:style-name="T83">=</text:span><text:span text:style-name="T118">"[0</text:span><text:span text:style-name="T119">-</text:span><text:span text:style-name="T118">9]</text:span><text:span text:style-name="T119">*</text:span><text:span text:style-name="T118">"</text:span><text:span text:style-name="T24"> </text:span><text:span text:style-name="T83">&gt;&lt;/</text:span><text:span text:style-name="T56">Regex</text:span><text:span text:style-name="T83">&gt;</text:span></text:p>
      <text:p text:style-name="P147"><text:span text:style-name="T24"> </text:span><text:span text:style-name="T83">&lt;/</text:span><text:span text:style-name="T16">Token</text:span><text:span text:style-name="T83">&gt;</text:span></text:p>
      <text:p text:style-name="P62">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136">Text of the regex. It should be a simple expression or string literal list with or without quantifier, according to that indicated in </text:span><text:span text:style-name="T136"><text:bookmark-ref text:reference-format="number-all-superior" text:ref-name="__RefHeading__25575_410639408">4.6.3</text:bookmark-ref></text:span><text:span text:style-name="T136"> - </text:span><text:span text:style-name="T136"><text:bookmark-ref text:reference-format="text" text:ref-name="__RefHeading__25575_410639408">Regular Expressions</text:bookmark-ref></text:span><text:span text:style-name="T136">.</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136">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73"/>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136">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63"> </text:p>
      <text:p text:style-name="P147"><text:span text:style-name="T24"> </text:span><text:span text:style-name="T83">&lt;</text:span><text:span text:style-name="T16">Token </text:span><text:span text:style-name="T56">CharsStart</text:span><text:span text:style-name="T83">=</text:span><text:span text:style-name="T118">"0..9"</text:span><text:span text:style-name="T24"> </text:span><text:span text:style-name="T16">Attribute</text:span><text:span text:style-name="T83">=</text:span><text:span text:style-name="T118">'NUMBER'</text:span><text:span text:style-name="T83">&gt;</text:span><text:span text:style-name="T24"> </text:span></text:p>
      <text:p text:style-name="P147"><text:span text:style-name="T24">   </text:span><text:span text:style-name="T83">&lt;</text:span><text:span text:style-name="T56">Regex Text</text:span><text:span text:style-name="T83">=</text:span><text:span text:style-name="T118">"[0</text:span><text:span text:style-name="T119">-</text:span><text:span text:style-name="T118">9]</text:span><text:span text:style-name="T119">*</text:span><text:span text:style-name="T118">"</text:span><text:span text:style-name="T24"> </text:span><text:span text:style-name="T83">/&gt;</text:span></text:p>
      <text:p text:style-name="P147"><text:span text:style-name="T24">   </text:span><text:span text:style-name="T83">&lt;</text:span><text:span text:style-name="T56">Regex Text</text:span><text:span text:style-name="T83">=</text:span><text:span text:style-name="T118">"[\.]"</text:span><text:span text:style-name="T24"> </text:span><text:span text:style-name="T56">IfFalse</text:span><text:span text:style-name="T83">=</text:span><text:span text:style-name="T118">'move</text:span><text:span text:style-name="T119">(+</text:span><text:span text:style-name="T118">2</text:span><text:span text:style-name="T119">)</text:span><text:span text:style-name="T118">'</text:span><text:span text:style-name="T24"> </text:span><text:span text:style-name="T83">/&gt;</text:span></text:p>
      <text:p text:style-name="P147"><text:span text:style-name="T24">   </text:span><text:span text:style-name="T83">&lt;</text:span><text:span text:style-name="T56">Regex Text</text:span><text:span text:style-name="T83">=</text:span><text:span text:style-name="T118">"[0</text:span><text:span text:style-name="T119">-</text:span><text:span text:style-name="T118">9]</text:span><text:span text:style-name="T119">+</text:span><text:span text:style-name="T118">"</text:span><text:span text:style-name="T24"> </text:span><text:span text:style-name="T56">IfFalse</text:span><text:span text:style-name="T83">=</text:span><text:span text:style-name="T118">'exit</text:span><text:span text:style-name="T119">(-</text:span><text:span text:style-name="T118">1</text:span><text:span text:style-name="T119">)</text:span><text:span text:style-name="T118">'</text:span><text:span text:style-name="T24"> </text:span><text:span text:style-name="T83">/&gt;</text:span></text:p>
      <text:p text:style-name="P147"><text:span text:style-name="T24">   </text:span><text:span text:style-name="T83">&lt;</text:span><text:span text:style-name="T56">Regex Text</text:span><text:span text:style-name="T83">=</text:span><text:span text:style-name="T118">"[eE]"</text:span><text:span text:style-name="T24"> </text:span><text:span text:style-name="T83">/&gt;</text:span></text:p>
      <text:p text:style-name="P147"><text:span text:style-name="T24">   </text:span><text:span text:style-name="T83">&lt;</text:span><text:span text:style-name="T56">Regex Text</text:span><text:span text:style-name="T83">=</text:span><text:span text:style-name="T118">"[</text:span><text:span text:style-name="T119">+-</text:span><text:span text:style-name="T118">]?"</text:span><text:span text:style-name="T24"> </text:span><text:span text:style-name="T83">/&gt;</text:span></text:p>
      <text:p text:style-name="P147"><text:span text:style-name="T24">   </text:span><text:span text:style-name="T83">&lt;</text:span><text:span text:style-name="T56">Regex Text</text:span><text:span text:style-name="T83">=</text:span><text:span text:style-name="T118">"[0</text:span><text:span text:style-name="T119">-</text:span><text:span text:style-name="T118">9]</text:span><text:span text:style-name="T119">+</text:span><text:span text:style-name="T118">"</text:span><text:span text:style-name="T24"> </text:span><text:span text:style-name="T56">IfFalse</text:span><text:span text:style-name="T83">=</text:span><text:span text:style-name="T118">'exit</text:span><text:span text:style-name="T119">(-</text:span><text:span text:style-name="T118">2</text:span><text:span text:style-name="T119">)</text:span><text:span text:style-name="T118">'</text:span><text:span text:style-name="T24"> </text:span><text:span text:style-name="T83">/&gt;</text:span></text:p>
      <text:p text:style-name="P147"><text:span text:style-name="T24"> </text:span><text:span text:style-name="T83">&lt;/</text:span><text:span text:style-name="T16">Token</text:span><text:span text:style-name="T83">&gt;</text:span></text:p>
      <text:p text:style-name="P62">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8"> </text:p>
      <text:p text:style-name="P143">  <text:span text:style-name="T138">...</text:span></text:p>
      <text:p text:style-name="P152"><draw:custom-shape text:anchor-type="paragraph" draw:z-index="47" draw:style-name="gr5" draw:text-style-name="P271" svg:width="3.086cm" svg:height="4.696cm" draw:transform="rotate (-1.5707963267949) translate (15.1694444444444cm 0.204611111111111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4">  </text:span><text:span text:style-name="T83">&lt;</text:span><text:span text:style-name="T16">Regex </text:span><text:span text:style-name="T56">Text</text:span><text:span text:style-name="T83">=</text:span><text:span text:style-name="T118">"[0</text:span><text:span text:style-name="T119">-</text:span><text:span text:style-name="T118">9a</text:span><text:span text:style-name="T119">-</text:span><text:span text:style-name="T118">fA</text:span><text:span text:style-name="T119">-</text:span><text:span text:style-name="T118">F]</text:span><text:span text:style-name="T119">+</text:span><text:span text:style-name="T118">"</text:span><text:span text:style-name="T24"> </text:span><text:span text:style-name="T16">IfTrue</text:span><text:span text:style-name="T83">=</text:span><text:span text:style-name="T118">'move</text:span><text:span text:style-name="T119">(</text:span><text:span text:style-name="T118">6</text:span><text:span text:style-name="T119">)</text:span><text:span text:style-name="T118">'</text:span><text:span text:style-name="T24"> </text:span><text:span text:style-name="T16">IfFalse</text:span><text:span text:style-name="T83">=</text:span><text:span text:style-name="T118">'next'</text:span><text:span text:style-name="T83">&gt;&lt;/</text:span><text:span text:style-name="T16">Regex</text:span><text:span text:style-name="T83">&gt;</text:span></text:p>
      <text:p text:style-name="P152"><text:span text:style-name="T77">  </text:span><text:span text:style-name="T83">&lt;</text:span><text:span text:style-name="T56">!</text:span><text:span text:style-name="T110">--comment--&gt;</text:span></text:p>
      <text:p text:style-name="P152"><draw:frame text:anchor-type="paragraph" draw:z-index="48" draw:style-name="gr6" draw:text-style-name="P272" svg:width="3.088cm" svg:height="1.795cm" svg:x="11.85cm" svg:y="-0.021cm"><draw:text-box><text:p><text:span text:style-name="T168">move(-3) : </text:span></text:p><text:p><text:span text:style-name="T168">3 instructions back.</text:span></text:p></draw:text-box></draw:frame><text:span text:style-name="T24">  </text:span><text:span text:style-name="T83">&lt;</text:span><text:span text:style-name="T16">Regex </text:span><text:span text:style-name="T56">Text</text:span><text:span text:style-name="T83">=</text:span><text:span text:style-name="T56">"[^']</text:span><text:span text:style-name="T83">*</text:span><text:span text:style-name="T56">" </text:span><text:span text:style-name="T83">&gt;&lt;/</text:span><text:span text:style-name="T16">Regex</text:span><text:span text:style-name="T83">&gt;</text:span></text:p>
      <text:p text:style-name="P152"><text:span text:style-name="T24">  </text:span><text:span text:style-name="T83">&lt;</text:span><text:span text:style-name="T16">Regex </text:span><text:span text:style-name="T56">Text</text:span><text:span text:style-name="T83">=</text:span><text:span text:style-name="T56">"'" </text:span><text:span text:style-name="T16">IfTrue</text:span><text:span text:style-name="T83">=</text:span><text:span text:style-name="T56">'exit'</text:span><text:span text:style-name="T83">&gt;&lt;/</text:span><text:span text:style-name="T16">Regex</text:span><text:span text:style-name="T83">&gt;</text:span></text:p>
      <text:p text:style-name="P152"><text:span text:style-name="T77">  </text:span><text:span text:style-name="T83">&lt;</text:span><text:span text:style-name="T56">!</text:span><text:span text:style-name="T110">--</text:span><text:span text:style-name="T90"> comment</text:span><text:span text:style-name="T109"> </text:span><text:span text:style-name="T110">--&gt;</text:span></text:p>
      <text:p text:style-name="P152"><text:span text:style-name="T24">  </text:span><text:span text:style-name="T83">&lt;</text:span><text:span text:style-name="T16">Regex </text:span><text:span text:style-name="T56">Text</text:span><text:span text:style-name="T83">=</text:span><text:span text:style-name="T56">"'" </text:span><text:span text:style-name="T16">IfFalse</text:span><text:span text:style-name="T83">=</text:span><text:span text:style-name="T56">'move</text:span><text:span text:style-name="T83">(-</text:span><text:span text:style-name="T56">3</text:span><text:span text:style-name="T83">)</text:span><text:span text:style-name="T56">'</text:span><text:span text:style-name="T83">&gt;&lt;/</text:span><text:span text:style-name="T16">Regex</text:span><text:span text:style-name="T83">&gt;</text:span></text:p>
      <text:p text:style-name="P143">  <text:span text:style-name="T138">...</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8">  <text:span text:style-name="T138">...</text:span></text:p>
      <text:p text:style-name="P152"><text:span text:style-name="T24">  </text:span><text:span text:style-name="T83">&lt;</text:span><text:span text:style-name="T16">Regex </text:span><text:span text:style-name="T56">Text</text:span><text:span text:style-name="T83">=</text:span><text:span text:style-name="T118">"[0</text:span><text:span text:style-name="T119">-</text:span><text:span text:style-name="T118">9]</text:span><text:span text:style-name="T119">*</text:span><text:span text:style-name="T118">"</text:span><text:span text:style-name="T24"> </text:span><text:span text:style-name="T83">/&gt;</text:span></text:p>
      <text:p text:style-name="P152"><text:span text:style-name="T24">  </text:span><text:span text:style-name="T83">&lt;</text:span><text:span text:style-name="T16">Regex </text:span><text:span text:style-name="T56">Text</text:span><text:span text:style-name="T83">=</text:span><text:span text:style-name="T118">"[\.]"</text:span><text:span text:style-name="T24"> </text:span><text:span text:style-name="T16">IfFalse</text:span><text:span text:style-name="T83">=</text:span><text:span text:style-name="T118">'move</text:span><text:span text:style-name="T119">(+</text:span><text:span text:style-name="T118">2</text:span><text:span text:style-name="T119">)</text:span><text:span text:style-name="T118">'</text:span><text:span text:style-name="T24"> </text:span><text:span text:style-name="T83">/&gt;</text:span></text:p>
      <text:p text:style-name="P152"><text:span text:style-name="T24">  </text:span><text:span text:style-name="T83">&lt;</text:span><text:span text:style-name="T16">Regex </text:span><text:span text:style-name="T56">Text</text:span><text:span text:style-name="T83">=</text:span><text:span text:style-name="T118">"[0</text:span><text:span text:style-name="T119">-</text:span><text:span text:style-name="T118">9]</text:span><text:span text:style-name="T119">+</text:span><text:span text:style-name="T118">"</text:span><text:span text:style-name="T24"> </text:span><text:span text:style-name="T16">IfFalse</text:span><text:span text:style-name="T83">=</text:span><text:span text:style-name="T118">'exit</text:span><text:span text:style-name="T119">(-</text:span><text:span text:style-name="T118">1</text:span><text:span text:style-name="T119">)</text:span><text:span text:style-name="T118">'</text:span><text:span text:style-name="T24"> </text:span><text:span text:style-name="T83">/&gt;</text:span></text:p>
      <text:p text:style-name="P144">  <text:span text:style-name="T138">...</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9"> </text:p>
      <text:p text:style-name="P152"><text:span text:style-name="T24">  </text:span><text:span text:style-name="T83">&lt;</text:span><text:span text:style-name="T16">Regex </text:span><text:span text:style-name="T56">Text</text:span><text:span text:style-name="T83">=</text:span><text:span text:style-name="T118">"[\.]"</text:span><text:span text:style-name="T24"> </text:span><text:span text:style-name="T16">IfFalse</text:span><text:span text:style-name="T83">=</text:span><text:span text:style-name="T118">'move</text:span><text:span text:style-name="T119">(+</text:span><text:span text:style-name="T118">2</text:span><text:span text:style-name="T119">)</text:span><text:span text:style-name="T118">'</text:span><text:span text:style-name="T24"> </text:span><text:span text:style-name="T83">/&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6"> </text:p>
      <text:p text:style-name="P152"><text:span text:style-name="T24">  </text:span><text:span text:style-name="T83">&lt;</text:span><text:span text:style-name="T16">Token </text:span><text:span text:style-name="T56">CharsStart</text:span><text:span text:style-name="T83">=</text:span><text:span text:style-name="T56">"</text:span><text:span text:style-name="T118">'" </text:span><text:span text:style-name="T119">Attribute=</text:span><text:span text:style-name="T118">'</text:span><text:span text:style-name="T56">STRING'</text:span><text:span text:style-name="T83">&gt;</text:span><text:span text:style-name="T24"> </text:span></text:p>
      <text:p text:style-name="P152"><text:span text:style-name="T24">    </text:span><text:span text:style-name="T83">&lt;</text:span><text:span text:style-name="T16">Regex </text:span><text:span text:style-name="T56">Text</text:span><text:span text:style-name="T83">=</text:span><text:span text:style-name="T56">"[^']</text:span><text:span text:style-name="T83">*</text:span><text:span text:style-name="T56">" </text:span><text:span text:style-name="T83">&gt;&lt;/</text:span><text:span text:style-name="T16">Regex</text:span><text:span text:style-name="T83">&gt;</text:span></text:p>
      <text:p text:style-name="P152"><text:span text:style-name="T24">    </text:span><text:span text:style-name="T83">&lt;</text:span><text:span text:style-name="T16">Regex </text:span><text:span text:style-name="T56">Text</text:span><text:span text:style-name="T83">=</text:span><text:span text:style-name="T56">"'" </text:span><text:span text:style-name="T83">&gt;&lt;/</text:span><text:span text:style-name="T16">Regex</text:span><text:span text:style-name="T83">&gt;</text:span></text:p>
      <text:p text:style-name="P152"><text:span text:style-name="T24">    </text:span><text:span text:style-name="T83">&lt;</text:span><text:span text:style-name="T16">Regex </text:span><text:span text:style-name="T56">Text</text:span><text:span text:style-name="T83">=</text:span><text:span text:style-name="T56">'b' </text:span><text:span text:style-name="T16">IfTrue</text:span><text:span text:style-name="T83">=</text:span><text:span text:style-name="T56">'exit' </text:span><text:span text:style-name="T16">atTrue</text:span><text:span text:style-name="T83">=</text:span><text:span text:style-name="T56">'NUMBER' </text:span><text:span text:style-name="T16">IfFalse</text:span><text:span text:style-name="T83">=</text:span><text:span text:style-name="T56">'next'</text:span><text:span text:style-name="T83">&gt;&lt;/</text:span><text:span text:style-name="T16">Regex</text:span><text:span text:style-name="T83">&gt;</text:span></text:p>
      <text:p text:style-name="P152"><text:span text:style-name="T24">  </text:span><text:span text:style-name="T83">&lt;/</text:span><text:span text:style-name="T16">Token</text:span><text:span text:style-name="T83">&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
      <text:p text:style-name="P56"><text:tab/><text:span text:style-name="T162">The parameter</text:span> “Text” <text:span text:style-name="T162">can also evaluate</text:span> <text:span text:style-name="T162">the current token position</text:span>. <text:span text:style-name="T162">The next example shows how can be identified the first number as a comment while leaving the next numbers as common numbers</text:span>:</text:p>
      <text:p text:style-name="P69"/>
      <text:p text:style-name="P208"><text:span text:style-name="T83">&lt;</text:span><text:span text:style-name="T16">Token </text:span><text:span text:style-name="T56">CharsStart</text:span><text:span text:style-name="T83">=</text:span><text:span text:style-name="T118">"0..9"</text:span><text:span text:style-name="T24"> </text:span><text:span text:style-name="T16">Attribute</text:span><text:span text:style-name="T83">=</text:span><text:span text:style-name="T118">'Number'</text:span><text:span text:style-name="T83">&gt;</text:span></text:p>
      <text:p text:style-name="P208"><text:span text:style-name="T83"><text:s text:c="2"/>&lt;</text:span><text:span text:style-name="T16">Regex </text:span><text:span text:style-name="T56">Text</text:span><text:span text:style-name="T83">=</text:span><text:span text:style-name="T118">"[0</text:span><text:span text:style-name="T119">-</text:span><text:span text:style-name="T118">9]</text:span><text:span text:style-name="T119">*</text:span><text:span text:style-name="T118">"</text:span><text:span text:style-name="T24"> </text:span><text:span text:style-name="T83">/&gt;</text:span></text:p>
      <text:p text:style-name="P208"><text:span text:style-name="T83"><text:s text:c="2"/>&lt;</text:span><text:span text:style-name="T16">Regex </text:span><text:span text:style-name="T56">Text</text:span><text:span text:style-name="T83">=</text:span><text:span text:style-name="T118">"TokPos</text:span><text:span text:style-name="T119">=</text:span><text:span text:style-name="T118">1"</text:span><text:span text:style-name="T24"> </text:span><text:span text:style-name="T16">atTrue</text:span><text:span text:style-name="T83">=</text:span><text:span text:style-name="T118">"</text:span><text:span text:style-name="T119">Comment</text:span><text:span text:style-name="T118">"</text:span><text:span text:style-name="T24"> </text:span><text:span text:style-name="T83">/&gt;</text:span></text:p>
      <text:p text:style-name="P208"><text:span text:style-name="T83">&lt;/</text:span><text:span text:style-name="T16">Token</text:span><text:span text:style-name="T83">&gt;</text:span></text:p>
      <text:p text:style-name="P240"><text:span text:style-name="T9"><text:line-break/><text:tab/>The values ​​specified in the "atTrue" and "atFalse" overlap the specified parameters in the &lt;Token ...&gt; attribute.</text:span></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136"><text:tab/>For information on the instructions that are supported, see Section 5.5.2 - Advanced Settings</text:span> </text:p>
      <text:p text:style-name="P63"/>
      <text:p text:style-name="P63"><text:soft-page-break/></text:p>
      <text:list xml:id="list230304963072275" text:continue-numbering="true" text:style-name="WW8Num24">
        <text:list-item>
          <text:list>
            <text:list-item>
              <text:h text:style-name="P250" text:outline-level="2"><text:bookmark text:name="_Ref376858726"/><text:bookmark text:name="_Ref376858729"/><text:bookmark-start text:name="__RefHeading___Toc404419486"/>Definition of delimited Tokens<text:bookmark-end text:name="__RefHeading___Toc404419486"/></text:h>
            </text:list-item>
          </text:list>
        </text:list-item>
      </text:list>
      <text:p text:style-name="P15"/>
      <text:p text:style-name="P75">Delimited tokens are another way to define tokens alternately to the definition of tokens for content. </text:p>
      <text:p text:style-name="P75"/>
      <text:p text:style-name="P15"><text:tab/>Are defined with the label &lt;Token&gt;, having always present the parameter “End”.</text:p>
      <text:p text:style-name="P75"/>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136">Specifies an escape character, which is used to skip the next character of the exploration.</text:span> </text:p>
          </table:table-cell>
        </table:table-row>
      </table:table>
      <text:p text:style-name="P75"/>
      <text:p text:style-name="P75">A typical delimited token, here is the definition of strings:</text:p>
      <text:p text:style-name="P75"/>
      <text:p text:style-name="P118"><text:span text:style-name="T79">&lt;</text:span><text:span text:style-name="T11">Token </text:span><text:span text:style-name="T26">Start</text:span><text:span text:style-name="T79">=</text:span><text:span text:style-name="T114">"'" </text:span><text:span text:style-name="T26">End</text:span><text:span text:style-name="T115">=</text:span><text:span text:style-name="T114">"'"</text:span><text:span text:style-name="T26"> Attribute</text:span><text:span text:style-name="T79">=</text:span><text:span text:style-name="T114">'STRING'</text:span><text:span text:style-name="T79">&gt;&lt;/</text:span><text:span text:style-name="T11">Token</text:span><text:span text:style-name="T79">&gt;</text:span></text:p>
      <text:p text:style-name="P75"/>
      <text:p text:style-name="P75">This statement assigns the STRING attribute to the string that is between single quotes, including quotes.</text:p>
      <text:p text:style-name="P75"/>
      <text:p text:style-name="P75">If we want the strings can be extended for more than one line and also can fold, the following code will work:</text:p>
      <text:p text:style-name="P75"/>
      <text:p text:style-name="P118"><text:span text:style-name="T79">&lt;</text:span><text:span text:style-name="T11">Token </text:span><text:span text:style-name="T26">Start</text:span><text:span text:style-name="T79">=</text:span><text:span text:style-name="T114">"'" </text:span><text:span text:style-name="T26">End</text:span><text:span text:style-name="T115">=</text:span><text:span text:style-name="T114">"'"</text:span><text:span text:style-name="T26"> Attribute</text:span><text:span text:style-name="T79">=</text:span><text:span text:style-name="T114">"STRING"</text:span><text:span text:style-name="T26"> Multiline</text:span><text:span text:style-name="T79">=</text:span><text:span text:style-name="T114">"True"</text:span><text:span text:style-name="T26"> Folding</text:span><text:span text:style-name="T79">=</text:span><text:span text:style-name="T114">"True"</text:span><text:span text:style-name="T79">&gt;</text:span></text:p>
      <text:p text:style-name="P118"><text:span text:style-name="T79">&lt;/</text:span><text:span text:style-name="T11">Token</text:span><text:span text:style-name="T79">&gt;</text:span></text:p>
      <text:p text:style-name="P75"/>
      <text:p text:style-name="P75">A text with this highlighter, could be shown as follows:</text:p>
      <text:p text:style-name="P75"/>
      <text:p text:style-name="P92"><text:soft-page-break/><draw:frame draw:style-name="fr4" draw:name="Image5" text:anchor-type="as-char" svg:width="8.387cm" svg:height="4.921cm" draw:z-index="10"><draw:image xlink:href="Pictures/100000000000013D000000BA6AACCF32B3559A8D.png" xlink:type="simple" xlink:show="embed" xlink:actuate="onLoad"/></draw:frame></text:p>
      <text:p text:style-name="P75"/>
      <text:p text:style-name="P75">The following example defines the Pascal compiler directives:</text:p>
      <text:p text:style-name="P75"/>
      <text:p text:style-name="P118"><text:span text:style-name="T79">&lt;</text:span><text:span text:style-name="T11">Token </text:span><text:span text:style-name="T26">Start</text:span><text:span text:style-name="T79">=</text:span><text:span text:style-name="T114">"{$"</text:span><text:span text:style-name="T26"> End</text:span><text:span text:style-name="T79">=</text:span><text:span text:style-name="T114">"}"</text:span><text:span text:style-name="T26"> attribute</text:span><text:span text:style-name="T79">=</text:span><text:span text:style-name="T114">"DIRECTIVE"</text:span><text:span text:style-name="T79">&gt;&lt;/</text:span><text:span text:style-name="T11">Token</text:span><text:span text:style-name="T79">&gt;</text:span></text:p>
      <text:p text:style-name="P75"/>
      <text:p text:style-name="P75">This definition would identify blocks of type:</text:p>
      <text:p text:style-name="P75"/>
      <text:p text:style-name="P96">{$I+}</text:p>
      <text:p text:style-name="P75"/>
      <text:p text:style-name="P75">Here is another example defining directives used in C:</text:p>
      <text:p text:style-name="P75"/>
      <text:p text:style-name="P118"><text:span text:style-name="T79">&lt;</text:span><text:span text:style-name="T11">Token </text:span><text:span text:style-name="T26">Start</text:span><text:span text:style-name="T79">=</text:span><text:span text:style-name="T114">"#"</text:span><text:span text:style-name="T26"> End</text:span><text:span text:style-name="T79">=</text:span><text:span text:style-name="T114">"&amp;gt</text:span><text:span text:style-name="T115">;</text:span><text:span text:style-name="T114">"</text:span><text:span text:style-name="T26"> attribute</text:span><text:span text:style-name="T79">=</text:span><text:span text:style-name="T114">"DIRECTIVE"</text:span><text:span text:style-name="T79">&gt;</text:span></text:p>
      <text:p text:style-name="P118"><text:span text:style-name="T79">&lt;/</text:span><text:span text:style-name="T11">Token</text:span><text:span text:style-name="T79">&gt;</text:span></text:p>
      <text:p text:style-name="P75"/>
      <text:p text:style-name="P75">This definition would identify blocks of type:</text:p>
      <text:p text:style-name="P75"/>
      <text:p text:style-name="P96">#include &lt;windows.h&gt;</text:p>
      <text:p text:style-name="P75"/>
      <text:p text:style-name="P75">If the final delimiter of a delimited token is not specified, or is assigned the empty string, is assumed to extend to the end of the current line. This behavior is common in defining single-line comments:</text:p>
      <text:p text:style-name="P75"/>
      <text:p text:style-name="P118"><text:span text:style-name="T79">&lt;</text:span><text:span text:style-name="T11">Token </text:span><text:span text:style-name="T26">Start</text:span><text:span text:style-name="T79">=</text:span><text:span text:style-name="T114">"//"</text:span><text:span text:style-name="T26"> attribute</text:span><text:span text:style-name="T79">=</text:span><text:span text:style-name="T114">"COMMENT"</text:span><text:span text:style-name="T79">&gt;&lt;/</text:span><text:span text:style-name="T11">Token</text:span><text:span text:style-name="T79">&gt;</text:span></text:p>
      <text:p text:style-name="P75"/>
      <text:p text:style-name="P75"><text:bookmark text:name="result_box1"/><text:span text:style-name="T136">The "CharsStart" parameter allows us to specify a list of characters as initial delimiters for a limited token (similar to how it's made in tokens by content), but it is not usual to use this form of definition.</text:span> </text:p>
      <text:p text:style-name="P75"/>
      <text:p text:style-name="P75">The attributes that can be assigned are all handled the highlighter:</text:p>
      <text:p text:style-name="P75"/>
      <text:list xml:id="list7334462747408145217" text:style-name="WW8Num22">
        <text:list-item>
          <text:p text:style-name="P224">EOL</text:p>
        </text:list-item>
        <text:list-item>
          <text:p text:style-name="P224"><text:soft-page-break/>SYMBOL</text:p>
        </text:list-item>
        <text:list-item>
          <text:p text:style-name="P224">SPACE</text:p>
        </text:list-item>
        <text:list-item>
          <text:p text:style-name="P224">IDENTIFIER</text:p>
        </text:list-item>
        <text:list-item>
          <text:p text:style-name="P224">NUMBER</text:p>
        </text:list-item>
        <text:list-item>
          <text:p text:style-name="P224">KEYWORD</text:p>
        </text:list-item>
        <text:list-item>
          <text:p text:style-name="P224">STRING</text:p>
        </text:list-item>
        <text:list-item>
          <text:p text:style-name="P224">COMMENT</text:p>
        </text:list-item>
      </text:list>
      <text:p text:style-name="P75"/>
      <text:p text:style-name="P75">You can define as many delimited tokens as you want, considering that the more of them, the greater the processing speed will be for the highlighter.</text:p>
      <text:p text:style-name="P75"/>
      <text:p text:style-name="P91"><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230305338235518" text:continue-list="list230304963072275" text:style-name="WW8Num24">
        <text:list-item>
          <text:list>
            <text:list-item>
              <text:list>
                <text:list-item>
                  <text:h text:style-name="P252" text:outline-level="2"><text:bookmark-start text:name="__RefHeading__27878_2030348867"/>Escape character<text:bookmark-end text:name="__RefHeading__27878_2030348867"/></text:h>
                </text:list-item>
              </text:list>
            </text:list-item>
          </text:list>
        </text:list-item>
      </text:list>
      <text:p text:style-name="P15"><text:span text:style-name="T136"><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136"><text:tab/>To define string tokens to recognizing these escape sequences, without dividing the string, you must specify "\" escape character. The following definition of a delimited token performs this functionality:</text:span> </text:p>
      <text:p text:style-name="P15"/>
      <text:p text:style-name="P152"><text:span text:style-name="T24">  </text:span><text:span text:style-name="T83">&lt;</text:span><text:span text:style-name="T16">Token </text:span><text:span text:style-name="T56">CharsStart</text:span><text:span text:style-name="T83">=</text:span><text:span text:style-name="T118">'"' </text:span><text:span text:style-name="T119">End=</text:span><text:span text:style-name="T118">'"'</text:span><text:span text:style-name="T24"> </text:span><text:span text:style-name="T16">Attribute</text:span><text:span text:style-name="T83">=</text:span><text:span text:style-name="T118">'STRING'</text:span><text:span text:style-name="T24"> </text:span><text:span text:style-name="T56">Escape</text:span><text:span text:style-name="T83">=</text:span><text:span text:style-name="T118">"\"</text:span><text:span text:style-name="T83">&gt;</text:span></text:p>
      <text:p text:style-name="P152"><text:span text:style-name="T77"> </text:span><text:span text:style-name="T24"> </text:span><text:span text:style-name="T83">&lt;/</text:span><text:span text:style-name="T16">Token</text:span><text:span text:style-name="T83">&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2955437337044890282" text:style-name="L1">
        <text:list-item>
          <text:p text:style-name="P233"><text:soft-page-break/>The escape character can only be specified in definitions where the starting and ending delimiter are of a character width, and equals (as in the definition of strings).</text:p>
          <text:p text:style-name="P233"/>
        </text:list-item>
      </text:list>
      <text:list xml:id="list230305126149687" text:continue-list="list230305338235518" text:style-name="WW8Num24">
        <text:list-item>
          <text:list>
            <text:list-item>
              <text:h text:style-name="P246" text:outline-level="2"><text:bookmark-start text:name="__RefHeading___Toc404419487"/>Defining strings<text:bookmark-end text:name="__RefHeading___Toc404419487"/></text:h>
            </text:list-item>
          </text:list>
        </text:list-item>
      </text:list>
      <text:p text:style-name="P75"/>
      <text:p text:style-name="P75">Strings are common delimited tokens. The delimiters are usually the quote and double quote, but depends on the language used. </text:p>
      <text:p text:style-name="P75"/>
      <text:p text:style-name="P75">To define the strings can use the simplified definition of tokens:</text:p>
      <text:p text:style-name="P75"/>
      <text:p text:style-name="P118"><text:span text:style-name="T79">&lt;</text:span><text:span text:style-name="T11">String </text:span><text:span text:style-name="T26">Start</text:span><text:span text:style-name="T79">=</text:span><text:span text:style-name="T114">"&amp;quot</text:span><text:span text:style-name="T115">;</text:span><text:span text:style-name="T114">"</text:span><text:span text:style-name="T26"> End</text:span><text:span text:style-name="T79">=</text:span><text:span text:style-name="T114">"&amp;quot</text:span><text:span text:style-name="T115">;</text:span><text:span text:style-name="T114">"</text:span><text:span text:style-name="T79">&gt;&lt;/</text:span><text:span text:style-name="T11">String</text:span><text:span text:style-name="T79">&gt;</text:span></text:p>
      <text:p text:style-name="P15"/>
      <text:p text:style-name="P15"><text:tab/>If we do not specify if the strings are of multiple lines, they are assumed to be single-line strings. To define multi-line strings must be specified:</text:p>
      <text:p text:style-name="P15"/>
      <text:p text:style-name="P148"><text:span text:style-name="T86">&lt;</text:span><text:span text:style-name="T17">String Start</text:span><text:span text:style-name="T86">=</text:span><text:span text:style-name="T120">"&amp;quot;"</text:span><text:span text:style-name="T46"> </text:span><text:span text:style-name="T17">End</text:span><text:span text:style-name="T86">=</text:span><text:span text:style-name="T120">"&amp;quot;"</text:span><text:span text:style-name="T46"> </text:span><text:span text:style-name="T58">MultiLine</text:span><text:span text:style-name="T86">=</text:span><text:span text:style-name="T46">”</text:span><text:span text:style-name="T58">True”</text:span><text:span text:style-name="T86">&gt;</text:span></text:p>
      <text:p text:style-name="P145"><text:span text:style-name="T83">&lt;/</text:span><text:span text:style-name="T16">String</text:span><text:span text:style-name="T83">&gt;</text:span></text:p>
      <text:p text:style-name="P15"/>
      <text:list xml:id="list230306096341006" text:continue-numbering="true" text:style-name="WW8Num24">
        <text:list-item>
          <text:list>
            <text:list-item>
              <text:h text:style-name="P246"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5">If the ending delimiter is not specified, it is assumed that it is the newline, ie it is a comment line.</text:p>
      <text:p text:style-name="P75"/>
      <text:p text:style-name="P75">For example, to define a single line comments with the # character, would:</text:p>
      <text:p text:style-name="P75"/>
      <text:p text:style-name="P118"><text:span text:style-name="T79">&lt;</text:span><text:span text:style-name="T11">Comment </text:span><text:span text:style-name="T26">Start</text:span><text:span text:style-name="T79">=</text:span><text:span text:style-name="T114">"#"</text:span><text:span text:style-name="T26"> </text:span><text:span text:style-name="T79">&gt;&lt;/</text:span><text:span text:style-name="T11">Comment </text:span><text:span text:style-name="T79">&gt;</text:span></text:p>
      <text:p text:style-name="P15"/>
      <text:p text:style-name="P15"><text:tab/>To define multi-line comments must specify the ending delimiter and the "Multiline" attribute:</text:p>
      <text:p text:style-name="P15"/>
      <text:p text:style-name="P118"><text:span text:style-name="T79">&lt;</text:span><text:span text:style-name="T11">Comment </text:span><text:span text:style-name="T26">Start</text:span><text:span text:style-name="T79">=</text:span><text:span text:style-name="T114">"</text:span><text:span text:style-name="T115">/*</text:span><text:span text:style-name="T114">"</text:span><text:span text:style-name="T26"> End</text:span><text:span text:style-name="T79">=</text:span><text:span text:style-name="T114">"</text:span><text:span text:style-name="T115">*/</text:span><text:span text:style-name="T114">"</text:span><text:span text:style-name="T26"> Multiline</text:span><text:span text:style-name="T79">=</text:span><text:span text:style-name="T114">"True"</text:span><text:span text:style-name="T79">&gt;&lt;/</text:span><text:span text:style-name="T11">Comment </text:span><text:span text:style-name="T79">&gt;</text:span></text:p>
      <text:p text:style-name="P15"/>
      <text:p text:style-name="P75">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230304443655193" text:continue-numbering="true" text:style-name="WW8Num24">
        <text:list-item>
          <text:list>
            <text:list-item>
              <text:h text:style-name="P246"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15"/>
      <text:p text:style-name="P75">The blocks are defined with the labels &lt;Block&gt; and &lt;/ Block&gt;.</text:p>
      <text:p text:style-name="P75"/>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row table:style-name="Table12.1">
          <table:table-cell table:style-name="Table12.A7" office:value-type="string">
            <text:p text:style-name="P17">CloseParent</text:p>
          </table:table-cell>
          <table:table-cell table:style-name="Table12.A7" office:value-type="string">
            <text:p text:style-name="P15">Optional</text:p>
          </table:table-cell>
          <table:table-cell table:style-name="Table12.C7" office:value-type="string">
            <text:p text:style-name="P15">Indicates when closing the block, it must be closed the parent block too.</text:p>
          </table:table-cell>
        </table:table-row>
      </table:table>
      <text:p text:style-name="P75"/>
      <text:p text:style-name="P91"><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5"/>
      <text:p text:style-name="P75">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5"/>
      <text:p text:style-name="P75">A typical case is the block used in Pascal:</text:p>
      <text:p text:style-name="P75"/>
      <text:p text:style-name="P118"><text:span text:style-name="T38"><text:s text:c="2"/></text:span><text:span text:style-name="T79">&lt;</text:span><text:span text:style-name="T11">Block </text:span><text:span text:style-name="T26">Start</text:span><text:span text:style-name="T79">=</text:span><text:span text:style-name="T114">"Begin"</text:span><text:span text:style-name="T26"> End</text:span><text:span text:style-name="T79">=</text:span><text:span text:style-name="T114">"End"</text:span><text:span text:style-name="T26"> </text:span><text:span text:style-name="T79">&gt;</text:span></text:p>
      <text:p text:style-name="P118"><text:span text:style-name="T38"><text:s text:c="2"/></text:span><text:span text:style-name="T79">&lt;/</text:span><text:span text:style-name="T11">Block</text:span><text:span text:style-name="T79">&gt;</text:span></text:p>
      <text:p text:style-name="P75"/>
      <text:p text:style-name="P75"><text:soft-page-break/>This block will extend from after the token "BEGIN" to the end of the token "END". The block may be distributed in one or more lines. Is not necessary to specify. The blocks are multiline by default.</text:p>
      <text:p text:style-name="P75"/>
      <text:p text:style-name="P75">The "Name" property lets us to specify a name for the block. If we do not specify a name, the highlighter, will assign an internal name, which has the form "blk1", "Blk2" ... depending on how many blocks there are.</text:p>
      <text:p text:style-name="P75"/>
      <text:p text:style-name="P75">We can assign any name to a block, except "Main", "MultiToken" and "None", which are names reserved for internal work highlighter.</text:p>
      <text:p text:style-name="P75"/>
      <text:p text:style-name="P75">The name itself is not important for the work of the block, but it is useful for when you want to reference it from another part of the syntax file.</text:p>
      <text:p text:style-name="P75"/>
      <text:p text:style-name="P75">The following case is an example of block name:</text:p>
      <text:p text:style-name="P75"/>
      <text:p text:style-name="P118"><text:span text:style-name="T38"><text:s text:c="2"/></text:span><text:span text:style-name="T79">&lt;</text:span><text:span text:style-name="T11">Block </text:span><text:span text:style-name="T26">Name</text:span><text:span text:style-name="T79">=</text:span><text:span text:style-name="T114">"Begin</text:span><text:span text:style-name="T115">-</text:span><text:span text:style-name="T114">End</text:span><text:span text:style-name="T115">-</text:span><text:span text:style-name="T114">Global"</text:span><text:span text:style-name="T26"> Start</text:span><text:span text:style-name="T79">=</text:span><text:span text:style-name="T114">"Begin"</text:span><text:span text:style-name="T26"> End</text:span><text:span text:style-name="T79">=</text:span><text:span text:style-name="T114">"End"</text:span><text:span text:style-name="T26"> </text:span><text:span text:style-name="T79">&gt;&lt;/</text:span><text:span text:style-name="T11">Block</text:span><text:span text:style-name="T79">&gt;</text:span></text:p>
      <text:p text:style-name="P75"/>
      <text:p text:style-name="P75">The name assigned to the block must be unique, otherwise an error is generated when reading the syntax file.</text:p>
      <text:p text:style-name="P75"/>
      <text:p text:style-name="P75">The main use of a block is for code folding. By default, a block will always display the code folding mark (unless it is contained on one line). But if we want to formally specify it, we should do:</text:p>
      <text:p text:style-name="P75"/>
      <text:p text:style-name="P118"><text:span text:style-name="T38"><text:s text:c="2"/></text:span><text:span text:style-name="T79">&lt;</text:span><text:span text:style-name="T11">Block </text:span><text:span text:style-name="T26">Start</text:span><text:span text:style-name="T79">=</text:span><text:span text:style-name="T114">"Begin"</text:span><text:span text:style-name="T26"> End</text:span><text:span text:style-name="T79">=</text:span><text:span text:style-name="T114">"End"</text:span><text:span text:style-name="T26"> Folding</text:span><text:span text:style-name="T79">=</text:span><text:span text:style-name="T114">"True"</text:span><text:span text:style-name="T79">&gt;&lt;/</text:span><text:span text:style-name="T11">Block</text:span><text:span text:style-name="T79">&gt;</text:span></text:p>
      <text:p text:style-name="P75"/>
      <text:p text:style-name="P75">If we want <text:s/>a defined block, but not fold mark, we should specify this parameter Folding = "False".</text:p>
      <text:p text:style-name="P75"/>
      <text:p text:style-name="P75">A text with fold mark in a block would look like:</text:p>
      <text:p text:style-name="P75"/>
      <text:p text:style-name="P92"><text:soft-page-break/><draw:frame draw:style-name="fr4" draw:name="Image6" text:anchor-type="as-char" svg:width="10.742cm" svg:height="4.895cm" draw:z-index="11"><draw:image xlink:href="Pictures/1000000000000196000000B9CBCA9BD47505A7F8.png" xlink:type="simple" xlink:show="embed" xlink:actuate="onLoad"/></draw:frame></text:p>
      <text:p text:style-name="P75"/>
      <text:p text:style-name="P75">Block delimiters can also be symbols. For example, the following statement is valid:</text:p>
      <text:p text:style-name="P75"/>
      <text:p text:style-name="P118"><text:span text:style-name="T38"><text:s text:c="2"/></text:span><text:span text:style-name="T79">&lt;</text:span><text:span text:style-name="T11">Block </text:span><text:span text:style-name="T26">Start</text:span><text:span text:style-name="T79">=</text:span><text:span text:style-name="T114">"{"</text:span><text:span text:style-name="T26"> End</text:span><text:span text:style-name="T79">=</text:span><text:span text:style-name="T114">"}"</text:span><text:span text:style-name="T79">&gt;</text:span></text:p>
      <text:p text:style-name="P118"><text:span text:style-name="T38"><text:s text:c="2"/></text:span><text:span text:style-name="T79">&lt;/</text:span><text:span text:style-name="T11">Block</text:span><text:span text:style-name="T79">&gt;</text:span></text:p>
      <text:p text:style-name="P75"/>
      <text:p text:style-name="P75">This definition, consider all tokens within the braces as part of a block, as is done in C.</text:p>
      <text:p text:style-name="P75"/>
      <text:p text:style-name="P75">Block delimiters must always be identifiers or special symbols. If a delimiter block that is not defined as a special token is defined, it is created first as a special token before processing the block.</text:p>
      <text:p text:style-name="P75"/>
      <text:p text:style-name="P75">For example, in the following definition:</text:p>
      <text:p text:style-name="P75"/>
      <text:p text:style-name="P118"><text:span text:style-name="T38"><text:s text:c="2"/></text:span><text:span text:style-name="T79">&lt;</text:span><text:span text:style-name="T11">Block </text:span><text:span text:style-name="T26">Start</text:span><text:span text:style-name="T79">=</text:span><text:span text:style-name="T114">"Start"</text:span><text:span text:style-name="T26"> End</text:span><text:span text:style-name="T79">=</text:span><text:span text:style-name="T114">"End"</text:span><text:span text:style-name="T26"> Folding</text:span><text:span text:style-name="T79">=</text:span><text:span text:style-name="T114">"True"</text:span><text:span text:style-name="T79">&gt;&lt;/</text:span><text:span text:style-name="T11">Block</text:span><text:span text:style-name="T79">&gt;</text:span></text:p>
      <text:p text:style-name="P75"/>
      <text:p text:style-name="P75">If the identifier "Start" was not created as a special identifier, then first "Start"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In creating blocks, the uniqueness <text:s/>of the delimiters are not validated. For example, you can write this definition, without generating errors:</text:p>
      <text:p text:style-name="P75"/>
      <text:p text:style-name="P118"><text:span text:style-name="T38"><text:s text:c="2"/></text:span><text:span text:style-name="T79">&lt;</text:span><text:span text:style-name="T11">Block </text:span><text:span text:style-name="T26">Start</text:span><text:span text:style-name="T79">=</text:span><text:span text:style-name="T114">"Begin"</text:span><text:span text:style-name="T26"> End</text:span><text:span text:style-name="T79">=</text:span><text:span text:style-name="T26"> </text:span><text:span text:style-name="T114">"End"</text:span><text:span text:style-name="T79">&gt;</text:span><text:span text:style-name="T26"> </text:span><text:span text:style-name="T79">&lt;/</text:span><text:span text:style-name="T11">Block</text:span><text:span text:style-name="T79">&gt;</text:span></text:p>
      <text:p text:style-name="P118"><text:span text:style-name="T38"><text:s text:c="2"/></text:span><text:span text:style-name="T79">&lt;</text:span><text:span text:style-name="T11">Block </text:span><text:span text:style-name="T26">Start</text:span><text:span text:style-name="T79">=</text:span><text:span text:style-name="T114">"Begin"</text:span><text:span text:style-name="T26"> End</text:span><text:span text:style-name="T79">=</text:span><text:span text:style-name="T26"> </text:span><text:span text:style-name="T114">"End"</text:span><text:span text:style-name="T79">&gt;</text:span><text:span text:style-name="T26"> </text:span><text:span text:style-name="T79">&lt;/</text:span><text:span text:style-name="T11">Block</text:span><text:span text:style-name="T79">&gt;</text:span></text:p>
      <text:p text:style-name="P75"/>
      <text:p text:style-name="P159"><text:tab/>Although we use the same delimiter, actually we would be creating two separate blocks, but would generate confusion because the same delimiter is the start of two blocks, so that when the highlighter find the delimiter "Begin" opens only one.</text:p>
      <text:p text:style-name="P75"/>
      <text:p text:style-name="P75"><text:soft-page-break/>When blocks with the same Start and End delimiter are defined, you should always restrict a parent block, because otherwise not be able to close the block. Consider the following definition:</text:p>
      <text:p text:style-name="P75"/>
      <text:p text:style-name="P118"><text:span text:style-name="T38"><text:s text:c="2"/></text:span><text:span text:style-name="T79">&lt;</text:span><text:span text:style-name="T11">Block Start</text:span><text:span text:style-name="T79">=</text:span><text:span text:style-name="T114">"'" </text:span><text:span text:style-name="T115">End =</text:span><text:span text:style-name="T114">"'"</text:span><text:span text:style-name="T26"> Name</text:span><text:span text:style-name="T79">=</text:span><text:span text:style-name="T114">"Blk_comill"</text:span><text:span text:style-name="T79">&gt; &lt;/</text:span><text:span text:style-name="T11">Block</text:span><text:span text:style-name="T79">&gt;</text:span></text:p>
      <text:p text:style-name="P75"/>
      <text:p text:style-name="P75">As defined, this block is never closed, because each new occurrence of the quote, be understood as the beginning of another nested block. To achieve that end could restrict its validity to the main block.</text:p>
      <text:p text:style-name="P75"/>
      <text:p text:style-name="P118"><text:span text:style-name="T38"><text:s text:c="2"/></text:span><text:span text:style-name="T79">&lt;</text:span><text:span text:style-name="T11">Block Start</text:span><text:span text:style-name="T79">=</text:span><text:span text:style-name="T114">"'" </text:span><text:span text:style-name="T115">End =</text:span><text:span text:style-name="T114">"'"</text:span><text:span text:style-name="T26"> Name</text:span><text:span text:style-name="T79">=</text:span><text:span text:style-name="T114">"Blk_comill"</text:span><text:span text:style-name="T26"> Parent</text:span><text:span text:style-name="T79">=</text:span><text:span text:style-name="T114">"Main"</text:span><text:span text:style-name="T79">&gt; &lt;/</text:span><text:span text:style-name="T11">Block</text:span><text:span text:style-name="T79">&gt;</text:span></text:p>
      <text:p text:style-name="P75"/>
      <text:p text:style-name="P75">We conclude that a block of this type (same starting and ending delimiter), can never be nested.</text:p>
      <text:p text:style-name="P75"/>
      <text:list xml:id="list230306167501143" text:continue-numbering="true" text:style-name="WW8Num24">
        <text:list-item>
          <text:list>
            <text:list-item>
              <text:list>
                <text:list-item>
                  <text:h text:style-name="Heading_20_3" text:outline-level="3"><text:bookmark-start text:name="__RefHeading__55815_1899150412"/>Colored blocks<text:bookmark-end text:name="__RefHeading__55815_1899150412"/></text:h>
                </text:list-item>
              </text:list>
            </text:list-item>
          </text:list>
        </text:list-item>
      </text:list>
      <text:p text:style-name="P15"/>
      <text:p text:style-name="P75">The blocks are mostly used for the implementation of code folding. But, these blocks generally correspond also to syntactic structures of the language of the text.</text:p>
      <text:p text:style-name="P75"/>
      <text:p text:style-name="P75">As an additional feature, the highlighter color the background allows the blocks to provide a visual aid, the extension block., In addition, only show fold marks extension block level rather column lines .</text:p>
      <text:p text:style-name="P75"/>
      <text:p text:style-name="P75">To activate the colored blocks, you should set the language to "ColorBlock" parameter to "Level" or "Block".</text:p>
      <text:p text:style-name="P75"/>
      <text:p text:style-name="P75">When we set ColorBlock in "Level", will proceed to do an automatic blocks coloring, using the nesting level of each block. The following example shows how a simple C code would look with colored Level:</text:p>
      <text:p text:style-name="P75"/>
      <text:p text:style-name="P92"><text:soft-page-break/><draw:frame draw:style-name="fr4" draw:name="Image7" text:anchor-type="as-char" svg:width="9.922cm" svg:height="5.265cm" draw:z-index="61"><draw:image xlink:href="Pictures/1000000000000177000000C7663F0C9D8206C8D4.png" xlink:type="simple" xlink:show="embed" xlink:actuate="onLoad"/></draw:frame></text:p>
      <text:p text:style-name="P75"/>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5">The other colored is colored by block. ColorBlock If the parameter is set to "Block" will be colored using as background color, the color defined for each block. The figure below shows how the same text would be using colored blocks.</text:p>
      <text:p text:style-name="P75"/>
      <text:p text:style-name="P92"><draw:frame draw:style-name="fr4" draw:name="Image8" text:anchor-type="as-char" svg:width="10.345cm" svg:height="5.371cm" draw:z-index="62"><draw:image xlink:href="Pictures/1000000000000187000000CB33AA4C3E74D5CCC9.png" xlink:type="simple" xlink:show="embed" xlink:actuate="onLoad"/></draw:frame></text:p>
      <text:p text:style-name="P75"/>
      <text:p text:style-name="P75">This type of colored, does not take into account the level of nesting, but uses the custom color that is specified in the definition of each block.</text:p>
      <text:p text:style-name="P75"/>
      <text:p text:style-name="P75">To create this effect, we have used the following definition:</text:p>
      <text:p text:style-name="P75"/>
      <text:p text:style-name="P118"><text:span text:style-name="T79">&lt;</text:span><text:span text:style-name="T26">?Xml version</text:span><text:span text:style-name="T79">=</text:span><text:span text:style-name="T114">"1.0"</text:span><text:span text:style-name="T26">?</text:span><text:span text:style-name="T79">&gt;</text:span></text:p>
      <text:p text:style-name="P118"><text:span text:style-name="T79">&lt;</text:span><text:span text:style-name="T11">Language </text:span><text:span text:style-name="T26">name</text:span><text:span text:style-name="T79">=</text:span><text:span text:style-name="T114">"C"</text:span><text:span text:style-name="T26"> ext</text:span><text:span text:style-name="T79">=</text:span><text:span text:style-name="T114">"C"</text:span><text:span text:style-name="T26"> ColorBlock</text:span><text:span text:style-name="T79">=</text:span><text:span text:style-name="T114">"</text:span><text:span text:style-name="T115">Block</text:span><text:span text:style-name="T114">"</text:span><text:span text:style-name="T79">&gt;</text:span></text:p>
      <text:p text:style-name="P118"><text:span text:style-name="T38"><text:s text:c="2"/></text:span><text:span text:style-name="T79">&lt;</text:span><text:span text:style-name="T11">Block </text:span><text:span text:style-name="T26">Name</text:span><text:span text:style-name="T79">=</text:span><text:span text:style-name="T114">"Int"</text:span><text:span text:style-name="T26"> Start</text:span><text:span text:style-name="T79">=</text:span><text:span text:style-name="T114">"Int"</text:span><text:span text:style-name="T26"> End</text:span><text:span text:style-name="T79">=</text:span><text:span text:style-name="T114">"</text:span><text:span text:style-name="T115">)</text:span><text:span text:style-name="T114">"</text:span><text:span text:style-name="T26"> Parent</text:span><text:span text:style-name="T79">=</text:span><text:span text:style-name="T114">"Main"</text:span><text:span text:style-name="T26"> Backcol</text:span><text:span text:style-name="T79">=</text:span><text:span text:style-name="T114">"#81F7F3"</text:span><text:span text:style-name="T79">&gt;</text:span></text:p>
      <text:p text:style-name="P118"><text:span text:style-name="T38"><text:s text:c="2"/></text:span><text:span text:style-name="T79">&lt;/</text:span><text:span text:style-name="T11">Block</text:span><text:span text:style-name="T79">&gt;</text:span></text:p>
      <text:p text:style-name="P118"><text:span text:style-name="T38"><text:s text:c="2"/></text:span><text:span text:style-name="T79">&lt;</text:span><text:span text:style-name="T11">Block </text:span><text:span text:style-name="T26">Name</text:span><text:span text:style-name="T79">=</text:span><text:span text:style-name="T114">"Bloque_de_C"</text:span><text:span text:style-name="T26"> 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Main"</text:span><text:span text:style-name="T26"> Backcol</text:span><text:span text:style-name="T79">=</text:span><text:span text:style-name="T114">"#F3F781"</text:span><text:span text:style-name="T79">&gt;</text:span></text:p>
      <text:p text:style-name="P118"><text:span text:style-name="T38"><text:s text:c="4"/></text:span><text:span text:style-name="T79">&lt;</text:span><text:span text:style-name="T11">Block </text:span><text:span text:style-name="T26">Start</text:span><text:span text:style-name="T79">=</text:span><text:span text:style-name="T114">"{"</text:span><text:span text:style-name="T26"> End</text:span><text:span text:style-name="T79">=</text:span><text:span text:style-name="T114">"}"</text:span><text:span text:style-name="T26"> Backcol</text:span><text:span text:style-name="T79">=</text:span><text:span text:style-name="T114">"#F5DA81"</text:span><text:span text:style-name="T79">&gt; &lt;/</text:span><text:span text:style-name="T11">Block</text:span><text:span text:style-name="T79">&gt;</text:span></text:p>
      <text:p text:style-name="P118"><text:soft-page-break/><text:span text:style-name="T38"><text:s text:c="2"/></text:span><text:span text:style-name="T79">&lt;/</text:span><text:span text:style-name="T11">Block</text:span><text:span text:style-name="T79">&gt;</text:span></text:p>
      <text:p text:style-name="P118"><text:span text:style-name="T79">&lt;/</text:span><text:span text:style-name="T11">Language</text:span><text:span text:style-name="T79">&gt;</text:span></text:p>
      <text:p text:style-name="P75"/>
      <text:p text:style-name="P75">Color, defined for each block specified in "BackCol" parameter. This color should always be specified in "#RRGGBB" format. Where RR, GG and BB correspond to the values ​​of the Red, Green and Blue components, expressed as two hexadecimal digits.</text:p>
      <text:p text:style-name="P75"/>
      <text:p text:style-name="P75">If you want the block does not define a color, but the color of the previous block is displayed, you can use the transparent color:</text:p>
      <text:p text:style-name="P75"/>
      <text:p text:style-name="P118"><text:span text:style-name="T79">&lt;</text:span><text:span text:style-name="T11">Block </text:span><text:span text:style-name="T26">Name</text:span><text:span text:style-name="T79">=</text:span><text:span text:style-name="T114">"Parameters"</text:span><text:span text:style-name="T26"> </text:span><text:span text:style-name="T11">Start</text:span><text:span text:style-name="T79">=</text:span><text:span text:style-name="T114">"</text:span><text:span text:style-name="T115">(</text:span><text:span text:style-name="T114">"</text:span><text:span text:style-name="T26"> </text:span><text:span text:style-name="T11">End</text:span><text:span text:style-name="T79">=</text:span><text:span text:style-name="T114">"</text:span><text:span text:style-name="T115">)</text:span><text:span text:style-name="T114">"</text:span><text:span text:style-name="T26"> Folding</text:span><text:span text:style-name="T79">=</text:span><text:span text:style-name="T114">"False"</text:span><text:span text:style-name="T26"> </text:span></text:p>
      <text:p text:style-name="P118"><text:span text:style-name="T38"><text:s text:c="7"/></text:span><text:span text:style-name="T26">Backcol</text:span><text:span text:style-name="T79">=</text:span><text:span text:style-name="T114">"Transparent"</text:span><text:span text:style-name="T79">&gt; &lt;/</text:span><text:span text:style-name="T11">Block</text:span><text:span text:style-name="T79">&gt;</text:span></text:p>
      <text:p text:style-name="P75"/>
      <text:p text:style-name="P75">It should be noted that by using the colored block work requires more processing in the highlighter, which when used for level highlighted.</text:p>
      <text:p text:style-name="P75"/>
      <text:list xml:id="list230305720473355" text:continue-numbering="true" text:style-name="WW8Num24">
        <text:list-item>
          <text:list>
            <text:list-item>
              <text:list>
                <text:list-item>
                  <text:h text:style-name="P261" text:outline-level="3"><text:bookmark-start text:name="__RefHeading__55817_1899150412"/><text:s/>Scope of a block<text:bookmark-end text:name="__RefHeading__55817_1899150412"/></text:h>
                </text:list-item>
              </text:list>
            </text:list-item>
          </text:list>
        </text:list-item>
      </text:list>
      <text:p text:style-name="P15"/>
      <text:p text:style-name="P75">So far, we have defined blocks that are valid anywhere in the code. For example when we define:</text:p>
      <text:p text:style-name="P75"/>
      <text:p text:style-name="P118"><text:span text:style-name="T38"><text:s text:c="2"/></text:span><text:span text:style-name="T79">&lt;</text:span><text:span text:style-name="T11">Block </text:span><text:span text:style-name="T26">Name</text:span><text:span text:style-name="T79">=</text:span><text:span text:style-name="T114">"C_block"</text:span><text:span text:style-name="T26"> Start</text:span><text:span text:style-name="T79">=</text:span><text:span text:style-name="T114">"{"</text:span><text:span text:style-name="T26"> End</text:span><text:span text:style-name="T79">=</text:span><text:span text:style-name="T114">"}"</text:span><text:span text:style-name="T79">&gt;</text:span></text:p>
      <text:p text:style-name="P118"><text:span text:style-name="T38"><text:s text:c="2"/></text:span><text:span text:style-name="T79">&lt;/</text:span><text:span text:style-name="T11">Block</text:span><text:span text:style-name="T79">&gt;</text:span></text:p>
      <text:p text:style-name="P75"/>
      <text:p text:style-name="P75">We are saying that we want all tokens that are in braces, are part of the block "C_block".</text:p>
      <text:p text:style-name="P75"/>
      <text:p text:style-name="P75">So if we write C code with this syntax, we get the following image:</text:p>
      <text:p text:style-name="P75"/>
      <text:p text:style-name="P92"><draw:frame draw:style-name="fr4" draw:name="Image9" text:anchor-type="as-char" svg:width="9.922cm" svg:height="5.265cm" draw:z-index="63"><draw:image xlink:href="Pictures/1000000000000177000000C7663F0C9D8206C8D4.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5"/>
      <text:p text:style-name="P75">This is because in the block definition, have not specified the scope of the block in the "Parent" parameter. So is assumed to be the "None", ie it is valid block anywhere where it appears.</text:p>
      <text:p text:style-name="P15"/>
      <text:p text:style-name="P75">The same result would have obtained had we explicitly since the block is valid anywhere using the following form:</text:p>
      <text:p text:style-name="P75"/>
      <text:p text:style-name="P118"><text:span text:style-name="T38"><text:s text:c="2"/></text:span><text:span text:style-name="T79">&lt;</text:span><text:span text:style-name="T11">Block </text:span><text:span text:style-name="T26">Name</text:span><text:span text:style-name="T79">=</text:span><text:span text:style-name="T114">"C_block"</text:span><text:span text:style-name="T26"> 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None"</text:span><text:span text:style-name="T79">&gt;&lt;/</text:span><text:span text:style-name="T11">Block</text:span><text:span text:style-name="T79">&gt;</text:span></text:p>
      <text:p text:style-name="P75"/>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130">"None"</text:span> -&gt; Refers to any block.</text:p>
      <text:p text:style-name="P15"><text:tab/><text:span text:style-name="T130">"Main"</text:span> -&gt; Identifies the main block. He who has no nesting.</text:p>
      <text:p text:style-name="P15"><text:tab/><text:span text:style-name="T130">"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18"><text:span text:style-name="T38"><text:s text:c="2"/></text:span><text:span text:style-name="T79">&lt;</text:span><text:span text:style-name="T11">Block </text:span><text:span text:style-name="T26">Name</text:span><text:span text:style-name="T79">=</text:span><text:span text:style-name="T114">"Aqui_si"</text:span><text:span text:style-name="T26"> Start</text:span><text:span text:style-name="T79">=</text:span><text:span text:style-name="T114">"AQUI_SI"</text:span><text:span text:style-name="T26"> End</text:span><text:span text:style-name="T79">=</text:span><text:span text:style-name="T114">"End"</text:span><text:span text:style-name="T79">&gt;&lt;/</text:span><text:span text:style-name="T11">Block</text:span><text:span text:style-name="T79">&gt;</text:span></text:p>
      <text:p text:style-name="P118"><text:span text:style-name="T38"><text:s text:c="2"/></text:span><text:span text:style-name="T79">&lt;</text:span><text:span text:style-name="T11">Block </text:span><text:span text:style-name="T26">Name</text:span><text:span text:style-name="T79">=</text:span><text:span text:style-name="T114">"Bloque_de_C"</text:span><text:span text:style-name="T26"> 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Aqui_si"</text:span><text:span text:style-name="T79">&gt;&lt;/</text:span><text:span text:style-name="T11">Block</text:span><text:span text:style-name="T79">&gt;</text:span></text:p>
      <text:p text:style-name="P15"/>
      <text:p text:style-name="P15"><text:tab/>A sample code will show the effect of this definition:</text:p>
      <text:p text:style-name="P15"/>
      <text:p text:style-name="P15"/>
      <text:p text:style-name="P39"><text:soft-page-break/><draw:frame draw:style-name="fr4" draw:name="Image10" text:anchor-type="as-char" svg:width="9.922cm" svg:height="6.033cm" draw:z-index="6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18"><text:span text:style-name="T38"><text:s text:c="2"/></text:span><text:span text:style-name="T79">&lt;</text:span><text:span text:style-name="T11">Block </text:span><text:span text:style-name="T26">Name</text:span><text:span text:style-name="T79">=</text:span><text:span text:style-name="T114">"C_block"</text:span><text:span text:style-name="T26"> 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Main"</text:span><text:span text:style-name="T79">&gt;&lt;/</text:span><text:span text:style-name="T11">Block</text:span><text:span text:style-name="T79">&gt;</text:span></text:p>
      <text:p text:style-name="P15"/>
      <text:p text:style-name="P159">We could have the following result:</text:p>
      <text:p text:style-name="P159"/>
      <text:p text:style-name="P161"><draw:frame draw:style-name="fr4" draw:name="Image11" text:anchor-type="as-char" svg:width="9.737cm" svg:height="5.503cm" draw:z-index="65"><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9">The block "Main" is the one that includes the entire file. All tokens and blocks (or sections), believed to be directly or indirectly contained in the block "Main". </text:p>
      <text:p text:style-name="P159"/>
      <text:p text:style-name="P159"><text:soft-page-break/>It is not necessary, create the block "Main", this block always exists and is unique. If we had defined his statement would be something like this:</text:p>
      <text:p text:style-name="P159"/>
      <text:p text:style-name="P118"><text:span text:style-name="T38"><text:s text:c="2"/></text:span><text:span text:style-name="T79">&lt;</text:span><text:span text:style-name="T11">Block </text:span><text:span text:style-name="T26">Name</text:span><text:span text:style-name="T79">=</text:span><text:span text:style-name="T114">"Main"</text:span><text:span text:style-name="T26"> 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text:span><text:span text:style-name="T79">&gt;&lt;/</text:span><text:span text:style-name="T11">Block</text:span><text:span text:style-name="T79">&gt;</text:span></text:p>
      <text:p text:style-name="P159"/>
      <text:p text:style-name="P159">The interior of any block, is no longer part of the block "Main". Only tokens or structures that are not within another block, pertain directly to the block "Main":</text:p>
      <text:p text:style-name="P159"/>
      <text:p text:style-name="P162"><draw:custom-shape text:anchor-type="char" draw:z-index="51" draw:style-name="gr4" draw:text-style-name="P270" svg:width="3.123cm" svg:height="1.297cm" svg:x="-0.079cm" svg:y="0.656cm"><text:p text:style-name="P269"><text:span text:style-name="T167">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52" draw:style-name="gr4" draw:text-style-name="P270" svg:width="3.123cm" svg:height="1.297cm" svg:x="0.185cm" svg:y="2.323cm"><text:p text:style-name="P269"><text:span text:style-name="T167">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66"><draw:image xlink:href="Pictures/1000000000000177000000C7663F0C9D8206C8D4.png" xlink:type="simple" xlink:show="embed" xlink:actuate="onLoad"/></draw:frame></text:p>
      <text:p text:style-name="P159"/>
      <text:p text:style-name="P159">When blocks are only valid in the block "Main", they are preventing these can be nested and may appear only in the main body are created.</text:p>
      <text:p text:style-name="P159"/>
      <text:p text:style-name="P159">You can limit the nesting level of a block. This requires specifying the structure, each block corresponding to each level. </text:p>
      <text:p text:style-name="P159"/>
      <text:p text:style-name="P159">The following example is a definition to allow nesting of one second block "{}":</text:p>
      <text:p text:style-name="P159"/>
      <text:p text:style-name="P118"><text:span text:style-name="T38"><text:s text:c="2"/></text:span><text:span text:style-name="T79">&lt;</text:span><text:span text:style-name="T11">Block </text:span><text:span text:style-name="T26">Name</text:span><text:span text:style-name="T79">=</text:span><text:span text:style-name="T114">"C_block"</text:span><text:span text:style-name="T26"> 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Main"</text:span><text:span text:style-name="T79">&gt;</text:span></text:p>
      <text:p text:style-name="P118"><text:span text:style-name="T38"><text:s text:c="2"/></text:span><text:span text:style-name="T79">&lt;/</text:span><text:span text:style-name="T11">Block</text:span><text:span text:style-name="T79">&gt;</text:span></text:p>
      <text:p text:style-name="P118"><text:span text:style-name="T38"><text:s text:c="2"/></text:span><text:span text:style-name="T79">&lt;</text:span><text:span text:style-name="T11">Block </text:span><text:span text:style-name="T26">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C_block"</text:span><text:span text:style-name="T26"> </text:span><text:span text:style-name="T79">&gt;</text:span></text:p>
      <text:p text:style-name="P118"><text:span text:style-name="T80"><text:s text:c="2"/></text:span><text:span text:style-name="T79">&lt;/</text:span><text:span text:style-name="T11">Block</text:span><text:span text:style-name="T79">&gt;</text:span></text:p>
      <text:p text:style-name="P124"/>
      <text:p text:style-name="P159"/>
      <text:p text:style-name="P159">Now with this definition, be permitted to include a block "{}", within another, but no more. So if a third nesting inclusion, the syntax will fail:</text:p>
      <text:p text:style-name="P159"/>
      <text:p text:style-name="P161"><text:soft-page-break/><draw:frame draw:style-name="fr4" draw:name="Image13" text:anchor-type="as-char" svg:width="9.922cm" svg:height="6.033cm" draw:z-index="67"><draw:image xlink:href="Pictures/1000000000000177000000E4ACB8A853EE6E8AEB.png" xlink:type="simple" xlink:show="embed" xlink:actuate="onLoad"/></draw:frame></text:p>
      <text:p text:style-name="P159"/>
      <text:p text:style-name="P159">As we have seen, the "Parent" parameter defines hierarchy of blocks a tree way. But as an improved definition syntax, we can use nested definitions, to indicate this hierarchy, without using the "Parent" parameter. </text:p>
      <text:p text:style-name="P159"/>
      <text:p text:style-name="P159">For example, the following definition:</text:p>
      <text:p text:style-name="P159"/>
      <text:p text:style-name="P118"><text:span text:style-name="T38"><text:s text:c="2"/></text:span><text:span text:style-name="T79">&lt;</text:span><text:span text:style-name="T11">Block </text:span><text:span text:style-name="T26">Name</text:span><text:span text:style-name="T79">=</text:span><text:span text:style-name="T114">"Aqui_si"</text:span><text:span text:style-name="T26"> Start</text:span><text:span text:style-name="T79">=</text:span><text:span text:style-name="T114">"AQUI_SI"</text:span><text:span text:style-name="T26"> End</text:span><text:span text:style-name="T79">=</text:span><text:span text:style-name="T114">"End"</text:span><text:span text:style-name="T79">&gt;</text:span></text:p>
      <text:p text:style-name="P118"><text:span text:style-name="T38"><text:s text:c="2"/></text:span><text:span text:style-name="T79">&lt;/</text:span><text:span text:style-name="T11">Block</text:span><text:span text:style-name="T79">&gt;</text:span></text:p>
      <text:p text:style-name="P118"><text:span text:style-name="T38"><text:s text:c="2"/></text:span><text:span text:style-name="T79">&lt;</text:span><text:span text:style-name="T11">Block </text:span><text:span text:style-name="T26">Name</text:span><text:span text:style-name="T79">=</text:span><text:span text:style-name="T114">"C_block"</text:span><text:span text:style-name="T26"> Start</text:span><text:span text:style-name="T79">=</text:span><text:span text:style-name="T114">"{"</text:span><text:span text:style-name="T26"> End</text:span><text:span text:style-name="T79">=</text:span><text:span text:style-name="T114">"}"</text:span><text:span text:style-name="T26"> Parent</text:span><text:span text:style-name="T79">=</text:span><text:span text:style-name="T114">"Aqui_si"</text:span><text:span text:style-name="T79">&gt;</text:span></text:p>
      <text:p text:style-name="P118"><text:span text:style-name="T38"><text:s text:c="2"/></text:span><text:span text:style-name="T79">&lt;/</text:span><text:span text:style-name="T11">Block</text:span><text:span text:style-name="T79">&gt;</text:span></text:p>
      <text:p text:style-name="P159"/>
      <text:p text:style-name="P159"><text:tab/>It can be written in simplified form as follows:</text:p>
      <text:p text:style-name="P159"/>
      <text:p text:style-name="P118"><text:span text:style-name="T38"><text:s text:c="2"/></text:span><text:span text:style-name="T79">&lt;</text:span><text:span text:style-name="T11">Block </text:span><text:span text:style-name="T26">Name</text:span><text:span text:style-name="T79">=</text:span><text:span text:style-name="T114">"Aqui_si"</text:span><text:span text:style-name="T26"> Start</text:span><text:span text:style-name="T79">=</text:span><text:span text:style-name="T114">"AQUI_SI"</text:span><text:span text:style-name="T26"> End</text:span><text:span text:style-name="T79">=</text:span><text:span text:style-name="T114">"End"</text:span><text:span text:style-name="T79">&gt;</text:span></text:p>
      <text:p text:style-name="P118"><text:span text:style-name="T38"><text:s text:c="4"/></text:span><text:span text:style-name="T79">&lt;</text:span><text:span text:style-name="T11">Block </text:span><text:span text:style-name="T26">Name</text:span><text:span text:style-name="T79">=</text:span><text:span text:style-name="T114">"C_block"</text:span><text:span text:style-name="T26"> Start</text:span><text:span text:style-name="T79">=</text:span><text:span text:style-name="T114">"{"</text:span><text:span text:style-name="T26"> End</text:span><text:span text:style-name="T79">=</text:span><text:span text:style-name="T114">"}"</text:span><text:span text:style-name="T79">&gt; &lt;/</text:span><text:span text:style-name="T11">Block</text:span><text:span text:style-name="T79">&gt;</text:span></text:p>
      <text:p text:style-name="P118"><text:span text:style-name="T38"><text:s text:c="2"/></text:span><text:span text:style-name="T79">&lt;/</text:span><text:span text:style-name="T11">Block</text:span><text:span text:style-name="T79">&gt;</text:span></text:p>
      <text:p text:style-name="P159"/>
      <text:p text:style-name="P159">This form avoids using the "Parent" parameter and is clearer. Therefore it is the preferable way to be used.</text:p>
      <text:p text:style-name="P159"/>
      <text:list xml:id="list230305046454826" text:continue-numbering="true" text:style-name="WW8Num24">
        <text:list-item>
          <text:list>
            <text:list-item>
              <text:list>
                <text:list-item>
                  <text:h text:style-name="P261" text:outline-level="3"><text:bookmark-start text:name="__RefHeading__55819_1899150412"/>Closing the Parent block<text:bookmark-end text:name="__RefHeading__55819_1899150412"/></text:h>
                </text:list-item>
              </text:list>
            </text:list-item>
          </text:list>
        </text:list-item>
      </text:list>
      <text:p text:style-name="P75"/>
      <text:p text:style-name="P86"><text:bookmark text:name="result_box76"/>The "CloseParent" parameter allows to force the closure of the parent block, when a child block is closed.</text:p>
      <text:p text:style-name="P89"><text:span text:style-name="T136"><text:line-break/><text:tab/>This is a way to close two blocks simultaneously, using the same closing delimiter. As an example, consider the following Pascal code:</text:span> </text:p>
      <text:p text:style-name="P110"><text:soft-page-break/></text:p>
      <text:p text:style-name="P75"><draw:frame draw:style-name="fr5" draw:name="gráficos2" text:anchor-type="paragraph" svg:x="3.51cm" svg:y="-0.023cm" svg:width="7.594cm" svg:height="5.689cm" draw:z-index="50"><draw:image xlink:href="Pictures/100000000000011F000000D796F546C9A27A779B.png" xlink:type="simple" xlink:show="embed" xlink:actuate="onLoad"/></draw:frame> </text:p>
      <text:p text:style-name="P75"/>
      <text:p text:style-name="P75"/>
      <text:p text:style-name="P75"/>
      <text:p text:style-name="P75"/>
      <text:p text:style-name="P75"/>
      <text:p text:style-name="P75"/>
      <text:p text:style-name="P75"/>
      <text:p text:style-name="P75"/>
      <text:p text:style-name="P75"/>
      <text:p text:style-name="P75"/>
      <text:p text:style-name="P33"><text:bookmark text:name="result_box77"/><text:span text:style-name="T136"><text:tab/>This structure contains two blocks: "procedure ... end" and "begin ... end", starting in different positions, but nevertheless, must end with the same delimiter "end".<text:line-break/><text:line-break/><text:tab/>A simple definition like this</text:span>:</text:p>
      <text:p text:style-name="P69"/>
      <text:p text:style-name="P152"><text:span text:style-name="T24"><text:s/></text:span><text:span text:style-name="T83">&lt;</text:span><text:span text:style-name="T16">Block Start</text:span><text:span text:style-name="T83">=</text:span><text:span text:style-name="T118">"Procedure"</text:span><text:span text:style-name="T24"> </text:span><text:span text:style-name="T16">End</text:span><text:span text:style-name="T83">=</text:span><text:span text:style-name="T118">"</text:span><text:span text:style-name="T119">End</text:span><text:span text:style-name="T118">"</text:span><text:span text:style-name="T83">&gt;</text:span></text:p>
      <text:p text:style-name="P152"><text:span text:style-name="T24"><text:s text:c="3"/></text:span><text:span text:style-name="T83">&lt;</text:span><text:span text:style-name="T16">Section Start</text:span><text:span text:style-name="T83">=</text:span><text:span text:style-name="T118">"Var"</text:span><text:span text:style-name="T83">&gt;</text:span><text:span text:style-name="T24"> </text:span><text:span text:style-name="T83">&lt;/</text:span><text:span text:style-name="T16">Section</text:span><text:span text:style-name="T83">&gt;</text:span></text:p>
      <text:p text:style-name="P152"><text:span text:style-name="T24"><text:s text:c="3"/></text:span><text:span text:style-name="T83">&lt;</text:span><text:span text:style-name="T16">Block Start</text:span><text:span text:style-name="T83">=</text:span><text:span text:style-name="T118">"Begin"</text:span><text:span text:style-name="T24"> </text:span><text:span text:style-name="T16">End</text:span><text:span text:style-name="T83">=</text:span><text:span text:style-name="T118">"</text:span><text:span text:style-name="T119">End</text:span><text:span text:style-name="T118">"</text:span><text:span text:style-name="T83">&gt;&lt;/</text:span><text:span text:style-name="T16">Block</text:span><text:span text:style-name="T83">&gt;</text:span></text:p>
      <text:p text:style-name="P152"><text:span text:style-name="T24"><text:s/></text:span><text:span text:style-name="T83">&lt;/</text:span><text:span text:style-name="T16">Block</text:span><text:span text:style-name="T83">&gt;</text:span></text:p>
      <text:p text:style-name="P69"/>
      <text:p text:style-name="P33"><text:bookmark text:name="result_box78"/><text:span text:style-name="T136"><text:tab/>Will not work properly for this syntax, because the delimiter "end" will be recognized only for the block "begin ... end" leaving without closing the block "procedure ... end".<text:line-break/><text:line-break/><text:tab/>To successfully implement this folding structure, we must use this definition:</text:span> </text:p>
      <text:p text:style-name="P60"/>
      <text:p text:style-name="P152"><text:span text:style-name="T24"><text:s/></text:span><text:span text:style-name="T83">&lt;</text:span><text:span text:style-name="T16">Block Start</text:span><text:span text:style-name="T83">=</text:span><text:span text:style-name="T118">"Procedure"</text:span><text:span text:style-name="T24"> </text:span><text:span text:style-name="T16">End</text:span><text:span text:style-name="T83">=</text:span><text:span text:style-name="T118">"</text:span><text:span text:style-name="T119">End</text:span><text:span text:style-name="T118">"</text:span><text:span text:style-name="T83">&gt;</text:span></text:p>
      <text:p text:style-name="P152"><text:span text:style-name="T24"><text:s text:c="3"/></text:span><text:span text:style-name="T83">&lt;</text:span><text:span text:style-name="T16">Section Start</text:span><text:span text:style-name="T83">=</text:span><text:span text:style-name="T118">"Var"</text:span><text:span text:style-name="T83">&gt;</text:span><text:span text:style-name="T24"> </text:span><text:span text:style-name="T83">&lt;/</text:span><text:span text:style-name="T16">Section</text:span><text:span text:style-name="T83">&gt;</text:span></text:p>
      <text:p text:style-name="P152"><text:span text:style-name="T24"><text:s text:c="3"/></text:span><text:span text:style-name="T83">&lt;</text:span><text:span text:style-name="T16">Block Start</text:span><text:span text:style-name="T83">=</text:span><text:span text:style-name="T118">"Begin"</text:span><text:span text:style-name="T24"> </text:span><text:span text:style-name="T16">End</text:span><text:span text:style-name="T83">=</text:span><text:span text:style-name="T118">"</text:span><text:span text:style-name="T119">End</text:span><text:span text:style-name="T118">"</text:span><text:span text:style-name="T24"> </text:span><text:span text:style-name="T56">CloseParent</text:span><text:span text:style-name="T83">=</text:span><text:span text:style-name="T118">"true"</text:span><text:span text:style-name="T83">&gt;&lt;/</text:span><text:span text:style-name="T16">Block</text:span><text:span text:style-name="T83">&gt;</text:span></text:p>
      <text:p text:style-name="P152"><text:span text:style-name="T24"><text:s/></text:span><text:span text:style-name="T83">&lt;/</text:span><text:span text:style-name="T16">Block</text:span><text:span text:style-name="T83">&gt;</text:span></text:p>
      <text:p text:style-name="P69"/>
      <text:p text:style-name="P60"><text:tab/>The use of "CloseParent" parameter will do when closing the block "begin ... end", the block "procedure ... end" will be also closed.</text:p>
      <text:p text:style-name="P60"/>
      <text:list xml:id="list230305302154090" text:continue-numbering="true" text:style-name="WW8Num24">
        <text:list-item>
          <text:list>
            <text:list-item>
              <text:list>
                <text:list-item>
                  <text:h text:style-name="P261" text:outline-level="3">Order matters</text:h>
                </text:list-item>
              </text:list>
            </text:list-item>
          </text:list>
        </text:list-item>
      </text:list>
      <text:p text:style-name="P86"/>
      <text:p text:style-name="P86"><text:soft-page-break/>There may be situations where there are two block definitions apply to the same case. Consider we want to implement the recognition of a Pascal code, including declaration of procedures, as shown in the following figure:.</text:p>
      <text:p text:style-name="P87"/>
      <text:p text:style-name="P60"><draw:frame draw:style-name="fr6" draw:name="gráficos3" text:anchor-type="paragraph" svg:width="7.594cm" svg:height="5.689cm" draw:z-index="53"><draw:image xlink:href="Pictures/100000000000011F000000D7FE3F4B4CFC2958D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60"><text:tab/>The XML definition (including color for blocks like help) could be:</text:p>
      <text:p text:style-name="P69"/>
      <text:p text:style-name="P152"><text:span text:style-name="T24"><text:s/></text:span><text:span text:style-name="T83">&lt;</text:span><text:span text:style-name="T16">Block Start</text:span><text:span text:style-name="T83">=</text:span><text:span text:style-name="T118">"begin"</text:span><text:span text:style-name="T24"> </text:span><text:span text:style-name="T16">End</text:span><text:span text:style-name="T83">=</text:span><text:span text:style-name="T118">"</text:span><text:span text:style-name="T119">End</text:span><text:span text:style-name="T118">"</text:span><text:span text:style-name="T24"> </text:span><text:span text:style-name="T56">BackCol</text:span><text:span text:style-name="T83">=</text:span><text:span text:style-name="T118">"yellow"</text:span><text:span text:style-name="T83">&gt;&lt;/</text:span><text:span text:style-name="T16">Block</text:span><text:span text:style-name="T83">&gt;</text:span></text:p>
      <text:p text:style-name="P144"/>
      <text:p text:style-name="P152"><text:span text:style-name="T24"><text:s/></text:span><text:span text:style-name="T83">&lt;</text:span><text:span text:style-name="T16">Block Start</text:span><text:span text:style-name="T83">=</text:span><text:span text:style-name="T118">"Procedure"</text:span><text:span text:style-name="T24"> </text:span><text:span text:style-name="T16">End</text:span><text:span text:style-name="T83">=</text:span><text:span text:style-name="T118">"</text:span><text:span text:style-name="T119">End</text:span><text:span text:style-name="T118">"</text:span><text:span text:style-name="T83">&gt;</text:span></text:p>
      <text:p text:style-name="P152"><text:span text:style-name="T24"><text:s text:c="3"/></text:span><text:span text:style-name="T83">&lt;</text:span><text:span text:style-name="T16">Section Start</text:span><text:span text:style-name="T83">=</text:span><text:span text:style-name="T118">"Var"</text:span><text:span text:style-name="T83">&gt;</text:span><text:span text:style-name="T24"> </text:span><text:span text:style-name="T83">&lt;/</text:span><text:span text:style-name="T16">Section</text:span><text:span text:style-name="T83">&gt;</text:span></text:p>
      <text:p text:style-name="P152"><text:span text:style-name="T24"><text:s text:c="3"/></text:span><text:span text:style-name="T83">&lt;</text:span><text:span text:style-name="T16">Block Start</text:span><text:span text:style-name="T83">=</text:span><text:span text:style-name="T118">"Begin"</text:span><text:span text:style-name="T24"> </text:span><text:span text:style-name="T16">End</text:span><text:span text:style-name="T83">=</text:span><text:span text:style-name="T118">"</text:span><text:span text:style-name="T119">End</text:span><text:span text:style-name="T118">"</text:span><text:span text:style-name="T24"> </text:span><text:span text:style-name="T56">CloseParent</text:span><text:span text:style-name="T83">=</text:span><text:span text:style-name="T118">"true"</text:span><text:span text:style-name="T24"> </text:span><text:span text:style-name="T56">BackCol</text:span><text:span text:style-name="T83">=</text:span><text:span text:style-name="T118">"aqua"</text:span><text:span text:style-name="T83">&gt;&lt;/</text:span><text:span text:style-name="T16">Block</text:span><text:span text:style-name="T83">&gt;</text:span></text:p>
      <text:p text:style-name="P152"><text:span text:style-name="T24"><text:s/></text:span><text:span text:style-name="T83">&lt;/</text:span><text:span text:style-name="T16">Block</text:span><text:span text:style-name="T83">&gt;</text:span></text:p>
      <text:p text:style-name="P69"/>
      <text:p text:style-name="P32"><text:bookmark text:name="result_box79"/><text:tab/>This definition is pretty accurate, but it has two definitions for the block "begin ... end":<text:line-break/></text:p>
      <text:p text:style-name="P33"><text:span text:style-name="T136"><text:tab/>1. which it is valid within the body of a procedure.<text:line-break/><text:tab/>2. is valid in any block, including inside procedures.<text:line-break/><text:line-break/><text:tab/>When the token "begin" within the scanning, is found, the key question is: Which of the two definitions do apply?<text:line-break/><text:line-break/><text:tab/>For getting the answer, we should know that the highlighter, not scan blocks for each token found, but when it encounters a token who is delimiter for one or more blocks, just then explores the list of blocks to find which applied.<text:line-break/><text:line-break/><text:tab/>So when it find the token "begin" within a procedure, it will begin to explore the blocks, in the order they were declared, which applies. Seen this way, the order of declaration matters.<text:line-break/><text:line-break/><text:tab/>Therefore, the answer to the question would be: "The one that is valid in any block" </text:span><text:soft-page-break/><text:span text:style-name="T136">because it is the first to be declared. This of course will produce the wrong result, as shown in the following figure:</text:span> </text:p>
      <text:p text:style-name="P60"/>
      <text:p text:style-name="P60"><draw:frame draw:style-name="fr6" draw:name="gráficos4" text:anchor-type="paragraph" svg:width="8.467cm" svg:height="5.398cm" draw:z-index="54"><draw:image xlink:href="Pictures/1000000000000140000000CC44A6A40089F2D242.png" xlink:type="simple" xlink:show="embed" xlink:actuate="onLoad"/></draw:frame></text:p>
      <text:p text:style-name="P60"/>
      <text:p text:style-name="P60"/>
      <text:p text:style-name="P169"/>
      <text:p text:style-name="P169"/>
      <text:p text:style-name="P169"/>
      <text:p text:style-name="P169"/>
      <text:p text:style-name="P169"/>
      <text:p text:style-name="P169"/>
      <text:p text:style-name="P169"/>
      <text:p text:style-name="P169"/>
      <text:p text:style-name="P169"/>
      <text:p text:style-name="P168"><text:bookmark text:name="result_box80"/><text:span text:style-name="T136"><text:tab/>To get the desired effect, we must first declare the block "begin ... end" of the procedure:</text:span> </text:p>
      <text:p text:style-name="P69"> </text:p>
      <text:p text:style-name="P152"><text:span text:style-name="T24">  </text:span><text:span text:style-name="T83">&lt;</text:span><text:span text:style-name="T16">Block Start</text:span><text:span text:style-name="T83">=</text:span><text:span text:style-name="T118">"Procedure"</text:span><text:span text:style-name="T24"> </text:span><text:span text:style-name="T16">End</text:span><text:span text:style-name="T83">=</text:span><text:span text:style-name="T118">"</text:span><text:span text:style-name="T119">End</text:span><text:span text:style-name="T118">"</text:span><text:span text:style-name="T83">&gt;</text:span></text:p>
      <text:p text:style-name="P152"><text:span text:style-name="T24">    </text:span><text:span text:style-name="T83">&lt;</text:span><text:span text:style-name="T16">Section Start</text:span><text:span text:style-name="T83">=</text:span><text:span text:style-name="T118">"Var"</text:span><text:span text:style-name="T83">&gt;</text:span><text:span text:style-name="T24"> </text:span><text:span text:style-name="T83">&lt;/</text:span><text:span text:style-name="T16">Section</text:span><text:span text:style-name="T83">&gt;</text:span></text:p>
      <text:p text:style-name="P152"><text:span text:style-name="T24">    </text:span><text:span text:style-name="T83">&lt;</text:span><text:span text:style-name="T16">Block Start</text:span><text:span text:style-name="T83">=</text:span><text:span text:style-name="T118">"Begin"</text:span><text:span text:style-name="T24"> </text:span><text:span text:style-name="T16">End</text:span><text:span text:style-name="T83">=</text:span><text:span text:style-name="T118">"</text:span><text:span text:style-name="T119">End</text:span><text:span text:style-name="T118">"</text:span><text:span text:style-name="T24"> </text:span><text:span text:style-name="T56">CloseParent</text:span><text:span text:style-name="T83">=</text:span><text:span text:style-name="T118">"true"</text:span><text:span text:style-name="T24"> </text:span><text:span text:style-name="T56">BackCol</text:span><text:span text:style-name="T83">=</text:span><text:span text:style-name="T118">"aqua"</text:span><text:span text:style-name="T83">&gt;&lt;/</text:span><text:span text:style-name="T16">Block</text:span><text:span text:style-name="T83">&gt;</text:span></text:p>
      <text:p text:style-name="P152"><text:span text:style-name="T24">  </text:span><text:span text:style-name="T83">&lt;/</text:span><text:span text:style-name="T16">Block</text:span><text:span text:style-name="T83">&gt;</text:span></text:p>
      <text:p text:style-name="P152"><text:span text:style-name="T24">  </text:span><text:span text:style-name="T83">&lt;</text:span><text:span text:style-name="T16">Block Start</text:span><text:span text:style-name="T83">=</text:span><text:span text:style-name="T118">"begin"</text:span><text:span text:style-name="T24"> </text:span><text:span text:style-name="T16">End</text:span><text:span text:style-name="T83">=</text:span><text:span text:style-name="T118">"</text:span><text:span text:style-name="T119">End</text:span><text:span text:style-name="T118">"</text:span><text:span text:style-name="T24"> </text:span><text:span text:style-name="T56">BackCol</text:span><text:span text:style-name="T83">=</text:span><text:span text:style-name="T118">"yellow"</text:span><text:span text:style-name="T83">&gt;&lt;/</text:span><text:span text:style-name="T16">Block</text:span><text:span text:style-name="T83">&gt;</text:span></text:p>
      <text:p text:style-name="P69"> </text:p>
      <text:p text:style-name="P60"><text:tab/>The result must be like in the following figure:</text:p>
      <text:p text:style-name="P60"/>
      <text:p text:style-name="P60"><draw:frame draw:style-name="fr5" draw:name="gráficos5" text:anchor-type="paragraph" svg:x="3.12cm" svg:y="0.072cm" svg:width="8.467cm" svg:height="5.398cm" draw:z-index="55"><draw:image xlink:href="Pictures/1000000000000140000000CCF980913174D53211.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tab/>Note that this definition of procedure, is defined as valid in any block, including the block of the <text:s/>same procedure, so that is a recursive definition. That is, they allow us to define procedures within another procedure, as shown in Figure:</text:p>
      <text:p text:style-name="P60"/>
      <text:p text:style-name="P60"><draw:frame draw:style-name="fr6" draw:name="gráficos6" text:anchor-type="paragraph" svg:width="9.155cm" svg:height="6.668cm" draw:z-index="56"><draw:image xlink:href="Pictures/100000000000015A000000FCDA8C16B78E5EED33.png" xlink:type="simple" xlink:show="embed" xlink:actuate="onLoad"/></draw:frame></text:p>
      <text:p text:style-name="P60"/>
      <text:p text:style-name="P60"/>
      <text:p text:style-name="P60"/>
      <text:p text:style-name="P60"/>
      <text:p text:style-name="P60"/>
      <text:p text:style-name="P60"><text:tab/></text:p>
      <text:p text:style-name="P55"/>
      <text:p text:style-name="P55"/>
      <text:p text:style-name="P169"/>
      <text:p text:style-name="P169"/>
      <text:p text:style-name="P169"/>
      <text:p text:style-name="P169"/>
      <text:p text:style-name="P169"/>
      <text:p text:style-name="P169"/>
      <text:p text:style-name="P169"/>
      <text:p text:style-name="P169"/>
      <text:list xml:id="list230305170838418" text:continue-numbering="true" text:style-name="WW8Num24">
        <text:list-item>
          <text:list>
            <text:list-item>
              <text:h text:style-name="P250"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75"/>
      <text:p text:style-name="P75">The blocks definition, using the "Start" and "End" parameters, <text:s/>is a simple but limited way to specify blocks.</text:p>
      <text:p text:style-name="P75"/>
      <text:p text:style-name="P75">There is an alternative way that allows us greater freedom. This is to indicate the delimiters in nested tags &lt;Start&gt; and &lt;End&gt;.</text:p>
      <text:p text:style-name="P75"/>
      <text:p text:style-name="P75">To appreciate the difference, consider the following statement:</text:p>
      <text:p text:style-name="P75"/>
      <text:p text:style-name="P118"><text:span text:style-name="T38"><text:s text:c="2"/></text:span><text:span text:style-name="T79">&lt;</text:span><text:span text:style-name="T11">Block </text:span><text:span text:style-name="T26">Start</text:span><text:span text:style-name="T79">=</text:span><text:span text:style-name="T114">"Repeat"</text:span><text:span text:style-name="T26"> End</text:span><text:span text:style-name="T79">=</text:span><text:span text:style-name="T26"> </text:span><text:span text:style-name="T114">"Until"</text:span><text:span text:style-name="T26"> </text:span><text:span text:style-name="T79">&gt;</text:span><text:span text:style-name="T38"> </text:span><text:span text:style-name="T79">&lt;/</text:span><text:span text:style-name="T11">Block</text:span><text:span text:style-name="T79">&gt;</text:span></text:p>
      <text:p text:style-name="P75"/>
      <text:p text:style-name="P75">And alternatively, equivalent:</text:p>
      <text:p text:style-name="P75"/>
      <text:p text:style-name="P118"><text:span text:style-name="T38"><text:s text:c="2"/></text:span><text:span text:style-name="T79">&lt;</text:span><text:span text:style-name="T11">Block</text:span><text:span text:style-name="T79">&gt;</text:span></text:p>
      <text:p text:style-name="P118"><text:span text:style-name="T38"><text:s text:c="4"/></text:span><text:span text:style-name="T79">&lt;</text:span><text:span text:style-name="T26">Start</text:span><text:span text:style-name="T79">&gt;</text:span><text:span text:style-name="T26"> Repeat </text:span><text:span text:style-name="T79">&lt;/</text:span><text:span text:style-name="T26">Start</text:span><text:span text:style-name="T79">&gt;</text:span></text:p>
      <text:p text:style-name="P118"><text:span text:style-name="T80"><text:s text:c="4"/></text:span><text:span text:style-name="T79">&lt;</text:span><text:span text:style-name="T26">End</text:span><text:span text:style-name="T79">&gt;</text:span><text:span text:style-name="T26"> Until </text:span><text:span text:style-name="T79">&lt;/</text:span><text:span text:style-name="T26">End</text:span><text:span text:style-name="T79">&gt;</text:span></text:p>
      <text:p text:style-name="P118"><text:span text:style-name="T38"><text:s text:c="2"/></text:span><text:span text:style-name="T79">&lt;/</text:span><text:span text:style-name="T11">Block</text:span><text:span text:style-name="T79">&gt;</text:span></text:p>
      <text:p text:style-name="P75"/>
      <text:p text:style-name="P75">This way of defining blocks gives us more freedom to:</text:p>
      <text:p text:style-name="P75"/>
      <text:list xml:id="list230306318972079" text:continue-list="list8979319090707842219" text:style-name="WW8Num17">
        <text:list-item>
          <text:p text:style-name="P221">Including the additional parameter "TokPos" in the delimiters.</text:p>
        </text:list-item>
        <text:list-item>
          <text:p text:style-name="P221">To include multiple delimiters.</text:p>
        </text:list-item>
      </text:list>
      <text:p text:style-name="P75"/>
      <text:p text:style-name="P9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8"><text:span text:style-name="T38"><text:s text:c="2"/></text:span><text:span text:style-name="T79">&lt;</text:span><text:span text:style-name="T11">Block</text:span><text:span text:style-name="T79">&gt;</text:span></text:p>
      <text:p text:style-name="P118"><text:span text:style-name="T38"><text:s text:c="4"/></text:span><text:span text:style-name="T79">&lt;</text:span><text:span text:style-name="T11">Start </text:span><text:span text:style-name="T26">TokPos</text:span><text:span text:style-name="T79">=</text:span><text:span text:style-name="T114">"2"</text:span><text:span text:style-name="T79">&gt;</text:span><text:span text:style-name="T26"> Initiation </text:span><text:span text:style-name="T79">&lt;/</text:span><text:span text:style-name="T11">Start</text:span><text:span text:style-name="T79">&gt;</text:span></text:p>
      <text:p text:style-name="P118"><text:span text:style-name="T38"><text:s text:c="4"/></text:span><text:span text:style-name="T79">&lt;</text:span><text:span text:style-name="T11">End</text:span><text:span text:style-name="T79">&gt;</text:span><text:span text:style-name="T26"> End </text:span><text:span text:style-name="T79">&lt;/</text:span><text:span text:style-name="T11">End</text:span><text:span text:style-name="T79">&gt;</text:span></text:p>
      <text:p text:style-name="P118"><text:span text:style-name="T38"><text:s text:c="2"/></text:span><text:span text:style-name="T79">&lt;/</text:span><text:span text:style-name="T11">Block</text:span><text:span text:style-name="T79">&gt;</text:span></text:p>
      <text:p text:style-name="P75"/>
      <text:p text:style-name="P75">Hopes to use as a starting delimiter, a special identifier that is declared as follows:</text:p>
      <text:p text:style-name="P75"/>
      <text:p text:style-name="P118"><text:span text:style-name="T38"><text:s text:c="2"/></text:span><text:span text:style-name="T79">&lt;</text:span><text:span text:style-name="T11">Identifiers</text:span><text:span text:style-name="T79">&gt;</text:span><text:span text:style-name="T26"> </text:span></text:p>
      <text:p text:style-name="P118"><text:span text:style-name="T38"><text:s text:c="4"/></text:span><text:span text:style-name="T79">&lt;</text:span><text:span text:style-name="T11">Keyword </text:span><text:span text:style-name="T26">TokPos</text:span><text:span text:style-name="T79">=</text:span><text:span text:style-name="T114">"2"</text:span><text:span text:style-name="T79">&gt;</text:span><text:span text:style-name="T26"> Initiation </text:span><text:span text:style-name="T79">&lt;/</text:span><text:span text:style-name="T11">Keyword</text:span><text:span text:style-name="T79">&gt;</text:span><text:span text:style-name="T26"> </text:span></text:p>
      <text:p text:style-name="P124"/>
      <text:p text:style-name="P118"><text:soft-page-break/><text:span text:style-name="T38"><text:s text:c="2"/></text:span><text:span text:style-name="T79">&lt;/</text:span><text:span text:style-name="T11">Identifiers</text:span><text:span text:style-name="T79">&gt;</text:span></text:p>
      <text:p text:style-name="P75"/>
      <text:p text:style-name="P75">If there this definition, proceed to create it, because the block delimiters required whenever there first as special tokens.</text:p>
      <text:p text:style-name="P75"/>
      <text:p text:style-name="P75">The alternative delimiters, definition allows us also define more than one start or end delimiter, for the same block.</text:p>
      <text:p text:style-name="P159"/>
      <text:p text:style-name="P159">For example if we want the BEGIN ... END block can also be open with the keyword START, then the statement would be:</text:p>
      <text:p text:style-name="P159"/>
      <text:p text:style-name="P118"><text:span text:style-name="T38"><text:s text:c="2"/></text:span><text:span text:style-name="T79">&lt;</text:span><text:span text:style-name="T11">Block</text:span><text:span text:style-name="T79">&gt;</text:span><text:span text:style-name="T26"> </text:span></text:p>
      <text:p text:style-name="P118"><text:span text:style-name="T38"><text:s text:c="4"/></text:span><text:span text:style-name="T79">&lt;</text:span><text:span text:style-name="T11">Start</text:span><text:span text:style-name="T79">&gt;</text:span><text:span text:style-name="T26"> Begin </text:span><text:span text:style-name="T79">&lt;/</text:span><text:span text:style-name="T11">Start</text:span><text:span text:style-name="T79">&gt;</text:span></text:p>
      <text:p text:style-name="P118"><text:span text:style-name="T38"><text:s text:c="4"/></text:span><text:span text:style-name="T79">&lt;</text:span><text:span text:style-name="T11">Start</text:span><text:span text:style-name="T79">&gt;</text:span><text:span text:style-name="T26"> Initiation </text:span><text:span text:style-name="T79">&lt;/</text:span><text:span text:style-name="T11">Start</text:span><text:span text:style-name="T79">&gt;</text:span></text:p>
      <text:p text:style-name="P118"><text:span text:style-name="T38"><text:s text:c="4"/></text:span><text:span text:style-name="T79">&lt;</text:span><text:span text:style-name="T11">End</text:span><text:span text:style-name="T79">&gt;</text:span><text:span text:style-name="T26"> </text:span><text:span text:style-name="T22">End</text:span><text:span text:style-name="T11"> </text:span><text:span text:style-name="T79">&lt;/</text:span><text:span text:style-name="T11">End</text:span><text:span text:style-name="T79">&gt;</text:span></text:p>
      <text:p text:style-name="P118"><text:span text:style-name="T38"><text:s text:c="2"/></text:span><text:span text:style-name="T79">&lt;/</text:span><text:span text:style-name="T11">Block</text:span><text:span text:style-name="T79">&gt;</text:span></text:p>
      <text:p text:style-name="P159"/>
      <text:p text:style-name="P159">Each &lt;Start&gt;, which is placed inside the block definition, will define one (and only one) additional initial delimiter. </text:p>
      <text:p text:style-name="P159"/>
      <text:p text:style-name="P159">Note that the spaces before and after the &lt;Start&gt; &lt;/ Start&gt; are ignored. That is, it can not be included as part of the bounding areas.</text:p>
      <text:p text:style-name="P159"/>
      <text:p text:style-name="P159">Likewise, to add more delimiters end, we must use the &lt;End&gt;, within the block definition:</text:p>
      <text:p text:style-name="P159"/>
      <text:p text:style-name="P159"/>
      <text:p text:style-name="P118"><text:span text:style-name="T38"><text:s text:c="2"/></text:span><text:span text:style-name="T79">&lt;</text:span><text:span text:style-name="T11">Block</text:span><text:span text:style-name="T79">&gt;</text:span><text:span text:style-name="T26"> </text:span></text:p>
      <text:p text:style-name="P118"><text:span text:style-name="T38"><text:s text:c="4"/></text:span><text:span text:style-name="T79">&lt;</text:span><text:span text:style-name="T11">Start</text:span><text:span text:style-name="T79">&gt;</text:span><text:span text:style-name="T26"> Begin </text:span><text:span text:style-name="T79">&lt;/</text:span><text:span text:style-name="T11">Start</text:span><text:span text:style-name="T79">&gt;</text:span></text:p>
      <text:p text:style-name="P118"><text:span text:style-name="T38"><text:s text:c="4"/></text:span><text:span text:style-name="T79">&lt;</text:span><text:span text:style-name="T11">Start</text:span><text:span text:style-name="T79">&gt;</text:span><text:span text:style-name="T26"> Initiation </text:span><text:span text:style-name="T79">&lt;/</text:span><text:span text:style-name="T11">Start</text:span><text:span text:style-name="T79">&gt;</text:span></text:p>
      <text:p text:style-name="P118"><text:span text:style-name="T38"><text:s text:c="4"/></text:span><text:span text:style-name="T79">&lt;</text:span><text:span text:style-name="T11">End</text:span><text:span text:style-name="T79">&gt;</text:span><text:span text:style-name="T26"> </text:span><text:span text:style-name="T22">End</text:span><text:span text:style-name="T11"> </text:span><text:span text:style-name="T79">&lt;/</text:span><text:span text:style-name="T11">End</text:span><text:span text:style-name="T79">&gt;</text:span></text:p>
      <text:p text:style-name="P118"><text:span text:style-name="T38"><text:s text:c="4"/></text:span><text:span text:style-name="T79">&lt;</text:span><text:span text:style-name="T11">End</text:span><text:span text:style-name="T79">&gt;</text:span><text:span text:style-name="T26"> Finalization</text:span><text:span text:style-name="T11"> </text:span><text:span text:style-name="T79">&lt;/</text:span><text:span text:style-name="T11">End</text:span><text:span text:style-name="T79">&gt;</text:span></text:p>
      <text:p text:style-name="P118"><text:span text:style-name="T38"><text:s text:c="2"/></text:span><text:span text:style-name="T79">&lt;/</text:span><text:span text:style-name="T11">Block</text:span><text:span text:style-name="T79">&gt;</text:span></text:p>
      <text:p text:style-name="P159"/>
      <text:p text:style-name="P159">Additional delimiters will also support the "TokPos" parameter. The following example shows the definition of a block with two delimiters:</text:p>
      <text:p text:style-name="P159"/>
      <text:p text:style-name="P118"><text:span text:style-name="T38"><text:s text:c="2"/></text:span><text:span text:style-name="T79">&lt;</text:span><text:span text:style-name="T11">Block </text:span><text:span text:style-name="T26">Name</text:span><text:span text:style-name="T79">=</text:span><text:span text:style-name="T114">"Oracle_query"</text:span><text:span text:style-name="T26"> Start</text:span><text:span text:style-name="T79">=</text:span><text:span text:style-name="T114">"Select"</text:span><text:span text:style-name="T79">&gt;</text:span></text:p>
      <text:p text:style-name="P118"><text:span text:style-name="T38"><text:s text:c="4"/></text:span><text:span text:style-name="T79">&lt;</text:span><text:span text:style-name="T11">End</text:span><text:span text:style-name="T79">&gt;</text:span><text:span text:style-name="T26"> </text:span><text:span text:style-name="T22">End</text:span><text:span text:style-name="T11"> </text:span><text:span text:style-name="T79">&lt;/</text:span><text:span text:style-name="T11">End</text:span><text:span text:style-name="T79">&gt;</text:span></text:p>
      <text:p text:style-name="P118"><text:span text:style-name="T38"><text:s text:c="4"/></text:span><text:span text:style-name="T79">&lt;</text:span><text:span text:style-name="T11">End</text:span><text:span text:style-name="T26"> TokPos</text:span><text:span text:style-name="T79">=</text:span><text:span text:style-name="T114">"1"</text:span><text:span text:style-name="T79">&gt;</text:span><text:span text:style-name="T26"> </text:span><text:span text:style-name="T23">/</text:span><text:span text:style-name="T26"> </text:span><text:span text:style-name="T79">&lt;/</text:span><text:span text:style-name="T11">End</text:span><text:span text:style-name="T79">&gt;</text:span></text:p>
      <text:p text:style-name="P118"><text:span text:style-name="T38"><text:s text:c="2"/></text:span><text:span text:style-name="T79">&lt;/</text:span><text:span text:style-name="T11">Block</text:span><text:span text:style-name="T79">&gt;</text:span></text:p>
      <text:p text:style-name="P159"/>
      <text:p text:style-name="P159"><text:soft-page-break/>This definition uses the symbol "/" as the end delimiter and also specifies the "TokPos" parameter to specify a specific position of the token.</text:p>
      <text:p text:style-name="P160"><text:bookmark-start text:name="__RefHeading___Toc404419491"/><text:bookmark-end text:name="__RefHeading___Toc404419491"/></text:p>
      <text:p text:style-name="P15"/>
      <text:p text:style-name="P159"/>
      <text:list xml:id="list230304551948888" text:continue-list="list230305170838418" text:style-name="WW8Num24">
        <text:list-item>
          <text:list>
            <text:list-item>
              <text:h text:style-name="P250" text:outline-level="2"><text:bookmark-start text:name="__RefHeading___Toc404419493"/><text:s/>Defining Sections<text:bookmark-end text:name="__RefHeading___Toc404419493"/></text:h>
            </text:list-item>
          </text:list>
        </text:list-item>
      </text:list>
      <text:p text:style-name="P15"/>
      <text:p text:style-name="P75">The sections are defined with the tag &lt;Section&gt;.</text:p>
      <text:p text:style-name="P75"/>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5"/>
      <text:p text:style-name="P75">Section parameters are similar to the parameters of a block except that there is no ending delimiter, because the sections have another mechanism to determine an end.</text:p>
      <text:p text:style-name="P75"/>
      <text:p text:style-name="P75">As the sections are in fact also blocks most blocks rules apply also for sections. Coloring sections also is similar to the colored blocks.</text:p>
      <text:p text:style-name="P80"><text:s/></text:p>
      <text:p text:style-name="P75">In the following example we declare the INTERFACE section of the Pascal language:</text:p>
      <text:p text:style-name="P75"/>
      <text:p text:style-name="P118"><text:span text:style-name="T38"><text:s text:c="2"/></text:span><text:span text:style-name="T79">&lt;</text:span><text:span text:style-name="T11">Section </text:span><text:span text:style-name="T26">Start</text:span><text:span text:style-name="T79">=</text:span><text:span text:style-name="T114">"Interface"</text:span><text:span text:style-name="T79">&gt;</text:span></text:p>
      <text:p text:style-name="P118"><text:span text:style-name="T38"><text:s text:c="2"/></text:span><text:span text:style-name="T79">&lt;/</text:span><text:span text:style-name="T11">Section</text:span><text:span text:style-name="T79">&gt;</text:span></text:p>
      <text:p text:style-name="P75"/>
      <text:p text:style-name="P75">This section will start after the token "interface" and continues to the end of the program if no other section is defined. </text:p>
      <text:p text:style-name="P75"/>
      <text:p text:style-name="P75">If we define two sections, we are dividing the code into two or more parts:</text:p>
      <text:p text:style-name="P75"/>
      <text:p text:style-name="P118"><text:span text:style-name="T38"><text:s text:c="2"/></text:span><text:span text:style-name="T79">&lt;</text:span><text:span text:style-name="T11">Section </text:span><text:span text:style-name="T26">Start</text:span><text:span text:style-name="T79">=</text:span><text:span text:style-name="T114">"Interface"</text:span><text:span text:style-name="T79">&gt;</text:span><text:span text:style-name="T26"> </text:span><text:span text:style-name="T79">&lt;/</text:span><text:span text:style-name="T11">Section</text:span><text:span text:style-name="T79">&gt;</text:span></text:p>
      <text:p text:style-name="P118"><text:soft-page-break/><text:span text:style-name="T38"><text:s text:c="2"/></text:span><text:span text:style-name="T79">&lt;</text:span><text:span text:style-name="T11">Section </text:span><text:span text:style-name="T26">Start</text:span><text:span text:style-name="T79">=</text:span><text:span text:style-name="T114">"Implementation"</text:span><text:span text:style-name="T79">&gt;</text:span><text:span text:style-name="T26"> </text:span><text:span text:style-name="T79">&lt;/</text:span><text:span text:style-name="T11">Section</text:span><text:span text:style-name="T79">&gt;</text:span></text:p>
      <text:p text:style-name="P124"/>
      <text:p text:style-name="P75"/>
      <text:p text:style-name="P75">Now we have an "interface" section may result in the initiation of an "implementation" section, if there is one.</text:p>
      <text:p text:style-name="P75"/>
      <text:p text:style-name="P75">The following figure shows a sample code with the created sections:</text:p>
      <text:p text:style-name="P75"/>
      <text:p text:style-name="P92"><draw:frame draw:style-name="fr4" draw:name="Image14" text:anchor-type="as-char" svg:width="9.816cm" svg:height="5.847cm" draw:z-index="12"><draw:image xlink:href="Pictures/1000000000000173000000DDE75B9F29C70A01C1.png" xlink:type="simple" xlink:show="embed" xlink:actuate="onLoad"/></draw:frame></text:p>
      <text:p text:style-name="P75"/>
      <text:p text:style-name="P75">The order in which the sections are defined is not important. It doesn't implies some order in recognizing the sections.</text:p>
      <text:p text:style-name="P75"/>
      <text:p text:style-name="P75">We could have the following example code:</text:p>
      <text:p text:style-name="P75"/>
      <text:p text:style-name="P92"><draw:frame draw:style-name="fr4" draw:name="Image15" text:anchor-type="as-char" svg:width="10.689cm" svg:height="5.9cm" draw:z-index="13"><draw:image xlink:href="Pictures/1000000000000194000000DF90362ABAEA77896C.png" xlink:type="simple" xlink:show="embed" xlink:actuate="onLoad"/></draw:frame></text:p>
      <text:p text:style-name="P92"/>
      <text:p text:style-name="P75">Where we can see that the sections, have been correctly recognized, and including a duplicate section.</text:p>
      <text:p text:style-name="P75"/>
      <text:p text:style-name="P75"><text:soft-page-break/>To avoid such a section, it is recognized two or more consecutive times, use the "Unique" parameter. If activated, it will not allow a repeat section after herself. This means that only recognize the first time it appears.</text:p>
      <text:p text:style-name="P75"/>
      <text:p text:style-name="P75">To illustrate the effect of "Unique", say the same old text, but with definition Unique = "true" and the syntax. The effect would be this:</text:p>
      <text:p text:style-name="P75"/>
      <text:p text:style-name="P92"><draw:frame draw:style-name="fr4" draw:name="Image16" text:anchor-type="as-char" svg:width="11.351cm" svg:height="5.847cm" draw:z-index="14"><draw:image xlink:href="Pictures/10000000000001AD000000DD95B805C0D9CE8245.png" xlink:type="simple" xlink:show="embed" xlink:actuate="onLoad"/></draw:frame></text:p>
      <text:p text:style-name="P75"/>
      <text:p text:style-name="P75">As we can see, there is only one "implementation" section (see fold mark), since the latter is not regarded as a new section. However, if it is possible to define "implementation" section again after an "interface" section as far as the highlighter is concerned.</text:p>
      <text:p text:style-name="P75"/>
      <text:p text:style-name="P75">The "Name" of a section, lets us to specify a unique name for the section. If we do not specify a name, the highlighter will assign an internal name, which has the form "Sec1", "Sec2", ..., depending on how many sections there are defined.</text:p>
      <text:p text:style-name="P75"/>
      <text:p text:style-name="P75">You can assign any name to a section except "Main", "MultiToken" and "None", which are names reserved for internal work highlighter.</text:p>
      <text:p text:style-name="P75"/>
      <text:p text:style-name="P75">The name itself is not important to the work of the section, but it is useful for when you want to reference it from another part of the syntax file. </text:p>
      <text:p text:style-name="P75"/>
      <text:p text:style-name="P75">The name of a section should be different from another section or another block. </text:p>
      <text:p text:style-name="P75"/>
      <text:p text:style-name="P75">The following case is an example of a section named:</text:p>
      <text:p text:style-name="P75"/>
      <text:p text:style-name="P118"><text:span text:style-name="T38"><text:s text:c="2"/></text:span><text:span text:style-name="T79">&lt;</text:span><text:span text:style-name="T11">Section </text:span><text:span text:style-name="T26">Name</text:span><text:span text:style-name="T79">=</text:span><text:span text:style-name="T114">"Interface"</text:span><text:span text:style-name="T26"> Start</text:span><text:span text:style-name="T79">=</text:span><text:span text:style-name="T114">"Interface"</text:span><text:span text:style-name="T79">&gt;&lt;/</text:span><text:span text:style-name="T11">Section</text:span><text:span text:style-name="T79">&gt;</text:span></text:p>
      <text:p text:style-name="P75"/>
      <text:p text:style-name="P75"><text:soft-page-break/>The sections also show the fold mark code by default and can be disabled with the "Folding" parameter. </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combination, block-section, can represent common structures in programming languages. Consider for example, the definition of Pascal procedures;</text:p>
      <text:p text:style-name="P81"><draw:frame draw:style-name="fr17" draw:name="Object12" text:anchor-type="char" svg:x="1.663cm" svg:y="0.432cm" svg:width="9.594cm" svg:height="5.175cm" draw:z-index="30"><draw:object-ole xlink:href="./Object 12" xlink:type="simple" xlink:show="embed" xlink:actuate="onLoad"/><draw:image xlink:href="./ObjectReplacements/Object 12"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5"/>
      <text:p text:style-name="P75">The best way to express this structure is driving sections within a block that starts with the reserved word "procedure" and end with "end":</text:p>
      <text:p text:style-name="P75"/>
      <text:p text:style-name="P118"><text:span text:style-name="T38"><text:s text:c="2"/></text:span><text:span text:style-name="T79">&lt;</text:span><text:span text:style-name="T11">Block </text:span><text:span text:style-name="T26">Name</text:span><text:span text:style-name="T79">=</text:span><text:span text:style-name="T114">"Proc"</text:span><text:span text:style-name="T26"> Start</text:span><text:span text:style-name="T79">=</text:span><text:span text:style-name="T114">"Procedure"</text:span><text:span text:style-name="T26"> End</text:span><text:span text:style-name="T79">=</text:span><text:span text:style-name="T114">"End"</text:span><text:span text:style-name="T26"> Parent</text:span><text:span text:style-name="T79">=</text:span><text:span text:style-name="T114">"Main"</text:span><text:span text:style-name="T79">&gt;</text:span></text:p>
      <text:p text:style-name="P118"><text:span text:style-name="T38"><text:s text:c="4"/></text:span><text:span text:style-name="T79">&lt;</text:span><text:span text:style-name="T11">Section </text:span><text:span text:style-name="T26">Start</text:span><text:span text:style-name="T79">=</text:span><text:span text:style-name="T114">"Var"</text:span><text:span text:style-name="T79">&gt;</text:span><text:span text:style-name="T26"> </text:span><text:span text:style-name="T79">&lt;/</text:span><text:span text:style-name="T11">Section</text:span><text:span text:style-name="T79">&gt;</text:span></text:p>
      <text:p text:style-name="P118"><text:span text:style-name="T38"><text:s text:c="4"/></text:span><text:span text:style-name="T79">&lt;</text:span><text:span text:style-name="T11">Section </text:span><text:span text:style-name="T26">Start</text:span><text:span text:style-name="T79">=</text:span><text:span text:style-name="T114">"Begin"</text:span><text:span text:style-name="T79">&gt;</text:span><text:span text:style-name="T26"> </text:span><text:span text:style-name="T79">&lt;/</text:span><text:span text:style-name="T11">Section</text:span><text:span text:style-name="T79">&gt;</text:span></text:p>
      <text:p text:style-name="P118"><text:span text:style-name="T38"><text:s text:c="2"/></text:span><text:span text:style-name="T79">&lt;/</text:span><text:span text:style-name="T11">Block</text:span><text:span text:style-name="T79">&gt;</text:span></text:p>
      <text:p text:style-name="P75"/>
      <text:p text:style-name="P75">The declaration of variables, handles like a section of the block "Proc".</text:p>
      <text:p text:style-name="P75"/>
      <text:p text:style-name="P75">This definition can be completed by adding sections to the declaration of types and constants; and will work well at least for simple cases. The following example shows how a simple pascal procedure would <text:s/>look, using this definition:</text:p>
      <text:p text:style-name="P75"/>
      <text:p text:style-name="P92"><text:soft-page-break/><draw:frame draw:style-name="fr4" draw:name="Image17" text:anchor-type="as-char" svg:width="9.922cm" svg:height="5.715cm" draw:z-index="15"><draw:image xlink:href="Pictures/1000000000000177000000D818B8B839ED5D9EA1.png" xlink:type="simple" xlink:show="embed" xlink:actuate="onLoad"/></draw:frame></text:p>
      <text:p text:style-name="P75"/>
      <text:p text:style-name="P75">To improve the definition, we should consider that the keyword "VAR" can also appear as a parameter switch (to indicate parameters by reference), and not to be confused with variable declaration. </text:p>
      <text:p text:style-name="P75"/>
      <text:p text:style-name="P75">To avoid this misinterpretation, you can create an additional block, including the declaration of parameters of the procedure:</text:p>
      <text:p text:style-name="P75"/>
      <text:p text:style-name="P118"><text:span text:style-name="T38"><text:s text:c="2"/></text:span><text:span text:style-name="T79">&lt;</text:span><text:span text:style-name="T11">Block </text:span><text:span text:style-name="T26">Name</text:span><text:span text:style-name="T79">=</text:span><text:span text:style-name="T114">"Proc"</text:span><text:span text:style-name="T26"> Start</text:span><text:span text:style-name="T79">=</text:span><text:span text:style-name="T114">"Procedure"</text:span><text:span text:style-name="T26"> End</text:span><text:span text:style-name="T79">=</text:span><text:span text:style-name="T114">"End"</text:span><text:span text:style-name="T26"> Parent</text:span><text:span text:style-name="T79">=</text:span><text:span text:style-name="T114">"Main"</text:span><text:span text:style-name="T79">&gt;</text:span></text:p>
      <text:p text:style-name="P118"><text:span text:style-name="T38"><text:s text:c="4"/></text:span><text:span text:style-name="T79">&lt;</text:span><text:span text:style-name="T11">Block </text:span><text:span text:style-name="T26">Name</text:span><text:span text:style-name="T79">=</text:span><text:span text:style-name="T114">"ProcParam"</text:span><text:span text:style-name="T26"> Start</text:span><text:span text:style-name="T79">=</text:span><text:span text:style-name="T114">"</text:span><text:span text:style-name="T115">(</text:span><text:span text:style-name="T114">"</text:span><text:span text:style-name="T26"> End</text:span><text:span text:style-name="T79">=</text:span><text:span text:style-name="T114">"</text:span><text:span text:style-name="T115">)</text:span><text:span text:style-name="T114">"</text:span><text:span text:style-name="T26"> Folding</text:span><text:span text:style-name="T79">=</text:span><text:span text:style-name="T114">"False"</text:span><text:span text:style-name="T79">&gt; &lt;/</text:span><text:span text:style-name="T11">Block</text:span><text:span text:style-name="T79">&gt;</text:span></text:p>
      <text:p text:style-name="P118"><text:span text:style-name="T38"><text:s text:c="4"/></text:span><text:span text:style-name="T79">&lt;</text:span><text:span text:style-name="T11">Section </text:span><text:span text:style-name="T26">Start</text:span><text:span text:style-name="T79">=</text:span><text:span text:style-name="T114">"Var"</text:span><text:span text:style-name="T79">&gt;</text:span><text:span text:style-name="T26"> </text:span><text:span text:style-name="T79">&lt;/</text:span><text:span text:style-name="T11">Section</text:span><text:span text:style-name="T79">&gt;</text:span></text:p>
      <text:p text:style-name="P118"><text:span text:style-name="T38"><text:s text:c="4"/></text:span><text:span text:style-name="T79">&lt;</text:span><text:span text:style-name="T11">Section </text:span><text:span text:style-name="T26">Start</text:span><text:span text:style-name="T79">=</text:span><text:span text:style-name="T114">"Begin" </text:span><text:span text:style-name="T26">Unique</text:span><text:span text:style-name="T79">=</text:span><text:span text:style-name="T114">"True"</text:span><text:span text:style-name="T79">&gt;</text:span><text:span text:style-name="T26"> </text:span><text:span text:style-name="T79">&lt;/</text:span><text:span text:style-name="T11">Section</text:span><text:span text:style-name="T79">&gt;</text:span></text:p>
      <text:p text:style-name="P118"><text:span text:style-name="T38"><text:s text:c="2"/></text:span><text:span text:style-name="T79">&lt;/</text:span><text:span text:style-name="T11">Block</text:span><text:span text:style-name="T79">&gt;</text:span></text:p>
      <text:p text:style-name="P75"/>
      <text:p text:style-name="P75">Now with this protection, the word VAR is ignored when you it is in parentheses in the block procedure.</text:p>
      <text:p text:style-name="P75"/>
      <text:p text:style-name="P75">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5"/>
      <text:p text:style-name="P75"/>
      <text:p text:style-name="P75"/>
      <text:p text:style-name="P107"/>
      <text:list xml:id="list230304516794308" text:continue-numbering="true" text:style-name="WW8Num24">
        <text:list-item>
          <text:list>
            <text:list-item>
              <text:list>
                <text:list-item>
                  <text:h text:style-name="P246" text:outline-level="2"><text:bookmark-start text:name="__RefHeading___Toc404419494"/><text:s/>First Section<text:bookmark-end text:name="__RefHeading___Toc404419494"/></text:h>
                </text:list-item>
              </text:list>
            </text:list-item>
          </text:list>
        </text:list-item>
      </text:list>
      <text:p text:style-name="P75"/>
      <text:p text:style-name="P75">Sections usually begin after the block containing it, has begun. However, it may be that we need to open a section while a block is open.</text:p>
      <text:p text:style-name="P75"/>
      <text:p text:style-name="P75">This is what is called the "First Section". </text:p>
      <text:p text:style-name="P75"/>
      <text:p text:style-name="P75">To indicate that a section opens with the block, we use the "FirstSec" parameter in the declaration section. The following example shows how to structure an SQL query in a single block with two sections:</text:p>
      <text:p text:style-name="P75"/>
      <text:p text:style-name="P118"><text:span text:style-name="T38"><text:s text:c="2"/></text:span><text:span text:style-name="T79">&lt;</text:span><text:span text:style-name="T11">Start Block</text:span><text:span text:style-name="T79">=</text:span><text:span text:style-name="T114">"SELECT"</text:span><text:span text:style-name="T26"> </text:span><text:span text:style-name="T11">End</text:span><text:span text:style-name="T79">=</text:span><text:span text:style-name="T114">"</text:span><text:span text:style-name="T115">;</text:span><text:span text:style-name="T114">"</text:span><text:span text:style-name="T26"> Parent</text:span><text:span text:style-name="T79">=</text:span><text:span text:style-name="T114">"Main"</text:span><text:span text:style-name="T26"> Folding</text:span><text:span text:style-name="T79">=</text:span><text:span text:style-name="T114">"False"</text:span><text:span text:style-name="T79">&gt;</text:span></text:p>
      <text:p text:style-name="P118"><text:span text:style-name="T26"><text:tab/></text:span><text:span text:style-name="T79">&lt;</text:span><text:span text:style-name="T11">Section Start</text:span><text:span text:style-name="T79">=</text:span><text:span text:style-name="T114">"SELECT"</text:span><text:span text:style-name="T26"> FirstSec</text:span><text:span text:style-name="T79">=</text:span><text:span text:style-name="T114">"True"</text:span><text:span text:style-name="T79">&gt;</text:span><text:span text:style-name="T26"> </text:span><text:span text:style-name="T79">&lt;/</text:span><text:span text:style-name="T11">Section</text:span><text:span text:style-name="T79">&gt;</text:span></text:p>
      <text:p text:style-name="P118"><text:span text:style-name="T26"><text:tab/></text:span><text:span text:style-name="T79">&lt;</text:span><text:span text:style-name="T11">Section Start</text:span><text:span text:style-name="T79">=</text:span><text:span text:style-name="T114">"FROM"</text:span><text:span text:style-name="T79">&gt;</text:span><text:span text:style-name="T26"> </text:span><text:span text:style-name="T79">&lt;/</text:span><text:span text:style-name="T11">Section</text:span><text:span text:style-name="T79">&gt;</text:span></text:p>
      <text:p text:style-name="P118"><text:span text:style-name="T38"><text:s text:c="2"/></text:span><text:span text:style-name="T79">&lt;/</text:span><text:span text:style-name="T11">Block</text:span><text:span text:style-name="T79">&gt;</text:span></text:p>
      <text:p text:style-name="P75"/>
      <text:p text:style-name="P75">As the SELECT section is declared with FirstSec = "TRUE" then this section will open just block that starts with SELECT open.</text:p>
      <text:p text:style-name="P75"/>
      <text:p text:style-name="P75">If we had just done:</text:p>
      <text:p text:style-name="P75"/>
      <text:p text:style-name="P118"><text:span text:style-name="T38"><text:s text:c="2"/></text:span><text:span text:style-name="T79">&lt;</text:span><text:span text:style-name="T11">Start Block</text:span><text:span text:style-name="T79">=</text:span><text:span text:style-name="T114">"SELECT"</text:span><text:span text:style-name="T26"> </text:span><text:span text:style-name="T11">End</text:span><text:span text:style-name="T79">=</text:span><text:span text:style-name="T114">"</text:span><text:span text:style-name="T115">;</text:span><text:span text:style-name="T114">"</text:span><text:span text:style-name="T26"> Parent</text:span><text:span text:style-name="T79">=</text:span><text:span text:style-name="T114">"Main"</text:span><text:span text:style-name="T26"> Folding</text:span><text:span text:style-name="T79">=</text:span><text:span text:style-name="T114">"False"</text:span><text:span text:style-name="T79">&gt;</text:span></text:p>
      <text:p text:style-name="P118"><text:span text:style-name="T26"><text:tab/></text:span><text:span text:style-name="T79">&lt;</text:span><text:span text:style-name="T11">Section Start</text:span><text:span text:style-name="T79">=</text:span><text:span text:style-name="T114">"SELECT"</text:span><text:span text:style-name="T79">&gt;</text:span><text:span text:style-name="T26"> </text:span><text:span text:style-name="T79">&lt;/</text:span><text:span text:style-name="T11">Section</text:span><text:span text:style-name="T79">&gt;</text:span></text:p>
      <text:p text:style-name="P118"><text:span text:style-name="T26"><text:tab/></text:span><text:span text:style-name="T79">&lt;</text:span><text:span text:style-name="T11">Section Start</text:span><text:span text:style-name="T79">=</text:span><text:span text:style-name="T114">"FROM"</text:span><text:span text:style-name="T79">&gt;</text:span><text:span text:style-name="T26"> </text:span><text:span text:style-name="T79">&lt;/</text:span><text:span text:style-name="T11">Section</text:span><text:span text:style-name="T79">&gt;</text:span></text:p>
      <text:p text:style-name="P118"><text:span text:style-name="T38"><text:s text:c="2"/></text:span><text:span text:style-name="T79">&lt;/</text:span><text:span text:style-name="T11">Block</text:span><text:span text:style-name="T79">&gt;</text:span></text:p>
      <text:p text:style-name="P75"/>
      <text:p text:style-name="P75">The section starts with SELECT, not open at the beginning because SELECT, is also the starting delimiter of the block and the verification of sections, is made after recognizing the word SELECT.</text:p>
      <text:p text:style-name="P75"/>
      <text:p text:style-name="P75">Visually would have the following picture:</text:p>
      <text:p text:style-name="P75"/>
      <text:p text:style-name="P39"><text:soft-page-break/><draw:frame draw:style-name="fr4" draw:name="Image18" text:anchor-type="as-char" svg:width="9.922cm" svg:height="5.371cm" draw:z-index="16"><draw:image xlink:href="Pictures/1000000000000177000000CB5703A31F1ECEB90C.png" xlink:type="simple" xlink:show="embed" xlink:actuate="onLoad"/></draw:frame></text:p>
      <text:p text:style-name="P93"/>
      <text:p text:style-name="P75">Now we have two collapsible sections within a block, which is not folded (and who would not be accessible with mouse, if it was folding). </text:p>
      <text:p text:style-name="P75"/>
      <text:p text:style-name="P75">Sections, like the blocks also support the alternative definition for delimiters. For example, the following code shows how to create a section with two initial delimiters:</text:p>
      <text:p text:style-name="P75"/>
      <text:p text:style-name="P118"><text:span text:style-name="T38"><text:s text:c="2"/></text:span><text:span text:style-name="T79">&lt;</text:span><text:span text:style-name="T11">Section </text:span><text:span text:style-name="T26">Name</text:span><text:span text:style-name="T79">=</text:span><text:span text:style-name="T114">"Section_start"</text:span><text:span text:style-name="T79">&gt;</text:span></text:p>
      <text:p text:style-name="P118"><text:span text:style-name="T38"><text:s text:c="4"/></text:span><text:span text:style-name="T79">&lt;</text:span><text:span text:style-name="T11">Start</text:span><text:span text:style-name="T79">&gt;</text:span><text:span text:style-name="T26"> </text:span><text:span text:style-name="T22">Begin</text:span><text:span text:style-name="T11"> </text:span><text:span text:style-name="T79">&lt;/</text:span><text:span text:style-name="T11">Start</text:span><text:span text:style-name="T79">&gt;</text:span></text:p>
      <text:p text:style-name="P118"><text:span text:style-name="T38"><text:s text:c="4"/></text:span><text:span text:style-name="T79">&lt;</text:span><text:span text:style-name="T11">Start</text:span><text:span text:style-name="T26"> TokPos</text:span><text:span text:style-name="T79">=</text:span><text:span text:style-name="T114">"1"</text:span><text:span text:style-name="T79">&gt;</text:span><text:span text:style-name="T26"> </text:span><text:span text:style-name="T23">Initiation</text:span><text:span text:style-name="T26"> </text:span><text:span text:style-name="T79">&lt;/</text:span><text:span text:style-name="T11">Start</text:span><text:span text:style-name="T79">&gt;</text:span></text:p>
      <text:p text:style-name="P118"><text:span text:style-name="T38"><text:s text:c="2"/></text:span><text:span text:style-name="T79">&lt;/</text:span><text:span text:style-name="T11">Section</text:span><text:span text:style-name="T79">&gt;</text:span></text:p>
      <text:p text:style-name="P105"/>
      <text:list xml:id="list230304576079609" text:continue-numbering="true" text:style-name="WW8Num24">
        <text:list-item>
          <text:list>
            <text:list-item>
              <text:list>
                <text:list-item>
                  <text:h text:style-name="P253" text:outline-level="2"><text:bookmark-start text:name="__RefHeading__27746_320519508"/>Blocks and sections<text:bookmark-end text:name="__RefHeading__27746_320519508"/></text:h>
                </text:list-item>
              </text:list>
            </text:list-item>
          </text:list>
        </text:list-item>
      </text:list>
      <text:p text:style-name="P105"/>
      <text:p text:style-name="P75">As defined by sections, they end when another section, of the same level starts, or when another block of the same level starts. This means that the sections can be closed with a block.</text:p>
      <text:p text:style-name="P75"/>
      <text:p text:style-name="P75">Consider the following definition:</text:p>
      <text:p text:style-name="P75"/>
      <text:p text:style-name="P108"/>
      <text:p text:style-name="P152"><text:span text:style-name="T24"><text:s/></text:span><text:span text:style-name="T83">&lt;</text:span><text:span text:style-name="T16">Section Start</text:span><text:span text:style-name="T83">=</text:span><text:span text:style-name="T118">"var"</text:span><text:span text:style-name="T83">&gt;</text:span><text:span text:style-name="T24"> </text:span><text:span text:style-name="T83">&lt;/</text:span><text:span text:style-name="T16">Section</text:span><text:span text:style-name="T83">&gt;</text:span></text:p>
      <text:p text:style-name="P152"><text:span text:style-name="T24"><text:s/></text:span><text:span text:style-name="T83">&lt;</text:span><text:span text:style-name="T16">Block Start</text:span><text:span text:style-name="T83">=</text:span><text:span text:style-name="T118">"begin"</text:span><text:span text:style-name="T24"> </text:span><text:span text:style-name="T16">End</text:span><text:span text:style-name="T83">=</text:span><text:span text:style-name="T118">"</text:span><text:span text:style-name="T119">End</text:span><text:span text:style-name="T118">"</text:span><text:span text:style-name="T83">&gt;&lt;/</text:span><text:span text:style-name="T16">Block</text:span><text:span text:style-name="T83">&gt;</text:span></text:p>
      <text:p text:style-name="P75"/>
      <text:p text:style-name="P75">Here a block is defined along with a section on the same level, so if the block appears, it will close the section. Otherwise, the section would extend until the end of the whole text (Block "Main").</text:p>
      <text:p text:style-name="P75"/>
      <text:p text:style-name="P75">The following figure illustrates this effect:</text:p>
      <text:p text:style-name="P75"/>
      <text:p text:style-name="P105"><text:soft-page-break/></text:p>
      <text:p text:style-name="P105"><draw:frame draw:style-name="fr7" draw:name="gráficos1" text:anchor-type="paragraph" svg:width="7.489cm" svg:height="5.399cm" draw:z-index="49"><draw:image xlink:href="Pictures/2000000700001D410000151788C89D24EF78ED60.svm" xlink:type="simple" xlink:show="embed" xlink:actuate="onLoad"/></draw:frame></text:p>
      <text:p text:style-name="P105"/>
      <text:p text:style-name="P105"/>
      <text:list xml:id="list230305790465918" text:continue-numbering="true" text:style-name="WW8Num24">
        <text:list-item>
          <text:h text:style-name="P244" text:outline-level="1"><text:bookmark-start text:name="__RefHeading___Toc404419495"/>Configuring the syntax using code<text:bookmark-end text:name="__RefHeading___Toc404419495"/></text:h>
        </text:list-item>
      </text:list>
      <text:p text:style-name="P15"/>
      <text:p text:style-name="P75">So as we can configure syntax, using an external file, it can also be done using some methods of the highlighter. </text:p>
      <text:p text:style-name="P75"/>
      <text:p text:style-name="P75">When the highlighter is created, not start from scratch. Some settings are predefined. These are:</text:p>
      <text:p text:style-name="P198"/>
      <text:list xml:id="list8988008278344373585" text:style-name="WW8Num18">
        <text:list-item>
          <text:p text:style-name="P225">Predefined Highlighter attributes are created.</text:p>
        </text:list-item>
        <text:list-item>
          <text:p text:style-name="P225">The definition of tokens “end of line” is created and can not change.</text:p>
        </text:list-item>
        <text:list-item>
          <text:p text:style-name="P225">The definition of tokens “spaces” is created and can not change.</text:p>
        </text:list-item>
        <text:list-item>
          <text:p text:style-name="P225">Tokens defining symbol is created using all remaining characters.</text:p>
        </text:list-item>
        <text:list-item>
          <text:p text:style-name="P225">The definition of default identifiers are configured.</text:p>
        </text:list-item>
        <text:list-item>
          <text:p text:style-name="P225">Blocks "MainBlk" and "MulTokBlk" are created.</text:p>
        </text:list-item>
      </text:list>
      <text:p text:style-name="P192"/>
      <text:p text:style-name="P75">No strings, no comments, no keywords are configured. These must be user-defined. </text:p>
      <text:p text:style-name="P75"/>
      <text:p text:style-name="P75"><text:bookmark text:name="result_box2"/><text:span text:style-name="T136">The attributes automatically created in highlighter, have some properties assigned by default. For example keywords are shown with green text.</text:span> </text:p>
      <text:p text:style-name="P75"/>
      <text:p text:style-name="P75">A typical sequence for using the highlighter will look like this:</text:p>
      <text:p text:style-name="P75"/>
      <text:p text:style-name="P127">you use</text:p>
      <text:p text:style-name="P117"><text:span text:style-name="T38"><text:s text:c="2"/></text:span><text:span text:style-name="T26">..., SynFacilHighlighter</text:span><text:span text:style-name="T79">;</text:span><text:span text:style-name="T26"> </text:span><text:span text:style-name="T92">//</text:span><text:span text:style-name="T96">includes unit</text:span></text:p>
      <text:p text:style-name="P123"/>
      <text:p text:style-name="P117"><text:span text:style-name="T11">procedure </text:span><text:span text:style-name="T26">TForm1.FormCreate</text:span><text:span text:style-name="T79">(</text:span><text:span text:style-name="T26">Sender</text:span><text:span text:style-name="T79">:</text:span><text:span text:style-name="T26"> TObject</text:span><text:span text:style-name="T79">);</text:span></text:p>
      <text:p text:style-name="P127">var</text:p>
      <text:p text:style-name="P117"><text:span text:style-name="T38"><text:s text:c="2"/></text:span><text:span text:style-name="T26">hlt </text:span><text:span text:style-name="T79">:</text:span><text:span text:style-name="T26"> TSynFacilSyn</text:span><text:span text:style-name="T79">;</text:span><text:span text:style-name="T26"> </text:span><text:span text:style-name="T92">//</text:span><text:span text:style-name="T96">reference to highlighter</text:span></text:p>
      <text:p text:style-name="P127">begin</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highlighter</text:span></text:p>
      <text:p text:style-name="P117"><text:span text:style-name="T38"><text:s text:c="2"/></text:span><text:span text:style-name="T26">SynEdit1.Highlighter </text:span><text:span text:style-name="T79">: =</text:span><text:span text:style-name="T26"> hlt</text:span><text:span text:style-name="T79">;</text:span><text:span text:style-name="T26"> </text:span><text:span text:style-name="T92">//</text:span><text:span text:style-name="T96">configures the highlighter</text:span></text:p>
      <text:p text:style-name="P117"><text:span text:style-name="T38"><text:s text:c="2"/></text:span><text:span text:style-name="T92">//</text:span><text:span text:style-name="T96">set attributes of tokens</text:span></text:p>
      <text:p text:style-name="P117"><text:span text:style-name="T38"><text:s text:c="2"/></text:span><text:span text:style-name="T26">hlt.KeywordAttri.Foreground</text:span><text:span text:style-name="T79">: =</text:span><text:span text:style-name="T26">clGreen</text:span><text:span text:style-name="T79">;</text:span></text:p>
      <text:p text:style-name="P117"><text:span text:style-name="T38"><text:s text:c="2"/></text:span><text:span text:style-name="T26">hlt.CommentAttri.Foreground</text:span><text:span text:style-name="T79">: =</text:span><text:span text:style-name="T26">clGray</text:span><text:span text:style-name="T79">;</text:span></text:p>
      <text:p text:style-name="P117"><text:span text:style-name="T38"><text:s text:c="2"/></text:span><text:span text:style-name="T26">...</text:span></text:p>
      <text:p text:style-name="P117"><text:span text:style-name="T38"><text:s text:c="2"/></text:span><text:span text:style-name="T92">//</text:span><text:span text:style-name="T96">set syntax highlighter</text:span></text:p>
      <text:p text:style-name="P117"><text:span text:style-name="T38"><text:s text:c="2"/></text:span><text:span text:style-name="T26">...</text:span></text:p>
      <text:p text:style-name="P117"><text:span text:style-name="T11">end</text:span><text:span text:style-name="T79">;</text:span></text:p>
      <text:p text:style-name="P75"/>
      <text:p text:style-name="P75"><text:soft-page-break/>We only need to configure the necessary attributes. The rest can be left at their default values.</text:p>
      <text:p text:style-name="P75"/>
      <text:p text:style-name="P75">Set the syntax of the highlighter, means defining lexical and syntactic rules that apply for the colored text. Can be divided essentially into two parts: The definition of tokens and block definition.</text:p>
      <text:p text:style-name="P75"/>
      <text:p text:style-name="P75">To create a new syntax, you must follow a strict sequence:</text:p>
      <text:p text:style-name="P75"/>
      <text:list xml:id="list5003482300944022766" text:style-name="WW8Num6">
        <text:list-item>
          <text:p text:style-name="P226">Clean identifier tables and special symbols: ClearSpecials()</text:p>
        </text:list-item>
        <text:list-item>
          <text:p text:style-name="P226">Clean the method table: ClearMethodTables()</text:p>
        </text:list-item>
        <text:list-item>
          <text:p text:style-name="P226">Defining Identifiers: DefTokIdentif()</text:p>
        </text:list-item>
        <text:list-item>
          <text:p text:style-name="P226">Definition of numbers and other Tokens for content.</text:p>
        </text:list-item>
        <text:list-item>
          <text:p text:style-name="P226">Definition of special identifiers: AddIdentSpec()</text:p>
        </text:list-item>
        <text:list-item>
          <text:p text:style-name="P226">Definition of special symbols: AddSymbSpec()</text:p>
        </text:list-item>
        <text:list-item>
          <text:p text:style-name="P238"><text:span text:style-name="T2">Definition of delimited tokens </text:span><text:span text:style-name="T26">(</text:span><text:span text:style-name="T2">strings, comments, etc.</text:span><text:span text:style-name="T26">)</text:span></text:p>
        </text:list-item>
        <text:list-item>
          <text:p text:style-name="P226">Definition of blocks and sections.</text:p>
        </text:list-item>
        <text:list-item>
          <text:p text:style-name="P226">Rebuilding the syntax: Rebuild()</text:p>
        </text:list-item>
      </text:list>
      <text:p text:style-name="P192"/>
      <text:p text:style-name="P75">ClearSpecials() clears the tables of special identifiers and table of special symbols. Therefore, it also deletes the definition of delimited tokens and tokens by content, that are using special tokens.</text:p>
      <text:p text:style-name="P75"/>
      <text:p text:style-name="P75">CreateAttributes() removes all attributes created (types of tokens) and creates the default attributes. This ensures that only leave predefined attributes, deleting any additional attributes that may have created later.</text:p>
      <text:p text:style-name="P75"/>
      <text:p text:style-name="P74"><text:span text:style-name="T6">ClearMethodTables(), clean the method table highlighter</text:span><text:span text:style-name="Footnote_20_Symbol"><text:span text:style-name="T6"><text:note text:id="ftn5" text:note-class="footnote"><text:note-citation>5</text:note-citation><text:note-body><text:p text:style-name="P7"><text:span text:style-name="T128"><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5"/>
      <text:p text:style-name="P75">The first step in defining a syntax is the definition of identifiers, because these tokens are the basis of most languages.</text:p>
      <text:p text:style-name="P179"/>
      <text:p text:style-name="P75">The method table is an internal structure of the highlighter that allows to select, which method must process a character when scanning text is performed. The objective of using a table of methods is to accelerate the speed of the highlighter.</text:p>
      <text:p text:style-name="P75"><text:soft-page-break/></text:p>
      <text:p text:style-name="P75">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5"/>
      <text:p text:style-name="P75">When cleaning the method table, the definition of all tokens by content (including identifiers) and delimited tokens are cleared, so it is the first step in defining any syntax.</text:p>
      <text:p text:style-name="P179"/>
      <text:p text:style-name="P75">The first time a new syntax is created, it is not necessary to clean the tables of special identifiers, because no special identifier is created (like KEYWORDS) by default. </text:p>
      <text:p text:style-name="P75"/>
      <text:p text:style-name="P75">If only you want to add special identifiers, simply run AddKeyword()</text:p>
      <text:p text:style-name="P75"/>
      <text:p text:style-name="P75">The Rebuild() method process all special symbols and delimited tokens with initial delimiter of symbol type. If it does not run, will have no effect the indicated definitions.</text:p>
      <text:p text:style-name="P75"/>
      <text:list xml:id="list230305176306600" text:continue-list="list230305790465918" text:style-name="WW8Num24">
        <text:list-item>
          <text:list>
            <text:list-item>
              <text:h text:style-name="P248" text:outline-level="2"><text:bookmark-start text:name="__RefHeading__26456_417478401"/>Regular Expressions<text:bookmark-end text:name="__RefHeading__26456_417478401"/></text:h>
            </text:list-item>
          </text:list>
        </text:list-item>
      </text:list>
      <text:p text:style-name="P84"><text:line-break/><text:tab/>Within the definition of the syntax by code, usage of regular expressions is done. However, the highlight only supports some simple constructions such as "[az] *" or "[0-9] [.\]"</text:p>
      <text:p text:style-name="P84"><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230304570422652" text:continue-numbering="true" text:style-name="WW8Num24">
        <text:list-item>
          <text:list>
            <text:list-item>
              <text:h text:style-name="P249" text:outline-level="2"><text:bookmark-start text:name="__RefHeading__26458_417478401"/><text:span text:style-name="T136">Error Handling</text:span> <text:bookmark-end text:name="__RefHeading__26458_417478401"/></text:h>
            </text:list-item>
          </text:list>
        </text:list-item>
      </text:list>
      <text:p text:style-name="P75"/>
      <text:p text:style-name="P75">Syntax configuration instructions can generate internal errors. When an error is detected in the definition of syntax or otherwise, an exception of type "ESynFacilSyn" is generated..</text:p>
      <text:p text:style-name="P75"/>
      <text:p text:style-name="P75"><text:bookmark text:name="result_box38"/><text:span text:style-name="T136">Therefore, it is advisable to enclose the syntax definition section in a TRY ... EXCEPT block, especially in the critical parts:</text:span> </text:p>
      <text:p text:style-name="P75"/>
      <text:p text:style-name="P142"><text:span text:style-name="T79">  </text:span><text:span text:style-name="T86">...</text:span></text:p>
      <text:p text:style-name="P146"><text:span text:style-name="T24">  </text:span><text:span text:style-name="T16">try</text:span></text:p>
      <text:p text:style-name="P146"><text:span text:style-name="T24">    </text:span><text:span text:style-name="T56">hlt.ClearSpecials</text:span><text:span text:style-name="T83">;</text:span><text:span text:style-name="T24">               </text:span></text:p>
      <text:p text:style-name="P146"><text:span text:style-name="T24">    </text:span><text:span text:style-name="T56">hlt.CreateAttributes</text:span><text:span text:style-name="T83">;</text:span><text:span text:style-name="T24">            </text:span></text:p>
      <text:p text:style-name="P146"><text:span text:style-name="T24">    </text:span><text:span text:style-name="T56">hlt.ClearMethodTables</text:span><text:span text:style-name="T83">;</text:span></text:p>
      <text:p text:style-name="P146"><text:span text:style-name="T24">    </text:span><text:span text:style-name="T56">hlt.DefTokIdentif</text:span><text:span text:style-name="T83">(</text:span><text:span text:style-name="T118">'[A</text:span><text:span text:style-name="T119">-</text:span><text:span text:style-name="T118">Za</text:span><text:span text:style-name="T119">-</text:span><text:span text:style-name="T118">z]'</text:span><text:span text:style-name="T56">,</text:span><text:span text:style-name="T118">'[A</text:span><text:span text:style-name="T119">-</text:span><text:span text:style-name="T118">Za</text:span><text:span text:style-name="T119">-</text:span><text:span text:style-name="T118">z0</text:span><text:span text:style-name="T119">-</text:span><text:span text:style-name="T118">9]</text:span><text:span text:style-name="T119">*</text:span><text:span text:style-name="T118">'</text:span><text:span text:style-name="T83">);</text:span></text:p>
      <text:p text:style-name="P146"><text:span text:style-name="T24">    </text:span><text:span text:style-name="T56">hlt.AddKeyword</text:span><text:span text:style-name="T83">(</text:span><text:span text:style-name="T118">'BEGIN'</text:span><text:span text:style-name="T83">);</text:span></text:p>
      <text:p text:style-name="P140"><text:soft-page-break/>    <text:span text:style-name="T138">...</text:span></text:p>
      <text:p text:style-name="P140"> </text:p>
      <text:p text:style-name="P146"><text:span text:style-name="T24">  </text:span><text:span text:style-name="T16">except</text:span></text:p>
      <text:p text:style-name="P146"><text:span text:style-name="T24">    </text:span><text:span text:style-name="T16">on </text:span><text:span text:style-name="T56">e</text:span><text:span text:style-name="T83">:</text:span><text:span text:style-name="T56">Exception </text:span><text:span text:style-name="T16">do begin</text:span></text:p>
      <text:p text:style-name="P146"><text:span text:style-name="T24">      </text:span><text:span text:style-name="T56">ShowMessage</text:span><text:span text:style-name="T83">(</text:span><text:span text:style-name="T56">e.Message</text:span><text:span text:style-name="T83">);</text:span></text:p>
      <text:p text:style-name="P146"><text:span text:style-name="T24">    </text:span><text:span text:style-name="T16">end</text:span><text:span text:style-name="T83">;</text:span></text:p>
      <text:p text:style-name="P146"><text:span text:style-name="T24">  </text:span><text:span text:style-name="T16">end</text:span><text:span text:style-name="T83">;</text:span></text:p>
      <text:p text:style-name="P140">  <text:span text:style-name="T138">...</text:span></text:p>
      <text:p text:style-name="P113"/>
      <text:p text:style-name="P75"/>
      <text:p text:style-name="P75"><text:bookmark text:name="result_box39"/><text:span text:style-name="T136">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5"/>
      <text:list xml:id="list230306020546036" text:continue-numbering="true" text:style-name="WW8Num24">
        <text:list-item>
          <text:list>
            <text:list-item>
              <text:h text:style-name="P246" text:outline-level="2"><text:bookmark-start text:name="__RefHeading___Toc404419496"/>Token types and attributes<text:bookmark-end text:name="__RefHeading___Toc404419496"/></text:h>
            </text:list-item>
          </text:list>
        </text:list-item>
      </text:list>
      <text:p text:style-name="P36"/>
      <text:p text:style-name="P91"><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5"/>
      <text:list xml:id="list5562746732850833525" text:style-name="WW8Num19">
        <text:list-item>
          <text:p text:style-name="P227">tkEol </text:p>
        </text:list-item>
        <text:list-item>
          <text:p text:style-name="P227">tkSpace </text:p>
        </text:list-item>
        <text:list-item>
          <text:p text:style-name="P227">tkSymbol</text:p>
        </text:list-item>
        <text:list-item>
          <text:p text:style-name="P227">tkIdentif </text:p>
        </text:list-item>
        <text:list-item>
          <text:p text:style-name="P227">tkNumber</text:p>
        </text:list-item>
        <text:list-item>
          <text:p text:style-name="P227">tkKeyword</text:p>
        </text:list-item>
        <text:list-item>
          <text:p text:style-name="P227">tkString</text:p>
        </text:list-item>
        <text:list-item>
          <text:p text:style-name="P227">tkComment</text:p>
        </text:list-item>
      </text:list>
      <text:p text:style-name="P75"/>
      <text:p text:style-name="P75">The tkEol and tkSpace types have fixed definitions and can not be changed <text:span text:style-name="T143">(however, the spaces can be configured in his appareance)</text:span>. The other types are provided, but their definitions can be adjusted with more or less freedom.</text:p>
      <text:p text:style-name="P75"/>
      <text:p text:style-name="P75"><text:bookmark text:name="result_box55"/><text:span text:style-name="T144">When creating an instance of the highlighter, it does not start empty. It has some previous definitions that allow you to start working. These definitions imply being able to recognize spaces, line breaks and symbols. In addition, a default definition is created for identifiers. The following diagram shows the initial state of the highlighter when it starts:</text:span> </text:p>
      <text:p text:style-name="P76"/>
      <text:p text:style-name="P76"><draw:g text:anchor-type="paragraph" draw:z-index="57" draw:name="Forma1" draw:style-name="gr7"><draw:g draw:style-name="gr8"><draw:g draw:style-name="gr8"><draw:polygon draw:style-name="gr9" draw:text-style-name="P273" svg:width="7.825cm" svg:height="5.594cm" svg:x="2.681cm" svg:y="0.165cm" svg:viewBox="0 0 7826 5595" draw:points="0,5595 7826,5595 7826,0 0,0"><text:p/></draw:polygon><draw:polygon draw:style-name="gr10" draw:text-style-name="P274" svg:width="7.825cm" svg:height="5.594cm" svg:x="2.681cm" svg:y="0.165cm" svg:viewBox="0 0 7826 5595" draw:points="0,5595 7826,5595 7826,0 0,0"><text:p/></draw:polygon></draw:g><draw:frame draw:style-name="gr11" draw:text-style-name="P276" svg:width="7.824cm" svg:height="5.596cm" svg:x="2.681cm" svg:y="0.164cm"><draw:text-box><text:p text:style-name="P275"><text:span text:style-name="T169">Symbol</text:span></text:p></draw:text-box></draw:frame></draw:g><draw:g draw:style-name="gr8"><draw:g draw:style-name="gr8"><draw:path draw:style-name="gr9" draw:text-style-name="P273" svg:width="3.594cm" svg:height="1.159cm" svg:x="4.302cm" svg:y="2.424cm" svg:viewBox="0 0 3595 1160" svg:d="M348 1160h2899c232 0 348-116 348-347v-465c0-232-116-348-348-348h-2899c-232 0-348 116-348 348v465c0 231 116 347 348 347z"><text:p/></draw:path><draw:path draw:style-name="gr12" draw:text-style-name="P274" svg:width="3.594cm" svg:height="1.159cm" svg:x="4.302cm" svg:y="2.424cm" svg:viewBox="0 0 3595 1160" svg:d="M348 1160h2899c232 0 348-116 348-347v-465c0-232-116-348-348-348h-2899c-232 0-348 116-348 348v465c0 231 116 347 348 347z"><text:p/></draw:path></draw:g><draw:frame draw:style-name="gr13" draw:text-style-name="P278" svg:width="3.594cm" svg:height="1.16cm" svg:x="4.302cm" svg:y="2.424cm"><draw:text-box><text:p text:style-name="P277"><text:span text:style-name="T170">Identifier</text:span></text:p></draw:text-box></draw:frame></draw:g><draw:g draw:style-name="gr8"><draw:g draw:style-name="gr8"><draw:polygon draw:style-name="gr9" draw:text-style-name="P273" svg:width="0.87cm" svg:height="2.797cm" svg:x="1.811cm" svg:y="0.165cm" svg:viewBox="0 0 871 2798" draw:points="871,2798 869,0 0,0 0,2798"><text:p/></draw:polygon><draw:polygon draw:style-name="gr10" draw:text-style-name="P274" svg:width="0.87cm" svg:height="2.797cm" svg:x="1.811cm" svg:y="0.165cm" svg:viewBox="0 0 871 2798" draw:points="871,2798 869,0 0,0 0,2798"><text:p/></draw:polygon></draw:g><draw:frame draw:style-name="gr14" draw:text-style-name="P278" svg:width="2.798cm" svg:height="0.87cm" draw:transform="rotate (1.5707963267949) translate (1.80975cm 2.96156944444444cm)"><draw:text-box><text:p text:style-name="P277"><text:span text:style-name="T169">Line End</text:span></text:p></draw:text-box></draw:frame></draw:g><draw:g draw:style-name="gr8"><draw:g draw:style-name="gr8"><draw:polygon draw:style-name="gr9" draw:text-style-name="P273" svg:width="0.87cm" svg:height="2.797cm" svg:x="1.811cm" svg:y="2.962cm" svg:viewBox="0 0 871 2798" draw:points="871,2798 869,0 0,0 0,2798"><text:p/></draw:polygon><draw:polygon draw:style-name="gr10" draw:text-style-name="P274" svg:width="0.87cm" svg:height="2.797cm" svg:x="1.811cm" svg:y="2.962cm" svg:viewBox="0 0 871 2798" draw:points="871,2798 869,0 0,0 0,2798"><text:p/></draw:polygon></draw:g><draw:frame draw:style-name="gr14" draw:text-style-name="P278" svg:width="2.798cm" svg:height="0.87cm" draw:transform="rotate (1.5707963267949) translate (1.80975cm 5.75909722222222cm)"><draw:text-box><text:p text:style-name="P277"><text:span text:style-name="T169">Space</text:span></text:p></draw:text-box></draw:frame></draw:g></draw:g><text:soft-page-break/></text:p>
      <text:p text:style-name="P75"/>
      <text:p text:style-name="P75"/>
      <text:p text:style-name="P75"/>
      <text:p text:style-name="P75"/>
      <text:p text:style-name="P75"/>
      <text:p text:style-name="P75"/>
      <text:p text:style-name="P75"/>
      <text:p text:style-name="P75"/>
      <text:p text:style-name="P75"/>
      <text:p text:style-name="P75"/>
      <text:p text:style-name="P75"><text:bookmark text:name="result_box75"/><text:span text:style-name="T144">The definitions of spaces and </text:span><text:span text:style-name="T145">line breaks</text:span><text:span text:style-name="T144"> are fixed, ie they can not be changed. </text:span><text:span text:style-name="T145">All other text is considered </text:span><text:span text:style-name="T144">Symbols, but when the identifiers are created, some characters that </text:span><text:span text:style-name="T145">were considered as </text:span><text:span text:style-name="T144">symbols, are taken.</text:span> </text:p>
      <text:p text:style-name="P75"/>
      <text:p text:style-name="P75"><text:bookmark text:name="result_box81"/><text:span text:style-name="T144">It is possible to remove the definition of identifiers (but not spaces, </text:span><text:span text:style-name="T145">line breaks</text:span><text:span text:style-name="T144">, and symbols), and this is usually done when calling ClearMethodTables. That is, after a call to ClearMethodTables, our highlighter will have the following definition:</text:span> </text:p>
      <text:p text:style-name="P75"/>
      <text:p text:style-name="P75"><draw:g text:anchor-type="paragraph" draw:z-index="58" draw:name="Forma2" draw:style-name="gr7"><draw:g draw:style-name="gr8"><draw:g draw:style-name="gr8"><draw:polygon draw:style-name="gr9" draw:text-style-name="P273" svg:width="7.731cm" svg:height="5.527cm" svg:x="2.862cm" svg:y="0.078cm" svg:viewBox="0 0 7732 5528" draw:points="0,5528 7732,5528 7732,0 0,0"><text:p/></draw:polygon><draw:polygon draw:style-name="gr10" draw:text-style-name="P274" svg:width="7.731cm" svg:height="5.527cm" svg:x="2.862cm" svg:y="0.078cm" svg:viewBox="0 0 7732 5528" draw:points="0,5528 7732,5528 7732,0 0,0"><text:p/></draw:polygon></draw:g><draw:frame draw:style-name="gr15" draw:text-style-name="P276" svg:width="7.73cm" svg:height="5.527cm" svg:x="2.863cm" svg:y="0.078cm"><draw:text-box><text:p text:style-name="P275"><text:span text:style-name="T169">Symbol</text:span></text:p></draw:text-box></draw:frame></draw:g><draw:g draw:style-name="gr8"><draw:g draw:style-name="gr8"><draw:polygon draw:style-name="gr9" draw:text-style-name="P273" svg:width="0.859cm" svg:height="2.764cm" svg:x="2.003cm" svg:y="0.078cm" svg:viewBox="0 0 860 2765" draw:points="860,2765 859,0 0,0 0,2765"><text:p/></draw:polygon><draw:polygon draw:style-name="gr10" draw:text-style-name="P274" svg:width="0.859cm" svg:height="2.764cm" svg:x="2.003cm" svg:y="0.078cm" svg:viewBox="0 0 860 2765" draw:points="860,2765 859,0 0,0 0,2765"><text:p/></draw:polygon></draw:g><draw:frame draw:style-name="gr16" draw:text-style-name="P278" svg:width="2.765cm" svg:height="0.858cm" draw:transform="rotate (1.5707963267949) translate (2.00201388888889cm 2.841625cm)"><draw:text-box><text:p text:style-name="P277"><text:span text:style-name="T169">Line End</text:span></text:p></draw:text-box></draw:frame></draw:g><draw:g draw:style-name="gr8"><draw:g draw:style-name="gr8"><draw:polygon draw:style-name="gr9" draw:text-style-name="P273" svg:width="0.859cm" svg:height="2.764cm" svg:x="2.003cm" svg:y="2.842cm" svg:viewBox="0 0 860 2765" draw:points="860,2765 859,0 0,0 0,2765"><text:p/></draw:polygon><draw:polygon draw:style-name="gr10" draw:text-style-name="P274" svg:width="0.859cm" svg:height="2.764cm" svg:x="2.003cm" svg:y="2.842cm" svg:viewBox="0 0 860 2765" draw:points="860,2765 859,0 0,0 0,2765"><text:p/></draw:polygon></draw:g><draw:frame draw:style-name="gr16" draw:text-style-name="P278" svg:width="2.763cm" svg:height="0.858cm" draw:transform="rotate (1.5707963267949) translate (2.00201388888889cm 5.603875cm)"><draw:text-box><text:p text:style-name="P277"><text:span text:style-name="T169">Space</text:span></text:p></draw:text-box></draw:frame></draw:g></draw:g></text:p>
      <text:p text:style-name="P75"/>
      <text:p text:style-name="P75"/>
      <text:p text:style-name="P75"/>
      <text:p text:style-name="P75"/>
      <text:p text:style-name="P75"/>
      <text:p text:style-name="P75"/>
      <text:p text:style-name="P75"/>
      <text:p text:style-name="P75"/>
      <text:p text:style-name="P75"/>
      <text:p text:style-name="P75"/>
      <text:p text:style-name="P75"><text:span text:style-name="T146">In this case</text:span><text:span text:style-name="T144">, all tokens other than line breaks or spaces are considered to be of the t</text:span><text:span text:style-name="T148">n</text:span><text:span text:style-name="T144">Symbol type. For more information on defining attributes see section 6.4.</text:span> </text:p>
      <text:p text:style-name="P75"/>
      <text:list xml:id="list230304922217947" text:continue-list="list230306020546036" text:style-name="WW8Num24">
        <text:list-item>
          <text:list>
            <text:list-item>
              <text:h text:style-name="Heading_20_2" text:outline-level="2"><text:bookmark-start text:name="__RefHeading___Toc30865_1870574537"/>Configuring the attributes<text:tab/><text:bookmark-end text:name="__RefHeading___Toc30865_1870574537"/></text:h>
            </text:list-item>
          </text:list>
        </text:list-item>
      </text:list>
      <text:p text:style-name="P75"/>
      <text:p text:style-name="P75">If we want to configure the look of tokens "t<text:span text:style-name="T152">n</text:span>String" (which usually represent the constant strings), we should <text:span text:style-name="T152">use the object “tkString”</text:span>:</text:p>
      <text:p text:style-name="P75"><text:soft-page-break/></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the highlighter</text:span></text:p>
      <text:p text:style-name="P117"><text:span text:style-name="T38"><text:s text:c="2"/></text:span><text:span text:style-name="T26">...</text:span></text:p>
      <text:p text:style-name="P117"><text:span text:style-name="T38"><text:s text:c="2"/></text:span><text:span text:style-name="T26">hlt.tkString.Foreground</text:span><text:span text:style-name="T79">: =</text:span><text:span text:style-name="T26">clPurple</text:span><text:span text:style-name="T79">;</text:span><text:span text:style-name="T26"> </text:span><text:span text:style-name="T92">//</text:span><text:span text:style-name="T96">text color</text:span></text:p>
      <text:p text:style-name="P117"><text:span text:style-name="T38"><text:s text:c="2"/></text:span><text:span text:style-name="T26">hlt.tkString.Style </text:span><text:span text:style-name="T79">: =</text:span><text:span text:style-name="T26"> [FsBold, fsUnderline]</text:span><text:span text:style-name="T79">;</text:span><text:span text:style-name="T26"> </text:span><text:span text:style-name="T92">//</text:span><text:span text:style-name="T96">bold and underlined</text:span></text:p>
      <text:p text:style-name="P117"><text:span text:style-name="T38"><text:s text:c="2"/></text:span><text:span text:style-name="T26">...</text:span></text:p>
      <text:p text:style-name="P75"/>
      <text:p text:style-name="P75">We may also use an additional variable to access the attributes:</text:p>
      <text:p text:style-name="P75"/>
      <text:p text:style-name="P127">var</text:p>
      <text:p text:style-name="P117"><text:span text:style-name="T38"><text:s text:c="2"/></text:span><text:span text:style-name="T26">atribString</text:span><text:span text:style-name="T79">:</text:span><text:span text:style-name="T26"> TSynHighlighterAttributes</text:span><text:span text:style-name="T79">;</text:span><text:span text:style-name="T26"> </text:span></text:p>
      <text:p text:style-name="P117"><text:span text:style-name="T38"><text:s text:c="2"/></text:span><text:span text:style-name="T26">...</text:span></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the highlighter</text:span></text:p>
      <text:p text:style-name="P117"><text:span text:style-name="T38"><text:s text:c="2"/></text:span><text:span text:style-name="T26">...</text:span></text:p>
      <text:p text:style-name="P117"><text:span text:style-name="T38"><text:s text:c="2"/></text:span><text:span text:style-name="T26">atribString </text:span><text:span text:style-name="T79">: =</text:span><text:span text:style-name="T26"> hlt.tkString</text:span><text:span text:style-name="T79">;</text:span><text:span text:style-name="T26"> <text:s text:c="5"/></text:span><text:span text:style-name="T92">//</text:span><text:span text:style-name="T96">reference to the attribute</text:span></text:p>
      <text:p text:style-name="P117"><text:span text:style-name="T38"><text:s text:c="2"/></text:span><text:span text:style-name="T26">atribString.Foreground</text:span><text:span text:style-name="T79">: =</text:span><text:span text:style-name="T26">clPurple</text:span><text:span text:style-name="T79">;</text:span><text:span text:style-name="T26"> </text:span><text:span text:style-name="T92">//</text:span><text:span text:style-name="T96">text color</text:span></text:p>
      <text:p text:style-name="P117"><text:span text:style-name="T38"><text:s text:c="2"/></text:span><text:span text:style-name="T26">atribString.Style </text:span><text:span text:style-name="T79">: =</text:span><text:span text:style-name="T26"> [FsBold, fsUnderline]</text:span><text:span text:style-name="T79">;</text:span><text:span text:style-name="T26"> </text:span><text:span text:style-name="T92">//</text:span><text:span text:style-name="T96">bold and underlined</text:span></text:p>
      <text:p text:style-name="P75"/>
      <text:p text:style-name="P75">To create new attributes, use variables of type "TSynHighlighterAttributes" similarly. In the following code we create two new types of tokens, and define its attributes:</text:p>
      <text:p text:style-name="P75"/>
      <text:p text:style-name="P127">var</text:p>
      <text:p text:style-name="P119"><text:span text:style-name="T38"><text:s text:c="2"/></text:span><text:span text:style-name="T26">tkOperator</text:span><text:span text:style-name="T79">:</text:span><text:span text:style-name="T26"> TsynHighlighterAttributes</text:span><text:span text:style-name="T79">; </text:span><text:span text:style-name="T93">//Attribute</text:span></text:p>
      <text:p text:style-name="P150"><text:span text:style-name="T46"><text:s text:c="2"/></text:span><text:span text:style-name="T58">tnOperator</text:span><text:span text:style-name="T86">:</text:span><text:span text:style-name="T46"> </text:span><text:span text:style-name="T58">integer</text:span><text:span text:style-name="T86">; <text:s text:c="3"/></text:span><text:span text:style-name="T93">//Id</text:span></text:p>
      <text:p text:style-name="P154"><text:span text:style-name="T45"><text:s text:c="2"/></text:span><text:span text:style-name="T66">tkDelimiter</text:span><text:span text:style-name="T88">:</text:span><text:span text:style-name="T24"> </text:span><text:span text:style-name="T66">TsynHighlighterAttributes</text:span><text:span text:style-name="T88">; </text:span><text:span text:style-name="T102">//Attribute</text:span></text:p>
      <text:p text:style-name="P154"><text:span text:style-name="T45"><text:s text:c="2"/></text:span><text:span text:style-name="T66">tnDelimiter</text:span><text:span text:style-name="T88">:</text:span><text:span text:style-name="T24"> </text:span><text:span text:style-name="T66">integer</text:span><text:span text:style-name="T88">; <text:s text:c="2"/></text:span><text:span text:style-name="T102">//Id</text:span></text:p>
      <text:p text:style-name="P123">...</text:p>
      <text:p text:style-name="P117"><text:span text:style-name="T38"><text:s text:c="2"/></text:span><text:span text:style-name="T92">//</text:span><text:span text:style-name="T96">creates new type of token called "operator"</text:span></text:p>
      <text:p text:style-name="P117"><text:span text:style-name="T38"><text:s text:c="2"/></text:span><text:span text:style-name="T26">t</text:span><text:span text:style-name="T36">n</text:span><text:span text:style-name="T26">Operator </text:span><text:span text:style-name="T79">: =</text:span><text:span text:style-name="T26"> hlt.NewTokType</text:span><text:span text:style-name="T79">(</text:span><text:span text:style-name="T114">'Operator', </text:span><text:span text:style-name="T49">t</text:span><text:span text:style-name="T50">k</text:span><text:span text:style-name="T49">Operator</text:span><text:span text:style-name="T79">);</text:span></text:p>
      <text:p text:style-name="P117"><text:span text:style-name="T38"><text:s text:c="2"/></text:span><text:span text:style-name="T26">tkOperator.Foreground</text:span><text:span text:style-name="T79">: =</text:span><text:span text:style-name="T26">clRed</text:span><text:span text:style-name="T79">;</text:span><text:span text:style-name="T26"> </text:span><text:span text:style-name="T92">//</text:span><text:span text:style-name="T96">text color</text:span></text:p>
      <text:p text:style-name="P123"/>
      <text:p text:style-name="P117"><text:span text:style-name="T38"><text:s text:c="2"/></text:span><text:span text:style-name="T92">//</text:span><text:span text:style-name="T96">creates new type of token called "delimiter"</text:span></text:p>
      <text:p text:style-name="P117"><text:span text:style-name="T38"><text:s text:c="2"/></text:span><text:span text:style-name="T26">t</text:span><text:span text:style-name="T36">n</text:span><text:span text:style-name="T26">Delimiter </text:span><text:span text:style-name="T79">: =</text:span><text:span text:style-name="T26"> hlt.NewTokType</text:span><text:span text:style-name="T79">(</text:span><text:span text:style-name="T114">'Delimiter', </text:span><text:span text:style-name="T49">t</text:span><text:span text:style-name="T50">k</text:span><text:span text:style-name="T49">Delimiter</text:span><text:span text:style-name="T79">);</text:span></text:p>
      <text:p text:style-name="P117"><text:span text:style-name="T38"><text:s text:c="2"/></text:span><text:span text:style-name="T26">tkDelimiter.Foreground</text:span><text:span text:style-name="T79">: =</text:span><text:span text:style-name="T26">clRed</text:span><text:span text:style-name="T79">;</text:span><text:span text:style-name="T26"> </text:span><text:span text:style-name="T92">//</text:span><text:span text:style-name="T96">text color</text:span></text:p>
      <text:p text:style-name="P75"/>
      <text:p text:style-name="P79">Note that NewTokType returns both the token ID and the associated Attribute. The ID will be used later when the highlighter is set up.</text:p>
      <text:p text:style-name="P79"/>
      <text:p text:style-name="P75">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5"/>
      <text:p text:style-name="P75"><text:soft-page-break/>The new type name must be unique for each type. Otherwise an exception is generated at runtime.</text:p>
      <text:p text:style-name="P75"/>
      <text:p text:style-name="P75">If you want to reference an existing attribute, by name, use the GetAttribByName() function:</text:p>
      <text:p text:style-name="P75"/>
      <text:p text:style-name="P117"><text:span text:style-name="T38"><text:s text:c="2"/></text:span><text:span text:style-name="T26">tkOperador </text:span><text:span text:style-name="T79">: =</text:span><text:span text:style-name="T26"> hlt.GetAttribByName</text:span><text:span text:style-name="T79">(</text:span><text:span text:style-name="T114">'Operator'</text:span><text:span text:style-name="T79">);</text:span><text:span text:style-name="T26"> </text:span><text:span text:style-name="T92">//</text:span><text:span text:style-name="T96">must have been created</text:span></text:p>
      <text:p text:style-name="P75"/>
      <text:p text:style-name="P75">This way you can also access the attributes that have been created from the XML file because it is the only way to identify them externally. GetAttribByName() does not distinguish between uppercase or lowercase.</text:p>
      <text:p text:style-name="P75"/>
      <text:p text:style-name="P75">The attributes dynamically created, are added to the list of predefined attributes highlighter. To clear the list of attributes, call the method CreateAttributes(), which leaves only the predefined attributes.</text:p>
      <text:p text:style-name="P75"/>
      <text:p text:style-name="P75"><text:bookmark text:name="result_box84"/><text:span text:style-name="T144">To get the ID of an attribute by its name, the GetAttribIDByName function must be used:</text:span> </text:p>
      <text:p text:style-name="P111"/>
      <text:p text:style-name="P155"><text:span text:style-name="T56"><text:s text:c="2"/>tnOperator </text:span><text:span text:style-name="T83">:=</text:span><text:span text:style-name="T24"> </text:span><text:span text:style-name="T56">hlt.GetAttribIDByName</text:span><text:span text:style-name="T83">(</text:span><text:span text:style-name="T118">'Opera</text:span><text:span text:style-name="T125">t</text:span><text:span text:style-name="T118">or'</text:span><text:span text:style-name="T83">); </text:span><text:span text:style-name="T44"><text:s/></text:span><text:span text:style-name="T101">//</text:span><text:span text:style-name="T103">must have been created</text:span></text:p>
      <text:p text:style-name="P69"/>
      <text:p text:style-name="P33"><text:span text:style-name="T144"><text:tab/></text:span><text:span text:style-name="T147">We </text:span><text:span text:style-name="T144">can also use the Attrib [] array, to get the attribute from the ID:</text:span> </text:p>
      <text:p text:style-name="P69"/>
      <text:p text:style-name="P155"><text:span text:style-name="T56"><text:s text:c="2"/>tkOperador </text:span><text:span text:style-name="T83">:=</text:span><text:span text:style-name="T24"> </text:span><text:span text:style-name="T56">hlt.</text:span> <text:span text:style-name="T56">Attrib[tnOperator</text:span><text:span text:style-name="T118">]</text:span><text:span text:style-name="T83">;</text:span><text:span text:style-name="T24"> </text:span></text:p>
      <text:p text:style-name="P75"/>
      <text:p text:style-name="P79">The array Attribute[], must not be used.</text:p>
      <text:p text:style-name="P75"/>
      <text:list xml:id="list230304712760576" text:continue-numbering="true" text:style-name="WW8Num24">
        <text:list-item>
          <text:list>
            <text:list-item>
              <text:h text:style-name="P246"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15"/>
      <text:p text:style-name="P75">The first definition of token that we must do, within a highlighter, is for identifiers. </text:p>
      <text:p text:style-name="P75"/>
      <text:p text:style-name="P75">To define identifiers by code, you must define the initial and subsequent characters, in the form of regular expressions:</text:p>
      <text:p text:style-name="P15"/>
      <text:p text:style-name="P117"><text:span text:style-name="T38"><text:s text:c="2"/></text:span><text:span text:style-name="T26">hlt.ClearMethodTables</text:span><text:span text:style-name="T79">;</text:span></text:p>
      <text:p text:style-name="P117"><text:span text:style-name="T38"><text:s text:c="2"/></text:span><text:span text:style-name="T26">...</text:span></text:p>
      <text:p text:style-name="P117"><text:span text:style-name="T38"><text:s text:c="2"/></text:span><text:span text:style-name="T26">hlt.DefTokIdentif</text:span><text:span text:style-name="T79">(</text:span><text:span text:style-name="T114">'[A-Za-z]'</text:span><text:span text:style-name="T26">,</text:span><text:span text:style-name="T114">'[A-Za-z0-9]*'</text:span><text:span text:style-name="T79">);</text:span></text:p>
      <text:p text:style-name="P15"/>
      <text:p text:style-name="P15"><text:soft-page-break/><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5">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59"/>
      <text:p text:style-name="P117"><text:span text:style-name="T38"><text:s text:c="2"/></text:span><text:span text:style-name="T26">hlt.DefTokIdentif</text:span><text:span text:style-name="T79">(</text:span><text:span text:style-name="T114">'[A-Za-z$_]'</text:span><text:span text:style-name="T26">,</text:span><text:span text:style-name="T114">'[A-Za-z0-9_]*'</text:span><text:span text:style-name="T79">);</text:span></text:p>
      <text:p text:style-name="P159"/>
      <text:p text:style-name="P159">This means that although not specified any definition, it always starts with one, for identifiers.</text:p>
      <text:p text:style-name="P159"/>
      <text:p text:style-name="P159">After defining identifiers, all tokens belonging to that category will become like "t<text:span text:style-name="T155">n</text:span>Identif", and displayed the attributes of this type.</text:p>
      <text:p text:style-name="P159"/>
      <text:list xml:id="list230305588472696" text:continue-numbering="true" text:style-name="WW8Num24">
        <text:list-item>
          <text:list>
            <text:list-item>
              <text:list>
                <text:list-item>
                  <text:h text:style-name="P256" text:outline-level="3"><text:bookmark-start text:name="__RefHeading___Toc404419498"/>Identifiers UTF-8<text:bookmark-end text:name="__RefHeading___Toc404419498"/></text:h>
                </text:list-item>
              </text:list>
            </text:list-item>
          </text:list>
        </text:list-item>
      </text:list>
      <text:p text:style-name="P159"/>
      <text:p text:style-name="P159">SynFacilSyn (from version 0.9), has a basic support for identifiers with UTF-8 characters. This way you can define identifiers with characters from other languages ​​besides English.</text:p>
      <text:p text:style-name="P159"/>
      <text:p text:style-name="P159">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59"/>
      <text:p text:style-name="P159"><text:soft-page-break/>So for example to enable the recognition of identifiers that can begin with vowels branded Spanish, must include the following definition:</text:p>
      <text:p text:style-name="P159"/>
      <text:p text:style-name="P117"><text:span text:style-name="T38"><text:s text:c="2"/></text:span><text:span text:style-name="T26">hlt.DefTokIdentif</text:span><text:span text:style-name="T79">(</text:span><text:span text:style-name="T114">'[A-Za-z'#195']'</text:span><text:span text:style-name="T26">,</text:span><text:span text:style-name="T114">'[A-Za-z0-9]*'</text:span><text:span text:style-name="T79">);</text:span></text:p>
      <text:p text:style-name="P159"/>
      <text:p text:style-name="P159">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59"/>
      <text:p text:style-name="P159">Page 195, includes the following characters:</text:p>
      <text:p text:style-name="P15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4">CHARACTER</text:p>
          </table:table-cell>
          <table:table-cell table:style-name="Table14.A1" office:value-type="string">
            <text:p text:style-name="P44">BYTES</text:p>
          </table:table-cell>
          <table:table-cell table:style-name="Table14.C1" office:value-type="string">
            <text:p text:style-name="P44">DESCRIPTION</text:p>
          </table:table-cell>
        </table:table-row>
        <table:table-row table:style-name="Table14.1">
          <table:table-cell table:style-name="Table14.A2" office:value-type="string">
            <text:p text:style-name="P45">À</text:p>
          </table:table-cell>
          <table:table-cell table:style-name="Table14.A2" office:value-type="string">
            <text:p text:style-name="P45">c3 80</text:p>
          </table:table-cell>
          <table:table-cell table:style-name="Table14.C2" office:value-type="string">
            <text:p text:style-name="P45">LATIN CAPITAL LETTER A WITH GRAVE</text:p>
          </table:table-cell>
        </table:table-row>
        <table:table-row table:style-name="Table14.1">
          <table:table-cell table:style-name="Table14.A2" office:value-type="string">
            <text:p text:style-name="P45">Á</text:p>
          </table:table-cell>
          <table:table-cell table:style-name="Table14.A2" office:value-type="string">
            <text:p text:style-name="P45">c3 81</text:p>
          </table:table-cell>
          <table:table-cell table:style-name="Table14.C2" office:value-type="string">
            <text:p text:style-name="P45">LATIN CAPITA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82</text:p>
          </table:table-cell>
          <table:table-cell table:style-name="Table14.C2" office:value-type="string">
            <text:p text:style-name="P45">LATIN CAPITA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83</text:p>
          </table:table-cell>
          <table:table-cell table:style-name="Table14.C2" office:value-type="string">
            <text:p text:style-name="P45">LATIN CAPITA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84</text:p>
          </table:table-cell>
          <table:table-cell table:style-name="Table14.C2" office:value-type="string">
            <text:p text:style-name="P45">LATIN CAPITA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85</text:p>
          </table:table-cell>
          <table:table-cell table:style-name="Table14.C2" office:value-type="string">
            <text:p text:style-name="P45">LATIN CAPITA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86</text:p>
          </table:table-cell>
          <table:table-cell table:style-name="Table14.C2" office:value-type="string">
            <text:p text:style-name="P45">LATIN CAPITAL LETTER AE</text:p>
          </table:table-cell>
        </table:table-row>
        <table:table-row table:style-name="Table14.1">
          <table:table-cell table:style-name="Table14.A2" office:value-type="string">
            <text:p text:style-name="P45">Ç</text:p>
          </table:table-cell>
          <table:table-cell table:style-name="Table14.A2" office:value-type="string">
            <text:p text:style-name="P45">c3 87</text:p>
          </table:table-cell>
          <table:table-cell table:style-name="Table14.C2" office:value-type="string">
            <text:p text:style-name="P45">LATIN CAPITA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88</text:p>
          </table:table-cell>
          <table:table-cell table:style-name="Table14.C2" office:value-type="string">
            <text:p text:style-name="P45">LATIN CAPITA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89</text:p>
          </table:table-cell>
          <table:table-cell table:style-name="Table14.C2" office:value-type="string">
            <text:p text:style-name="P45">LATIN CAPITA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8a</text:p>
          </table:table-cell>
          <table:table-cell table:style-name="Table14.C2" office:value-type="string">
            <text:p text:style-name="P45">LATIN CAPITA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8b</text:p>
          </table:table-cell>
          <table:table-cell table:style-name="Table14.C2" office:value-type="string">
            <text:p text:style-name="P45">LATIN CAPITA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8c</text:p>
          </table:table-cell>
          <table:table-cell table:style-name="Table14.C2" office:value-type="string">
            <text:p text:style-name="P45">LATIN CAPITA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8d</text:p>
          </table:table-cell>
          <table:table-cell table:style-name="Table14.C2" office:value-type="string">
            <text:p text:style-name="P45">LATIN CAPITA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8e</text:p>
          </table:table-cell>
          <table:table-cell table:style-name="Table14.C2" office:value-type="string">
            <text:p text:style-name="P45">LATIN CAPITA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8f</text:p>
          </table:table-cell>
          <table:table-cell table:style-name="Table14.C2" office:value-type="string">
            <text:p text:style-name="P45">LATIN CAPITA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90</text:p>
          </table:table-cell>
          <table:table-cell table:style-name="Table14.C2" office:value-type="string">
            <text:p text:style-name="P45">LATIN CAPITAL LETTER ETH</text:p>
          </table:table-cell>
        </table:table-row>
        <table:table-row table:style-name="Table14.1">
          <table:table-cell table:style-name="Table14.A2" office:value-type="string">
            <text:p text:style-name="P45">Ñ</text:p>
          </table:table-cell>
          <table:table-cell table:style-name="Table14.A2" office:value-type="string">
            <text:p text:style-name="P45">c3 91</text:p>
          </table:table-cell>
          <table:table-cell table:style-name="Table14.C2" office:value-type="string">
            <text:p text:style-name="P45">LATIN CAPITA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c3 92</text:p>
          </table:table-cell>
          <table:table-cell table:style-name="Table14.C2" office:value-type="string">
            <text:p text:style-name="P45">LATIN CAPITAL LETTER O WITH GRAVE</text:p>
          </table:table-cell>
        </table:table-row>
        <table:table-row table:style-name="Table14.1">
          <table:table-cell table:style-name="Table14.A2" office:value-type="string">
            <text:p text:style-name="P45">Ó</text:p>
          </table:table-cell>
          <table:table-cell table:style-name="Table14.A2" office:value-type="string">
            <text:p text:style-name="P45">c3 93</text:p>
          </table:table-cell>
          <table:table-cell table:style-name="Table14.C2" office:value-type="string">
            <text:p text:style-name="P45">LATIN CAPITA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94</text:p>
          </table:table-cell>
          <table:table-cell table:style-name="Table14.C2" office:value-type="string">
            <text:p text:style-name="P45">LATIN CAPITA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95</text:p>
          </table:table-cell>
          <table:table-cell table:style-name="Table14.C2" office:value-type="string">
            <text:p text:style-name="P45">LATIN CAPITA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96</text:p>
          </table:table-cell>
          <table:table-cell table:style-name="Table14.C2" office:value-type="string">
            <text:p text:style-name="P45">LATIN CAPITA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97</text:p>
          </table:table-cell>
          <table:table-cell table:style-name="Table14.C2" office:value-type="string">
            <text:p text:style-name="P45">MULTIPLICATION SIGN</text:p>
          </table:table-cell>
        </table:table-row>
        <table:table-row table:style-name="Table14.1">
          <table:table-cell table:style-name="Table14.A2" office:value-type="string">
            <text:p text:style-name="P45">Ø</text:p>
          </table:table-cell>
          <table:table-cell table:style-name="Table14.A2" office:value-type="string">
            <text:p text:style-name="P45">c3 98</text:p>
          </table:table-cell>
          <table:table-cell table:style-name="Table14.C2" office:value-type="string">
            <text:p text:style-name="P45">LATIN CAPITA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99</text:p>
          </table:table-cell>
          <table:table-cell table:style-name="Table14.C2" office:value-type="string">
            <text:p text:style-name="P45">LATIN CAPITA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the 9th</text:p>
          </table:table-cell>
          <table:table-cell table:style-name="Table14.C2" office:value-type="string">
            <text:p text:style-name="P45">LATIN CAPITA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9b</text:p>
          </table:table-cell>
          <table:table-cell table:style-name="Table14.C2" office:value-type="string">
            <text:p text:style-name="P45">LATIN CAPITAL LETTER U WITH circumflex</text:p>
          </table:table-cell>
        </table:table-row>
        <text:soft-page-break/>
        <table:table-row table:style-name="Table14.1">
          <table:table-cell table:style-name="Table14.A2" office:value-type="string">
            <text:p text:style-name="P45">Ü</text:p>
          </table:table-cell>
          <table:table-cell table:style-name="Table14.A2" office:value-type="string">
            <text:p text:style-name="P45">c3 9c</text:p>
          </table:table-cell>
          <table:table-cell table:style-name="Table14.C2" office:value-type="string">
            <text:p text:style-name="P45">LATIN CAPITA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9d</text:p>
          </table:table-cell>
          <table:table-cell table:style-name="Table14.C2" office:value-type="string">
            <text:p text:style-name="P45">LATIN CAPITA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9e</text:p>
          </table:table-cell>
          <table:table-cell table:style-name="Table14.C2" office:value-type="string">
            <text:p text:style-name="P45">LATIN CAPITAL LETTER THORN</text:p>
          </table:table-cell>
        </table:table-row>
        <table:table-row table:style-name="Table14.1">
          <table:table-cell table:style-name="Table14.A2" office:value-type="string">
            <text:p text:style-name="P45">ß</text:p>
          </table:table-cell>
          <table:table-cell table:style-name="Table14.A2" office:value-type="string">
            <text:p text:style-name="P45">c3 9f</text:p>
          </table:table-cell>
          <table:table-cell table:style-name="Table14.C2" office:value-type="string">
            <text:p text:style-name="P45">LATIN SMALL LETTER SHARP S</text:p>
          </table:table-cell>
        </table:table-row>
        <table:table-row table:style-name="Table14.1">
          <table:table-cell table:style-name="Table14.A2" office:value-type="string">
            <text:p text:style-name="P45">à</text:p>
          </table:table-cell>
          <table:table-cell table:style-name="Table14.A2" office:value-type="string">
            <text:p text:style-name="P45">c3 a0</text:p>
          </table:table-cell>
          <table:table-cell table:style-name="Table14.C2" office:value-type="string">
            <text:p text:style-name="P45">LATIN SMALL LETTER A WITH GRAVE</text:p>
          </table:table-cell>
        </table:table-row>
        <table:table-row table:style-name="Table14.1">
          <table:table-cell table:style-name="Table14.A2" office:value-type="string">
            <text:p text:style-name="P45">to</text:p>
          </table:table-cell>
          <table:table-cell table:style-name="Table14.A2" office:value-type="string">
            <text:p text:style-name="P45">c3 a1</text:p>
          </table:table-cell>
          <table:table-cell table:style-name="Table14.C2" office:value-type="string">
            <text:p text:style-name="P45">LATIN SMAL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a2</text:p>
          </table:table-cell>
          <table:table-cell table:style-name="Table14.C2" office:value-type="string">
            <text:p text:style-name="P45">LATIN SMAL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a3</text:p>
          </table:table-cell>
          <table:table-cell table:style-name="Table14.C2" office:value-type="string">
            <text:p text:style-name="P45">LATIN SMAL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a4</text:p>
          </table:table-cell>
          <table:table-cell table:style-name="Table14.C2" office:value-type="string">
            <text:p text:style-name="P45">LATIN SMAL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a5</text:p>
          </table:table-cell>
          <table:table-cell table:style-name="Table14.C2" office:value-type="string">
            <text:p text:style-name="P45">LATIN SMAL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a6</text:p>
          </table:table-cell>
          <table:table-cell table:style-name="Table14.C2" office:value-type="string">
            <text:p text:style-name="P45">LATIN SMALL LETTER AE</text:p>
          </table:table-cell>
        </table:table-row>
        <table:table-row table:style-name="Table14.1">
          <table:table-cell table:style-name="Table14.A2" office:value-type="string">
            <text:p text:style-name="P45">ç</text:p>
          </table:table-cell>
          <table:table-cell table:style-name="Table14.A2" office:value-type="string">
            <text:p text:style-name="P45">c3 a7</text:p>
          </table:table-cell>
          <table:table-cell table:style-name="Table14.C2" office:value-type="string">
            <text:p text:style-name="P45">LATIN SMAL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a8</text:p>
          </table:table-cell>
          <table:table-cell table:style-name="Table14.C2" office:value-type="string">
            <text:p text:style-name="P45">LATIN SMAL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a9</text:p>
          </table:table-cell>
          <table:table-cell table:style-name="Table14.C2" office:value-type="string">
            <text:p text:style-name="P45">LATIN SMAL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aa</text:p>
          </table:table-cell>
          <table:table-cell table:style-name="Table14.C2" office:value-type="string">
            <text:p text:style-name="P45">LATIN SMAL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ab</text:p>
          </table:table-cell>
          <table:table-cell table:style-name="Table14.C2" office:value-type="string">
            <text:p text:style-name="P45">LATIN SMAL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ac</text:p>
          </table:table-cell>
          <table:table-cell table:style-name="Table14.C2" office:value-type="string">
            <text:p text:style-name="P45">LATIN SMAL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ad</text:p>
          </table:table-cell>
          <table:table-cell table:style-name="Table14.C2" office:value-type="string">
            <text:p text:style-name="P45">LATIN SMAL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ae</text:p>
          </table:table-cell>
          <table:table-cell table:style-name="Table14.C2" office:value-type="string">
            <text:p text:style-name="P45">LATIN SMAL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af</text:p>
          </table:table-cell>
          <table:table-cell table:style-name="Table14.C2" office:value-type="string">
            <text:p text:style-name="P45">LATIN SMAL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b0</text:p>
          </table:table-cell>
          <table:table-cell table:style-name="Table14.C2" office:value-type="string">
            <text:p text:style-name="P45">LATIN SMALL LETTER ETH</text:p>
          </table:table-cell>
        </table:table-row>
        <table:table-row table:style-name="Table14.1">
          <table:table-cell table:style-name="Table14.A2" office:value-type="string">
            <text:p text:style-name="P45">ñ</text:p>
          </table:table-cell>
          <table:table-cell table:style-name="Table14.A2" office:value-type="string">
            <text:p text:style-name="P45">c3 b1</text:p>
          </table:table-cell>
          <table:table-cell table:style-name="Table14.C2" office:value-type="string">
            <text:p text:style-name="P45">LATIN SMAL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b2 c3</text:p>
          </table:table-cell>
          <table:table-cell table:style-name="Table14.C2" office:value-type="string">
            <text:p text:style-name="P45">LATIN SMALL LETTER O WITH GRAVE</text:p>
          </table:table-cell>
        </table:table-row>
        <table:table-row table:style-name="Table14.1">
          <table:table-cell table:style-name="Table14.A2" office:value-type="string">
            <text:p text:style-name="P45">or</text:p>
          </table:table-cell>
          <table:table-cell table:style-name="Table14.A2" office:value-type="string">
            <text:p text:style-name="P45">b3 c3</text:p>
          </table:table-cell>
          <table:table-cell table:style-name="Table14.C2" office:value-type="string">
            <text:p text:style-name="P45">LATIN SMAL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b4</text:p>
          </table:table-cell>
          <table:table-cell table:style-name="Table14.C2" office:value-type="string">
            <text:p text:style-name="P45">LATIN SMAL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b5</text:p>
          </table:table-cell>
          <table:table-cell table:style-name="Table14.C2" office:value-type="string">
            <text:p text:style-name="P45">LATIN SMAL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b6</text:p>
          </table:table-cell>
          <table:table-cell table:style-name="Table14.C2" office:value-type="string">
            <text:p text:style-name="P45">LATIN SMAL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b7</text:p>
          </table:table-cell>
          <table:table-cell table:style-name="Table14.C2" office:value-type="string">
            <text:p text:style-name="P45">SIGN DIVISION</text:p>
          </table:table-cell>
        </table:table-row>
        <table:table-row table:style-name="Table14.1">
          <table:table-cell table:style-name="Table14.A2" office:value-type="string">
            <text:p text:style-name="P45">ø</text:p>
          </table:table-cell>
          <table:table-cell table:style-name="Table14.A2" office:value-type="string">
            <text:p text:style-name="P45">c3 b8</text:p>
          </table:table-cell>
          <table:table-cell table:style-name="Table14.C2" office:value-type="string">
            <text:p text:style-name="P45">LATIN SMAL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b9</text:p>
          </table:table-cell>
          <table:table-cell table:style-name="Table14.C2" office:value-type="string">
            <text:p text:style-name="P45">LATIN SMAL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ba</text:p>
          </table:table-cell>
          <table:table-cell table:style-name="Table14.C2" office:value-type="string">
            <text:p text:style-name="P45">LATIN SMAL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bb</text:p>
          </table:table-cell>
          <table:table-cell table:style-name="Table14.C2" office:value-type="string">
            <text:p text:style-name="P45">LATIN SMAL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bc</text:p>
          </table:table-cell>
          <table:table-cell table:style-name="Table14.C2" office:value-type="string">
            <text:p text:style-name="P45">LATIN SMAL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bd</text:p>
          </table:table-cell>
          <table:table-cell table:style-name="Table14.C2" office:value-type="string">
            <text:p text:style-name="P45">LATIN SMAL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be</text:p>
          </table:table-cell>
          <table:table-cell table:style-name="Table14.C2" office:value-type="string">
            <text:p text:style-name="P45">LATIN SMALL LETTER THORN</text:p>
          </table:table-cell>
        </table:table-row>
        <table:table-row table:style-name="Table14.1">
          <table:table-cell table:style-name="Table14.A2" office:value-type="string">
            <text:p text:style-name="P45">ÿ</text:p>
          </table:table-cell>
          <table:table-cell table:style-name="Table14.A2" office:value-type="string">
            <text:p text:style-name="P45">c3 bf</text:p>
          </table:table-cell>
          <table:table-cell table:style-name="Table14.C2" office:value-type="string">
            <text:p text:style-name="P45">LATIN SMALL LETTER Y WITH diaeresis</text:p>
          </table:table-cell>
        </table:table-row>
      </table:table>
      <text:p text:style-name="P159"/>
      <text:p text:style-name="P159">With this definition we are enabling identifiers as: “ícono”, “último”, ... but we will also be able “ñandu” (without accent), “être”, “÷b”, “Ça”. </text:p>
      <text:p text:style-name="P159"/>
      <text:p text:style-name="P159">This can include UTF-8 characters in different pages, but always including the entire page, not characters.</text:p>
      <text:p text:style-name="P159"><text:soft-page-break/></text:p>
      <text:p text:style-name="P159">The following definition would give the same result:</text:p>
      <text:p text:style-name="P159"/>
      <text:p text:style-name="P117"><text:span text:style-name="T38"><text:s text:c="2"/></text:span><text:span text:style-name="T26">hlt.DefTokIdentif</text:span><text:span text:style-name="T79">(</text:span><text:span text:style-name="T114">'[A-Za-zá]'</text:span><text:span text:style-name="T26">,</text:span><text:span text:style-name="T114">'[A-Za-z0-9]*'</text:span><text:span text:style-name="T79">);</text:span></text:p>
      <text:p text:style-name="P159"/>
      <text:p text:style-name="P159">But actually include UTF-8 pages 195 and 161, since the character "á" will be interpreted as two characters: 195 and 161. Therefore, this definition is not recommended.</text:p>
      <text:p text:style-name="P159"/>
      <text:p text:style-name="P159">For these characters, whether it is advisable to define the possible values ​​indicating the valid characters:</text:p>
      <text:p text:style-name="P159"/>
      <text:p text:style-name="P117"><text:span text:style-name="T38"><text:s text:c="2"/></text:span><text:span text:style-name="T26">hlt.DefTokIdentif</text:span><text:span text:style-name="T79">(</text:span><text:span text:style-name="T114">'[A-Za-z'#195']'</text:span><text:span text:style-name="T26">,</text:span><text:span text:style-name="T114">'[áéíóúÁÉÍÓÚA-Za-z0-9]*'</text:span><text:span text:style-name="T79">);</text:span></text:p>
      <text:p text:style-name="P159"/>
      <text:p text:style-name="P159">This definition would be most appropriate to accept accented vowels as part of identifiers. </text:p>
      <text:p text:style-name="P159"/>
      <text:p text:style-name="P159">However, by the nature of UTF-8 (two bytes per character) and the nature of highlighter (one byte per character), this definition is not accurate, because there will always process the following bytes as if they were characters and groups of two characters .</text:p>
      <text:p text:style-name="P159"/>
      <text:p text:style-name="P159">Despite this semantic difference, the highlight will work pretty well, because divide the UTF-8 characters in two characters and consider both characters as valid. But would also pass (partly, only the first byte) characters of the page $89, $81, $8D, ...</text:p>
      <text:p text:style-name="P159"/>
      <text:p text:style-name="P160"><text:span text:style-name="T2">Although you can define identifiers many pages of UTF-8, you can not define special identifiers of any UTF-8 page (see Section </text:span><text:span text:style-name="T2"><text:bookmark-ref text:reference-format="number" text:ref-name="_Ref395459647">5.5.2</text:bookmark-ref></text:span><text:span text:style-name="T2"> - </text:span><text:span text:style-name="T2"><text:bookmark-ref text:reference-format="text" text:ref-name="_Ref395459650">Special Identifiers</text:bookmark-ref></text:span><text:span text:style-name="T2">)</text:span></text:p>
      <text:p text:style-name="P159"/>
      <text:list xml:id="list230304623152530" text:continue-numbering="true" text:style-name="WW8Num24">
        <text:list-item>
          <text:list>
            <text:list-item>
              <text:list>
                <text:list-item>
                  <text:h text:style-name="P246"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list-item>
      </text:list>
      <text:p text:style-name="P75"/>
      <text:p text:style-name="P75">Special identifier can be added by code, using the method AddIdentSpec(), as shown in the following example:</text:p>
      <text:p text:style-name="P75"/>
      <text:p text:style-name="P117"><text:span text:style-name="T38"><text:s text:c="2"/></text:span><text:span text:style-name="T26">hlt.AddIdentSpec</text:span><text:span text:style-name="T79">(</text:span><text:span text:style-name="T114">'IF'</text:span><text:span text:style-name="T26">, hlt.t</text:span><text:span text:style-name="T29">n</text:span><text:span text:style-name="T26">Keyword</text:span><text:span text:style-name="T79">);</text:span></text:p>
      <text:p text:style-name="P123"/>
      <text:p text:style-name="P75"/>
      <text:p text:style-name="P75">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5"/>
      <text:p text:style-name="P75"><text:soft-page-break/>The case (uppercase or lowercase) of the identifier shall not be taken into account by default, unless the "CaseSensitive" property is set to TRUE in the highlighter.</text:p>
      <text:p text:style-name="P75"/>
      <text:p text:style-name="P75">The initial characters for special identifiers can only be English alphabetic characters, and characters _, $,%, @ and &amp;. You can not use other characters that are not in this group.</text:p>
      <text:p text:style-name="P75"/>
      <text:p text:style-name="P15"><text:tab/>You can assign any attribute to the special identifiers. The following example creates the special identifier “PI, ”with the attribute number:</text:p>
      <text:p text:style-name="P15"/>
      <text:p text:style-name="P117"><text:span text:style-name="T38"><text:s text:c="2"/></text:span><text:span text:style-name="T26">hlt.CaseSensitive </text:span><text:span text:style-name="T79">: =</text:span><text:span text:style-name="T26"> </text:span><text:span text:style-name="T11">true</text:span><text:span text:style-name="T79">;</text:span></text:p>
      <text:p text:style-name="P117"><text:span text:style-name="T38"><text:s text:c="2"/></text:span><text:span text:style-name="T26">hlt.AddIdentSpec</text:span><text:span text:style-name="T79">(</text:span><text:span text:style-name="T114">'PI'</text:span><text:span text:style-name="T26">, Hlt.t</text:span><text:span text:style-name="T29">n</text:span><text:span text:style-name="T26">Number</text:span><text:span text:style-name="T79">);</text:span></text:p>
      <text:p text:style-name="P123"/>
      <text:p text:style-name="P15"/>
      <text:p text:style-name="P15"><text:tab/>In applying this definition, all identifiers "PI" is painted on the screen with the attributes configured in "hlt.<text:span text:style-name="T153">t</text:span>kNumber".</text:p>
      <text:p text:style-name="P21"><text:s/></text:p>
      <text:p text:style-name="P15"><text:tab/>In this example, is set to read all identifiers considering its case. Therefore identifiers "Pi" and "pi" is not highlighted as numbers.</text:p>
      <text:p text:style-name="P15"/>
      <text:p text:style-name="P75">If we have reserved words already defined, we must first clear the memory, using the ClearSpecials() method: </text:p>
      <text:p text:style-name="P75"/>
      <text:p text:style-name="P117"><text:span text:style-name="T38"><text:s text:c="2"/></text:span><text:span text:style-name="T26">hlt.ClearSpecials</text:span><text:span text:style-name="T79">;</text:span></text:p>
      <text:p text:style-name="P117"><text:span text:style-name="T38"><text:s text:c="2"/></text:span><text:span text:style-name="T26">...</text:span></text:p>
      <text:p text:style-name="P117"><text:span text:style-name="T38"><text:s text:c="2"/></text:span><text:span text:style-name="T26">hlt.AddIdentSpec</text:span><text:span text:style-name="T79">(</text:span><text:span text:style-name="T114">'PI'</text:span><text:span text:style-name="T26">, Hlt.t</text:span><text:span text:style-name="T29">n</text:span><text:span text:style-name="T26">Number</text:span><text:span text:style-name="T79">);</text:span></text:p>
      <text:p text:style-name="P117"><text:span text:style-name="T38"><text:s text:c="2"/></text:span><text:span text:style-name="T26">hlt.AddIdentSpec</text:span><text:span text:style-name="T79">(</text:span><text:span text:style-name="T114">'EPSILON'</text:span><text:span text:style-name="T26">, Hlt.t</text:span><text:span text:style-name="T29">n</text:span><text:span text:style-name="T26">Number</text:span><text:span text:style-name="T79">);</text:span></text:p>
      <text:p text:style-name="P117"><text:span text:style-name="T38"><text:s text:c="2"/></text:span><text:span text:style-name="T26">...</text:span></text:p>
      <text:p text:style-name="P15"/>
      <text:p text:style-name="P75">The AddIdentSpec() method lets you add special identifiers, one by one. To add multiple identifiers group must use the AddIdentSpecList () method:</text:p>
      <text:p text:style-name="P75"/>
      <text:p text:style-name="P117"><text:span text:style-name="T38"><text:s text:c="2"/></text:span><text:span text:style-name="T26">hlt.ClearSpecials</text:span><text:span text:style-name="T79">;</text:span></text:p>
      <text:p text:style-name="P117"><text:span text:style-name="T38"><text:s text:c="2"/></text:span><text:span text:style-name="T26">...</text:span></text:p>
      <text:p text:style-name="P117"><text:span text:style-name="T38"><text:s text:c="2"/></text:span><text:span text:style-name="T26">hlt.AddIdentSpecList</text:span><text:span text:style-name="T79">(</text:span><text:span text:style-name="T114">'Begin end if'</text:span><text:span text:style-name="T26">, Hlt.t</text:span><text:span text:style-name="T29">n</text:span><text:span text:style-name="T26">Keyword</text:span><text:span text:style-name="T79">);</text:span></text:p>
      <text:p text:style-name="P75"/>
      <text:p text:style-name="P75">The identifiers in the list must be separated by at least one blank. </text:p>
      <text:p text:style-name="P75"/>
      <text:p text:style-name="P75">As the keywords (attribute tkKeyword) are very common, there is a special method to add reserved words: AddKeyword().</text:p>
      <text:p text:style-name="P75"/>
      <text:p text:style-name="P116"><text:soft-page-break/><text:span text:style-name="T38"><text:s text:c="2"/></text:span><text:span text:style-name="T26">hlt.AddKeyword</text:span><text:span text:style-name="T79">(</text:span><text:span text:style-name="T114">'Array'</text:span><text:span text:style-name="T79">);</text:span></text:p>
      <text:p text:style-name="P75"/>
      <text:p text:style-name="P75">The attributes of the keywords are changed using the "KeywordAttribute" property of the highlighter.</text:p>
      <text:p text:style-name="P75"/>
      <text:p text:style-name="P75">It is advisable not to include a large number of special identifiers, because you can get a deterioration in performance highlighter.</text:p>
      <text:p text:style-name="P75"/>
      <text:p text:style-name="P75">The special identifiers can be added dynamically, according to the needs of language. No need to make additional settings. What we can not do (at least directly) is to eliminate special identifiers that have been added.</text:p>
      <text:p text:style-name="P15"/>
      <text:p text:style-name="P15"><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17"><text:span text:style-name="T11">procedure </text:span><text:span text:style-name="T26">AddIdentSpec</text:span><text:span text:style-name="T79">(</text:span><text:span text:style-name="T26">iden</text:span><text:span text:style-name="T79">:</text:span><text:span text:style-name="T26"> </text:span><text:span text:style-name="T11">string</text:span><text:span text:style-name="T79">;</text:span><text:span text:style-name="T26"> tokTyp</text:span><text:span text:style-name="T79">:</text:span><text:span text:style-name="T26"> </text:span><text:span text:style-name="T27">integer</text:span><text:span text:style-name="T79">;</text:span><text:span text:style-name="T26"> </text:span></text:p>
      <text:p text:style-name="P117"><text:span text:style-name="T38"><text:s text:c="23"/></text:span><text:span text:style-name="T26">TokPos</text:span><text:span text:style-name="T79">:</text:span><text:span text:style-name="T26"> integer</text:span><text:span text:style-name="T79">=</text:span><text:span text:style-name="T26">0</text:span><text:span text:style-name="T79">);</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17"><text:span text:style-name="T38"><text:s text:c="2"/></text:span><text:span text:style-name="T26">hlt.AddIdentSpec</text:span><text:span text:style-name="T79">(</text:span><text:span text:style-name="T114">'START'</text:span><text:span text:style-name="T26">, Hlt.t</text:span><text:span text:style-name="T29">n</text:span><text:span text:style-name="T26">Keyword, 1</text:span><text:span text:style-name="T79">);</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soft-page-break/><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7"><text:span text:style-name="T38"><text:s text:c="2"/></text:span><text:span text:style-name="T26">hlt.AddIdentSpec</text:span><text:span text:style-name="T79">(</text:span><text:span text:style-name="T114">'HOME'</text:span><text:span text:style-name="T26">, Hlt.t</text:span><text:span text:style-name="T29">n</text:span><text:span text:style-name="T26">Keyword, 1</text:span><text:span text:style-name="T79">);</text:span></text:p>
      <text:p text:style-name="P117"><text:span text:style-name="T38"><text:s text:c="2"/></text:span><text:span text:style-name="T26">hlt.AddIdentSpec</text:span><text:span text:style-name="T79">(</text:span><text:span text:style-name="T114">'HOME'</text:span><text:span text:style-name="T26">, Hlt.</text:span><text:span text:style-name="T29">n</text:span><text:span text:style-name="T26">kKeyword, 2</text:span><text:span text:style-name="T79">);</text:span></text:p>
      <text:p text:style-name="P15"/>
      <text:p text:style-name="P15"><text:tab/>However, the following definition will fail, since there is a crossing in the definitions:</text:p>
      <text:p text:style-name="P15"/>
      <text:p text:style-name="P117"><text:span text:style-name="T38"><text:s text:c="2"/></text:span><text:span text:style-name="T26">hlt.AddIdentSpec</text:span><text:span text:style-name="T79">(</text:span><text:span text:style-name="T114">'HOME'</text:span><text:span text:style-name="T26">, Hlt.t</text:span><text:span text:style-name="T29">n</text:span><text:span text:style-name="T26">Keyword 1</text:span><text:span text:style-name="T79">);</text:span></text:p>
      <text:p text:style-name="P117"><text:span text:style-name="T38"><text:s text:c="2"/></text:span><text:span text:style-name="T26">hlt.AddIdentSpec</text:span><text:span text:style-name="T79">(</text:span><text:span text:style-name="T114">'HOME'</text:span><text:span text:style-name="T26">, Hlt.t</text:span><text:span text:style-name="T29">n</text:span><text:span text:style-name="T26">Keyword</text:span><text:span text:style-name="T79">);</text:span></text:p>
      <text:p text:style-name="P159"/>
      <text:p text:style-name="P159"/>
      <text:list xml:id="list230304543984736" text:continue-numbering="true" text:style-name="WW8Num24">
        <text:list-item>
          <text:list>
            <text:list-item>
              <text:list>
                <text:list-item>
                  <text:h text:style-name="P256"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17"><text:span text:style-name="T38"><text:s text:c="2"/></text:span><text:span text:style-name="T26">hlt.ClearSpecials</text:span><text:span text:style-name="T79">;</text:span><text:span text:style-name="T26"> </text:span></text:p>
      <text:p text:style-name="P117"><text:span text:style-name="T38"><text:s text:c="2"/></text:span><text:span text:style-name="T26">hlt.ClearMethodTables</text:span><text:span text:style-name="T79">;</text:span></text:p>
      <text:p text:style-name="P117"><text:span text:style-name="T38"><text:s text:c="2"/></text:span><text:span text:style-name="T26">hlt.DefTokIdentif</text:span><text:span text:style-name="T79">(</text:span><text:span text:style-name="T114">'[A-Za-z'#195']'</text:span><text:span text:style-name="T26">,</text:span><text:span text:style-name="T114">'[ÁéíóúñÑÁÉÍÓÚA-Za-z0-9]*'</text:span><text:span text:style-name="T79">);</text:span></text:p>
      <text:p text:style-name="P117"><text:span text:style-name="T38"><text:s text:c="2"/></text:span><text:span text:style-name="T26">hlt.AddKeyword</text:span><text:span text:style-name="T79">(</text:span><text:span text:style-name="T114">'uña'</text:span><text:span text:style-name="T79">);</text:span></text:p>
      <text:p text:style-name="P117"><text:span text:style-name="T38"><text:s text:c="2"/></text:span><text:span text:style-name="T26">hlt.AddKeyword</text:span><text:span text:style-name="T79">(</text:span><text:span text:style-name="T114">'ñandú'</text:span><text:span text:style-name="T79">);</text:span></text:p>
      <text:p text:style-name="P117"><text:span text:style-name="T38"><text:s text:c="2"/></text:span><text:span text:style-name="T26">hlt.Rebuild; </text:span></text:p>
      <text:p text:style-name="P15"/>
      <text:p text:style-name="P15"><text:soft-page-break/><text:tab/>This code produces the following result on a sample text:</text:p>
      <text:p text:style-name="P15"/>
      <text:p text:style-name="P15"><draw:frame draw:style-name="fr4" draw:name="Image19" text:anchor-type="as-char" svg:width="7.038cm" svg:height="2.566cm" draw:z-index="68"><draw:image xlink:href="Pictures/100000000000010A00000061C6977DA1CDF89C48.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tab/>Do not forget that SyFacilSyn, will continue making comparisons using bytes, and in UTF-8, the extended characters are two bytes. Thus, as indicated:</text:p>
      <text:p text:style-name="P15"/>
      <text:p text:style-name="P117"><text:span text:style-name="T38"><text:s text:c="2"/></text:span><text:span text:style-name="T26">hlt.AddKeyword</text:span><text:span text:style-name="T79">(</text:span><text:span text:style-name="T114">'uña'</text:span><text:span text:style-name="T79">);</text:span></text:p>
      <text:p text:style-name="P15"/>
      <text:p text:style-name="P15"><text:tab/>We are entering a string of 4 bytes. And the comparison will always comparing the 4 bytes. That is why it is a bit complicated to ignore the case with UTF-8.</text:p>
      <text:p text:style-name="P159"/>
      <text:list xml:id="list230305231487776" text:continue-numbering="true" text:style-name="WW8Num24">
        <text:list-item>
          <text:list>
            <text:list-item>
              <text:h text:style-name="P246" text:outline-level="2"><text:bookmark-start text:name="__RefHeading___Toc404419499"/>Defining Tokens by content<text:bookmark-end text:name="__RefHeading___Toc404419499"/></text:h>
            </text:list-item>
          </text:list>
        </text:list-item>
      </text:list>
      <text:p text:style-name="P15"/>
      <text:p text:style-name="P75"><text:bookmark text:name="result_box40"/><text:span text:style-name="T136">Tokens for content defined in various ways. The easiest way is similar to how the identifiers are defined, but specifying the type of token:</text:span> </text:p>
      <text:p text:style-name="P75"/>
      <text:p text:style-name="P117"><text:span text:style-name="T38"><text:s text:c="2"/></text:span><text:span text:style-name="T26">hlt.ClearMethodTables</text:span><text:span text:style-name="T79">;</text:span></text:p>
      <text:p text:style-name="P117"><text:span text:style-name="T38"><text:s text:c="2"/></text:span><text:span text:style-name="T26">...</text:span></text:p>
      <text:p text:style-name="P117"><text:span text:style-name="T38"><text:s text:c="2"/></text:span><text:span text:style-name="T26">hlt.DefTokContent</text:span><text:span text:style-name="T79">(</text:span><text:span text:style-name="T114">'[0123456789]'</text:span><text:span text:style-name="T26">,</text:span><text:span text:style-name="T114">'[0-9]*'</text:span><text:span text:style-name="T26">, hlt.t</text:span><text:span text:style-name="T29">n</text:span><text:span text:style-name="T26">Number</text:span><text:span text:style-name="T79">);</text:span></text:p>
      <text:p text:style-name="P75"/>
      <text:p text:style-name="P15"><text:tab/>In this example assumes that "hlt" is the highlighter. The "ClearMethodTables" instruction is necessary to clean the method table of the highlighter. "hlt.t<text:span text:style-name="T153">n</text:span>Number" is the token type to which belong the tokens that meet this definition.</text:p>
      <text:p text:style-name="P15"/>
      <text:p text:style-name="P15"><text:tab/>The method DefTokContent() allow us to define tokens by content. Its definition is:</text:p>
      <text:p text:style-name="P15"/>
      <text:p text:style-name="P149"><text:span text:style-name="T46">  </text:span><text:span text:style-name="T17">procedure </text:span><text:span text:style-name="T58">DefTokContent</text:span><text:span text:style-name="T86">(</text:span><text:span text:style-name="T58">dStart, Content</text:span><text:span text:style-name="T86">:</text:span><text:span text:style-name="T46"> </text:span><text:span text:style-name="T17">string</text:span><text:span text:style-name="T86">;</text:span><text:span text:style-name="T46"> </text:span></text:p>
      <text:p text:style-name="P146"><text:span text:style-name="T56"><text:s text:c="8"/>typToken</text:span><text:span text:style-name="T83">:</text:span><text:span text:style-name="T24"> </text:span><text:span text:style-name="T67">integer</text:span><text:span text:style-name="T24"> </text:span><text:span text:style-name="T83">;</text:span><text:span text:style-name="T24"> </text:span><text:span text:style-name="T56">Complete</text:span><text:span text:style-name="T83">:</text:span><text:span text:style-name="T56">boolean </text:span><text:span text:style-name="T83">=</text:span><text:span text:style-name="T24"> </text:span><text:span text:style-name="T16">false</text:span><text:span text:style-name="T83">);</text:span></text:p>
      <text:p text:style-name="P75"/>
      <text:p text:style-name="P75"><text:soft-page-break/>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5"/>
      <text:p text:style-name="P75">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5">Another example would be this:</text:p>
      <text:p text:style-name="P15"/>
      <text:p text:style-name="P117"><text:span text:style-name="T38"><text:s text:c="2"/></text:span><text:span text:style-name="T26">hlt.ClearMethodTables</text:span><text:span text:style-name="T79">;</text:span></text:p>
      <text:p text:style-name="P117"><text:span text:style-name="T38"><text:s text:c="2"/></text:span><text:span text:style-name="T26">...</text:span></text:p>
      <text:p text:style-name="P117"><text:span text:style-name="T38"><text:s text:c="2"/></text:span><text:span text:style-name="T26">hlt.</text:span><text:span text:style-name="T25"> </text:span><text:span text:style-name="T26">DefTokContent</text:span><text:span text:style-name="T79">(</text:span><text:span text:style-name="T114">'[$]'</text:span><text:span text:style-name="T26">,</text:span><text:span text:style-name="T114">'[A-zA-Z0-9]*'</text:span><text:span text:style-name="T26">, </text:span><text:span text:style-name="T29">tn</text:span><text:span text:style-name="T26">Directive</text:span><text:span text:style-name="T79">);</text:span></text:p>
      <text:p text:style-name="P15"/>
      <text:p text:style-name="P159">We can also specify a string as the starting delimiter. For example the following definition can recognize hexadecimal numbers in C language:</text:p>
      <text:p text:style-name="P159"/>
      <text:p text:style-name="P117"><text:span text:style-name="T38"><text:s text:c="2"/></text:span><text:span text:style-name="T26">hlt.DefTokContent</text:span><text:span text:style-name="T79">(</text:span><text:span text:style-name="T114">'Ox'</text:span><text:span text:style-name="T26">,</text:span><text:span text:style-name="T114">'[0123456789]*'</text:span><text:span text:style-name="T26">, Hlt.t</text:span><text:span text:style-name="T29">n</text:span><text:span text:style-name="T26">Number</text:span><text:span text:style-name="T79">);</text:span></text:p>
      <text:p text:style-name="P159"/>
      <text:p text:style-name="P160"><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59"/>
      <text:p text:style-name="P165"><text:span text:style-name="T75">  </text:span><text:span text:style-name="T61">hlt.DefTokContent</text:span><text:span text:style-name="T87">(</text:span><text:span text:style-name="T124">'Ox'</text:span><text:span text:style-name="T61">, </text:span><text:span text:style-name="T124">'[0-9A-Fa-f]*'</text:span><text:span text:style-name="T61">, hlt.t</text:span><text:span text:style-name="T62">n</text:span><text:span text:style-name="T61">Number</text:span><text:span text:style-name="T87">);</text:span></text:p>
      <text:p text:style-name="P159"/>
      <text:p text:style-name="P160"><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59"/>
      <text:p text:style-name="P165"><text:span text:style-name="T75">  </text:span><text:span text:style-name="T61">hlt.DefTokContent</text:span><text:span text:style-name="T87">(</text:span><text:span text:style-name="T124">'[0</text:span><text:span text:style-name="T121">-</text:span><text:span text:style-name="T124">9]'</text:span><text:span text:style-name="T61">, </text:span><text:span text:style-name="T124">'[0</text:span><text:span text:style-name="T121">-</text:span><text:span text:style-name="T124">9]</text:span><text:span text:style-name="T121">*</text:span><text:span text:style-name="T124">[\.][0</text:span><text:span text:style-name="T121">-</text:span><text:span text:style-name="T124">9]*'</text:span><text:span text:style-name="T61">, hlt.t</text:span><text:span text:style-name="T62">n</text:span><text:span text:style-name="T61">Number</text:span><text:span text:style-name="T87">);</text:span></text:p>
      <text:p text:style-name="P159"/>
      <text:p text:style-name="P159"><text:bookmark text:name="result_box42"/><text:soft-page-break/><text:span text:style-name="T136">"12", "12.3", "0.23": With this definition, the whole numbers and decimals are recognized.<text:line-break/><text:line-break/><text:tab/>Note that the decimal-point character has been escaped, because the "." Character has special meaning in regular expressions.</text:span> </text:p>
      <text:p text:style-name="P159"/>
      <text:p text:style-name="P164"/>
      <text:list xml:id="list230306275991715" text:continue-numbering="true" text:style-name="WW8Num24">
        <text:list-item>
          <text:list>
            <text:list-item>
              <text:list>
                <text:list-item>
                  <text:h text:style-name="P258" text:outline-level="3">Tokens matching</text:h>
                </text:list-item>
              </text:list>
            </text:list-item>
          </text:list>
        </text:list-item>
      </text:list>
      <text:p text:style-name="P62"/>
      <text:p text:style-name="P30"><text:bookmark text:name="result_box43"/><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recognized.<text:line-break/><text:line-break/><text:tab/>That is why the above definition, can recognize both whole numbers as decimal numbers. But even recognize the value and number "123" because it also meets the definition in part, until: '[.\]'</text:p>
      <text:p text:style-name="P35"><text:span text:style-name="T7"><text:line-break/><text:tab/>If you want the full definition of the token is fulfilled to take the token, you must put the "Complete" parameter to TRUE:</text:span><text:span text:style-name="T1"> </text:span></text:p>
      <text:p text:style-name="P62"/>
      <text:p text:style-name="P62"> <text:span text:style-name="T24">  </text:span><text:span text:style-name="T56">hlt.DefTokContent</text:span><text:span text:style-name="T83">(</text:span><text:span text:style-name="T118">'[0</text:span><text:span text:style-name="T119">-</text:span><text:span text:style-name="T118">9]'</text:span><text:span text:style-name="T56">, </text:span><text:span text:style-name="T118">'[0</text:span><text:span text:style-name="T119">-</text:span><text:span text:style-name="T118">9]</text:span><text:span text:style-name="T119">*</text:span><text:span text:style-name="T118">\.[0</text:span><text:span text:style-name="T119">-</text:span><text:span text:style-name="T118">9]</text:span><text:span text:style-name="T119">+</text:span><text:span text:style-name="T118">'</text:span><text:span text:style-name="T56">, hlt.t</text:span><text:span text:style-name="T68">n</text:span><text:span text:style-name="T56">Number, </text:span><text:span text:style-name="T16">true</text:span><text:span text:style-name="T83">);</text:span></text:p>
      <text:p text:style-name="P62"> </text:p>
      <text:p text:style-name="P63"><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136">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7"><text:line-break/><text:tab/>For a token is fully recognized, with this definition, must necessarily include a decimal point.</text:p>
      <text:p text:style-name="P57"><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63"><text:span text:style-name="T7"><text:line-break/><text:tab/>It is generally recommended to work with the "Complete" parameter to FALSE, to avoid </text:span><text:soft-page-break/><text:span text:style-name="T7">unexpected results. If a better control of extracting tokens is desired, we recommend using the advanced definitions of tokens by content.</text:span><text:span text:style-name="T1"> </text:span></text:p>
      <text:p text:style-name="P62"/>
      <text:list xml:id="list230306567970096" text:continue-numbering="true" text:style-name="WW8Num24">
        <text:list-item>
          <text:list>
            <text:list-item>
              <text:list>
                <text:list-item>
                  <text:h text:style-name="P258" text:outline-level="3">Advanced definitions</text:h>
                </text:list-item>
              </text:list>
            </text:list-item>
          </text:list>
        </text:list-item>
      </text:list>
      <text:p text:style-name="P62"/>
      <text:p text:style-name="P8"><text:bookmark text:name="result_box45"/><text:span text:style-name="T136"><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9"/>
      <text:p text:style-name="P62"/>
      <text:p text:style-name="P146"><text:span text:style-name="T24"><text:s/></text:span><text:span text:style-name="T56">hlt.DefTokContent</text:span><text:span text:style-name="T83">(</text:span><text:span text:style-name="T118">'[0</text:span><text:span text:style-name="T119">-</text:span><text:span text:style-name="T118">9]'</text:span><text:span text:style-name="T56">, </text:span><text:span text:style-name="T118">'[0</text:span><text:span text:style-name="T119">-</text:span><text:span text:style-name="T118">9]</text:span><text:span text:style-name="T119">*</text:span><text:span text:style-name="T118">\.[0</text:span><text:span text:style-name="T119">-</text:span><text:span text:style-name="T118">9]+'</text:span><text:span text:style-name="T56">, hlt.t</text:span><text:span text:style-name="T69">n</text:span><text:span text:style-name="T56">Number</text:span><text:span text:style-name="T83">);</text:span></text:p>
      <text:p text:style-name="P62"/>
      <text:p text:style-name="P49"><text:tab/>This token can be expressed in the extended way:</text:p>
      <text:p text:style-name="P62"/>
      <text:p text:style-name="P146"><text:span text:style-name="T16">uses </text:span><text:span text:style-name="T56">... , SynFacilBasic</text:span><text:span text:style-name="T83">;</text:span></text:p>
      <text:p text:style-name="P137">var</text:p>
      <text:p text:style-name="P146"><text:span text:style-name="T24"><text:s/></text:span><text:span text:style-name="T56">p</text:span><text:span text:style-name="T83">:</text:span><text:span text:style-name="T24"> </text:span><text:span text:style-name="T56">tFaTokContent</text:span><text:span text:style-name="T83">;</text:span></text:p>
      <text:p text:style-name="P139">...</text:p>
      <text:p text:style-name="P146"><text:span text:style-name="T24"><text:s/></text:span><text:span text:style-name="T56">p </text:span><text:span text:style-name="T83">:=</text:span><text:span text:style-name="T24"> </text:span><text:span text:style-name="T56">hlt.DefTokContent</text:span><text:span text:style-name="T83">(</text:span><text:span text:style-name="T118">'[0</text:span><text:span text:style-name="T119">-</text:span><text:span text:style-name="T118">9]'</text:span><text:span text:style-name="T56">, hlt.t</text:span><text:span text:style-name="T69">n</text:span><text:span text:style-name="T56">Number</text:span><text:span text:style-name="T83">);</text:span></text:p>
      <text:p text:style-name="P146"><text:span text:style-name="T24"><text:s/></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83">);</text:span></text:p>
      <text:p text:style-name="P146"><text:span text:style-name="T24"><text:s/></text:span><text:span text:style-name="T56">p.AddInstruct</text:span><text:span text:style-name="T83">(</text:span><text:span text:style-name="T118">'\.'</text:span><text:span text:style-name="T83">);</text:span></text:p>
      <text:p text:style-name="P146"><text:span text:style-name="T24"><text:s/></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83">);</text:span></text:p>
      <text:p text:style-name="P140"/>
      <text:p text:style-name="P62"/>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oft-page-break/><text:span text:style-name="T136"><text:line-break/><text:tab/>The advantage of using the AddInstruc() method, to build the regular expression is further, we can add flow control instructions. Looking at the definition of AddInstruc(), we see:</text:span> </text:p>
      <text:p text:style-name="P63"/>
      <text:p text:style-name="P146"><text:span text:style-name="T16">procedure </text:span><text:span text:style-name="T57">tFaTokContent.AddInstruct</text:span><text:span text:style-name="T83">(</text:span><text:span text:style-name="T57">exp</text:span><text:span text:style-name="T83">:</text:span><text:span text:style-name="T57"> </text:span><text:span text:style-name="T16">string</text:span><text:span text:style-name="T83">;</text:span><text:span text:style-name="T57"> ifTrue</text:span><text:span text:style-name="T83">:</text:span><text:span text:style-name="T57"> </text:span><text:span text:style-name="T16">string</text:span><text:span text:style-name="T83">=</text:span><text:span text:style-name="T119">''</text:span><text:span text:style-name="T83">;</text:span><text:span text:style-name="T57"> </text:span></text:p>
      <text:p text:style-name="P151"><text:span text:style-name="T56"><text:s text:c="2"/>ifFalse</text:span><text:span text:style-name="T83">:</text:span><text:span text:style-name="T24"> </text:span><text:span text:style-name="T16">string</text:span><text:span text:style-name="T83">=</text:span><text:span text:style-name="T118">''</text:span><text:span text:style-name="T83">;</text:span></text:p>
      <text:p text:style-name="P151"><text:span text:style-name="T56"><text:s text:c="2"/>atMatch</text:span><text:span text:style-name="T83">:</text:span><text:span text:style-name="T24"> </text:span><text:span text:style-name="T67">integer</text:span><text:span text:style-name="T83">=</text:span><text:span text:style-name="T16">-</text:span><text:span text:style-name="T18">1</text:span><text:span text:style-name="T83">;</text:span><text:span text:style-name="T24"> </text:span></text:p>
      <text:p text:style-name="P151"><text:span text:style-name="T24"><text:s text:c="5"/></text:span><text:span text:style-name="T56">atFail </text:span><text:span text:style-name="T83">:</text:span><text:span text:style-name="T24"> </text:span><text:span text:style-name="T67">integer</text:span><text:span text:style-name="T83">=</text:span><text:span text:style-name="T16">-</text:span><text:span text:style-name="T18">1</text:span><text:span text:style-name="T83">);</text:span></text:p>
      <text:p text:style-name="P156"/>
      <text:p text:style-name="P62"/>
      <text:p text:style-name="P49"><text:tab/>The parameters “ifTrue” and “ifFalse”, are strings that allow us to add simple instructions to control the flow of the token extractions.</text:p>
      <text:p text:style-name="P62"/>
      <text:p text:style-name="P49"><text:tab/>The supported instructions are:</text:p>
      <text:p text:style-name="P52"/>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62"/>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136"><text:line-break/><text:tab/>An example of definition of tokens for content using instructions could be:</text:span> </text:p>
      <text:p text:style-name="P63"> </text:p>
      <text:p text:style-name="P146"><text:span text:style-name="T24">  </text:span><text:span text:style-name="T56">p </text:span><text:span text:style-name="T83">:=</text:span><text:span text:style-name="T24"> </text:span><text:span text:style-name="T56">hlt.DefTokContent</text:span><text:span text:style-name="T83">(</text:span><text:span text:style-name="T118">'[0</text:span><text:span text:style-name="T119">-</text:span><text:span text:style-name="T118">9]'</text:span><text:span text:style-name="T56">, hlt.t</text:span><text:span text:style-name="T69">n</text:span><text:span text:style-name="T56">Number</text:span><text:span text:style-name="T83">);</text:span></text:p>
      <text:p text:style-name="P146"><text:span text:style-name="T24">  </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83">);</text:span></text:p>
      <text:p text:style-name="P146"><text:span text:style-name="T24">  </text:span><text:span text:style-name="T56">p.AddInstruct</text:span><text:span text:style-name="T83">(</text:span><text:span text:style-name="T118">'\.'</text:span><text:span text:style-name="T56">,</text:span><text:span text:style-name="T83">);</text:span></text:p>
      <text:p text:style-name="P146"><text:span text:style-name="T24">  </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56">,</text:span><text:span text:style-name="T118">''</text:span><text:span text:style-name="T56">,</text:span><text:span text:style-name="T118">'exit</text:span><text:span text:style-name="T119">(-</text:span><text:span text:style-name="T118">1</text:span><text:span text:style-name="T119">)</text:span><text:span text:style-name="T118">'</text:span><text:span text:style-name="T83">);</text:span></text:p>
      <text:p text:style-name="P62"> </text:p>
      <text:p text:style-name="P30"><text:bookmark text:name="result_box49"/><text:soft-page-break/><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136"><text:line-break/><text:tab/>With this definition, it is possible to correctly recognize integer numbers and decimals. The following extraction cases apply to this definition:</text:span> </text:p>
      <text:p text:style-name="P62"/>
      <text:p text:style-name="P49">String = “1” <text:tab/><text:tab/>-&gt; Extract “1”</text:p>
      <text:p text:style-name="P49">String = “123” <text:tab/>-&gt; Extract “123”</text:p>
      <text:p text:style-name="P49">String = “123.” <text:tab/>-&gt; Extract “123”</text:p>
      <text:p text:style-name="P49">String = “123.0” <text:tab/>-&gt; Extract “123.0”</text:p>
      <text:p text:style-name="P62"/>
      <text:p text:style-name="P8"><text:bookmark text:name="result_box50"/><text:span text:style-name="T136"><text:tab/>The "move" instrcution, always includes a parameter that indicates the next instruction to be executed. If such an instruction is indicated as:</text:span> </text:p>
      <text:p text:style-name="P49"/>
      <text:p text:style-name="P62"/>
      <text:p text:style-name="P146"><text:span text:style-name="T24"><text:s text:c="2"/></text:span><text:span text:style-name="T56">p.AddInstruct</text:span><text:span text:style-name="T83">(</text:span><text:span text:style-name="T118">'hello'</text:span><text:span text:style-name="T56">,</text:span><text:span text:style-name="T118">'move(+2)'</text:span><text:span text:style-name="T56">,</text:span><text:span text:style-name="T118">'move</text:span><text:span text:style-name="T119">(-1)</text:span><text:span text:style-name="T118">'</text:span><text:span text:style-name="T83">);</text:span></text:p>
      <text:p text:style-name="P62"/>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136"><text:line-break/><text:tab/>The following example shows how we can write a definition for recognizing integer, decimal and scientific notation numbers in the same definition of token:</text:span> </text:p>
      <text:p text:style-name="P50"/>
      <text:p text:style-name="P146"><text:span text:style-name="T24">  </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83">);</text:span></text:p>
      <text:p text:style-name="P146"><text:span text:style-name="T24">  </text:span><text:span text:style-name="T56">p.AddInstruct</text:span><text:span text:style-name="T83">(</text:span><text:span text:style-name="T118">'[\.]'</text:span><text:span text:style-name="T56">,</text:span><text:span text:style-name="T118">''</text:span><text:span text:style-name="T56">,</text:span><text:span text:style-name="T118">'move</text:span><text:span text:style-name="T119">(+</text:span><text:span text:style-name="T118">2</text:span><text:span text:style-name="T119">)</text:span><text:span text:style-name="T118">'</text:span><text:span text:style-name="T83">);</text:span></text:p>
      <text:p text:style-name="P146"><text:span text:style-name="T24">  </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56">,</text:span><text:span text:style-name="T118">''</text:span><text:span text:style-name="T56">,</text:span><text:span text:style-name="T118">'exit</text:span><text:span text:style-name="T119">(-</text:span><text:span text:style-name="T118">1</text:span><text:span text:style-name="T119">)</text:span><text:span text:style-name="T118">'</text:span><text:span text:style-name="T83">);</text:span></text:p>
      <text:p text:style-name="P146"><text:soft-page-break/><text:span text:style-name="T24">  </text:span><text:span text:style-name="T56">p.AddInstruct</text:span><text:span text:style-name="T83">(</text:span><text:span text:style-name="T118">'[eE]'</text:span><text:span text:style-name="T83">);</text:span></text:p>
      <text:p text:style-name="P146"><text:span text:style-name="T24">  </text:span><text:span text:style-name="T56">p.AddInstruct</text:span><text:span text:style-name="T83">(</text:span><text:span text:style-name="T118">'[</text:span><text:span text:style-name="T119">+-</text:span><text:span text:style-name="T118">]?'</text:span><text:span text:style-name="T83">);</text:span></text:p>
      <text:p text:style-name="P146"><text:span text:style-name="T24">  </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56">,</text:span><text:span text:style-name="T118">''</text:span><text:span text:style-name="T56">,</text:span><text:span text:style-name="T118">'exit</text:span><text:span text:style-name="T119">(-</text:span><text:span text:style-name="T118">2</text:span><text:span text:style-name="T119">)</text:span><text:span text:style-name="T118">'</text:span><text:span text:style-name="T83">);</text:span></text:p>
      <text:p text:style-name="P62"/>
      <text:p text:style-name="P49"><text:tab/>This definition will recognize correctly, the forms:</text:p>
      <text:p text:style-name="P62"/>
      <text:p text:style-name="P62">“<text:span text:style-name="T1">1”</text:span></text:p>
      <text:p text:style-name="P62">“<text:span text:style-name="T1">12”</text:span></text:p>
      <text:p text:style-name="P62">“<text:span text:style-name="T1">1e2”</text:span></text:p>
      <text:p text:style-name="P62">“<text:span text:style-name="T1">1e+2”</text:span></text:p>
      <text:p text:style-name="P62">“<text:span text:style-name="T1">1.23”</text:span></text:p>
      <text:p text:style-name="P62">“<text:span text:style-name="T1">1.23e-5”</text:span></text:p>
      <text:p text:style-name="P62"/>
      <text:p text:style-name="P49"><text:tab/>But will reject these incomplete forms:</text:p>
      <text:p text:style-name="P62"/>
      <text:p text:style-name="P49">1.”<text:tab/><text:tab/>-&gt; Only extracts “1”</text:p>
      <text:p text:style-name="P49">1e”<text:tab/><text:tab/>-&gt; Only extracts “1”</text:p>
      <text:p text:style-name="P62">“<text:span text:style-name="T1">1.23e”<text:tab/>-&gt; Only extracts “1.23”</text:span></text:p>
      <text:p text:style-name="P49">1.23e+”<text:tab/>-&gt; Only extracts “1.23”</text:p>
      <text:p text:style-name="P62"/>
      <text:p text:style-name="P49">This definition will behave better that the common definition:</text:p>
      <text:p text:style-name="P62"/>
      <text:p text:style-name="P146"><text:span text:style-name="T24"><text:s/></text:span><text:span text:style-name="T56">hlt.DefTokContent</text:span><text:span text:style-name="T83">(</text:span><text:span text:style-name="T118">'[0</text:span><text:span text:style-name="T119">-</text:span><text:span text:style-name="T118">9]'</text:span><text:span text:style-name="T56">, </text:span><text:span text:style-name="T118">'[0</text:span><text:span text:style-name="T119">-</text:span><text:span text:style-name="T118">9]</text:span><text:span text:style-name="T119">*</text:span><text:span text:style-name="T118">[\.][0</text:span><text:span text:style-name="T119">-</text:span><text:span text:style-name="T118">9]</text:span><text:span text:style-name="T119">+</text:span><text:span text:style-name="T118">[eE][</text:span><text:span text:style-name="T119">+-</text:span><text:span text:style-name="T118">]?[0</text:span><text:span text:style-name="T119">-</text:span><text:span text:style-name="T118">9]</text:span><text:span text:style-name="T119">+</text:span><text:span text:style-name="T118">'</text:span><text:span text:style-name="T83">);</text:span></text:p>
      <text:p text:style-name="P62"/>
      <text:p text:style-name="P49"><text:tab/>Because, this last definition will recognize too, the strings <text:s/>“1.” o “1e”.</text:p>
      <text:p text:style-name="P49"/>
      <text:p text:style-name="P49"><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9"/>
      <text:p text:style-name="P49"><text:tab/>In the following code, we modify the previous example to differentiate integer from decimal numbers, verifying whether or not the decimal point:</text:p>
      <text:p text:style-name="P62"/>
      <text:p text:style-name="P151"><text:span text:style-name="T24">  </text:span><text:span text:style-name="T56">p </text:span><text:span text:style-name="T83">:=</text:span><text:span text:style-name="T24"> </text:span><text:span text:style-name="T56">hlt.DefTokContent</text:span><text:span text:style-name="T83">(</text:span><text:span text:style-name="T118">'[0</text:span><text:span text:style-name="T119">-</text:span><text:span text:style-name="T118">9]'</text:span><text:span text:style-name="T56">, hlt.t</text:span><text:span text:style-name="T67">n</text:span><text:span text:style-name="T56">Number</text:span><text:span text:style-name="T83">);</text:span></text:p>
      <text:p text:style-name="P151"><text:span text:style-name="T24">  </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83">);</text:span></text:p>
      <text:p text:style-name="P151"><text:span text:style-name="T24">  </text:span><text:span text:style-name="T56">p.AddInstruct</text:span><text:span text:style-name="T83">(</text:span><text:span text:style-name="T118">'\.'</text:span><text:span text:style-name="T83">);</text:span></text:p>
      <text:p text:style-name="P151"><text:span text:style-name="T24">  </text:span><text:span text:style-name="T56">p.AddInstruct</text:span><text:span text:style-name="T83">(</text:span><text:span text:style-name="T118">'[0</text:span><text:span text:style-name="T119">-</text:span><text:span text:style-name="T118">9]</text:span><text:span text:style-name="T119">+</text:span><text:span text:style-name="T118">'</text:span><text:span text:style-name="T56">,</text:span><text:span text:style-name="T118">''</text:span><text:span text:style-name="T56">,</text:span><text:span text:style-name="T118">'exit</text:span><text:span text:style-name="T119">(-</text:span><text:span text:style-name="T118">1</text:span><text:span text:style-name="T119">)</text:span><text:span text:style-name="T118">'</text:span><text:span text:style-name="T56">, t</text:span><text:span text:style-name="T67">n</text:span><text:span text:style-name="T56">Decimal</text:span><text:span text:style-name="T83">);</text:span></text:p>
      <text:p text:style-name="P51"/>
      <text:p text:style-name="P10"><text:bookmark text:name="result_box68"/><text:soft-page-break/><text:span text:style-name="T136"><text:tab/>What we do here, is tell the highlighter if the last statement is true, will end with the t</text:span><text:span text:style-name="T137">n</text:span><text:span text:style-name="T136">Decimal attribute, instead of t</text:span><text:span text:style-name="T137">n</text:span><text:span text:style-name="T136">Number. We are assuming that the t</text:span><text:span text:style-name="T137">n</text:span><text:span text:style-name="T136">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62"/>
      <text:p text:style-name="P62"/>
      <text:p text:style-name="P62"/>
      <text:p text:style-name="P62"/>
      <text:p text:style-name="P72"/>
      <text:list xml:id="list230306430000960" text:continue-numbering="true" text:style-name="WW8Num24">
        <text:list-item>
          <text:list>
            <text:list-item>
              <text:h text:style-name="P246" text:outline-level="2"><text:bookmark-start text:name="__RefHeading___Toc404419502"/>Special Symbols<text:bookmark-end text:name="__RefHeading___Toc404419502"/></text:h>
            </text:list-item>
          </text:list>
        </text:list-item>
      </text:list>
      <text:p text:style-name="P75"/>
      <text:p text:style-name="P75">The special symbols can be added by code using the AddSymbSpec() method, as shown in the following example:</text:p>
      <text:p text:style-name="P75"/>
      <text:p text:style-name="P117"><text:span text:style-name="T38"><text:s text:c="2"/></text:span><text:span text:style-name="T26">hlt.AddSymbSpec</text:span><text:span text:style-name="T79">(</text:span><text:span text:style-name="T114">'</text:span><text:span text:style-name="T115">+</text:span><text:span text:style-name="T114">'</text:span><text:span text:style-name="T26">, </text:span><text:span text:style-name="T30">tn</text:span><text:span text:style-name="T26">Operator</text:span><text:span text:style-name="T79">);</text:span></text:p>
      <text:p text:style-name="P123"/>
      <text:p text:style-name="P75"/>
      <text:p text:style-name="P75">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5"/>
      <text:p text:style-name="P75">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5"/>
      <text:p text:style-name="P75">The second parameter is the type of token. It can be one of the predefined or any other that we have created. In this example, we assume that we have created the "t<text:span text:style-name="T155">n</text:span>Operator" type. </text:p>
      <text:p text:style-name="P75"/>
      <text:p text:style-name="P15"><text:tab/>Type can be assigned to special tokens. The following example creates the special symbol "+A" to <text:span text:style-name="T154">the type</text:span> t<text:span text:style-name="T154">n</text:span>String:</text:p>
      <text:p text:style-name="P15"/>
      <text:p text:style-name="P117"><text:span text:style-name="T38"><text:s text:c="2"/></text:span><text:span text:style-name="T26">hlt.CaseSensitive </text:span><text:span text:style-name="T79">: =</text:span><text:span text:style-name="T26"> </text:span><text:span text:style-name="T11">true</text:span><text:span text:style-name="T79">;</text:span></text:p>
      <text:p text:style-name="P117"><text:span text:style-name="T38"><text:s text:c="2"/></text:span><text:span text:style-name="T26">hlt.AddSymbSpec</text:span><text:span text:style-name="T79">(</text:span><text:span text:style-name="T114">'</text:span><text:span text:style-name="T115">+</text:span><text:span text:style-name="T114">A'</text:span><text:span text:style-name="T26">, hlt.t</text:span><text:span text:style-name="T30">n</text:span><text:span text:style-name="T26">String</text:span><text:span text:style-name="T79">);</text:span></text:p>
      <text:p text:style-name="P123"/>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74"><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128"><text:s/></text:span>ClearSpecials () also removes the special identifiers. So be executed before creating both special identifiers special symbols.</text:p></text:note-body></text:note></text:span></text:span><text:span text:style-name="T6">:</text:span></text:p>
      <text:p text:style-name="P75"/>
      <text:p text:style-name="P117"><text:soft-page-break/><text:span text:style-name="T38"><text:s text:c="2"/></text:span><text:span text:style-name="T26">hlt.ClearSpecials</text:span><text:span text:style-name="T79">;</text:span><text:span text:style-name="T26"> </text:span><text:span text:style-name="T92">//</text:span><text:span text:style-name="T96">clean identifiers and special symbols</text:span></text:p>
      <text:p text:style-name="P117"><text:span text:style-name="T38"><text:s text:c="2"/></text:span><text:span text:style-name="T26">...</text:span></text:p>
      <text:p text:style-name="P117"><text:span text:style-name="T38"><text:s text:c="2"/></text:span><text:span text:style-name="T26">hlt.AddSymbSpec</text:span><text:span text:style-name="T79">(</text:span><text:span text:style-name="T114">'</text:span><text:span text:style-name="T115">+</text:span><text:span text:style-name="T114">'</text:span><text:span text:style-name="T26">, </text:span><text:span text:style-name="T30">tn</text:span><text:span text:style-name="T26">Operator</text:span><text:span text:style-name="T79">);</text:span></text:p>
      <text:p text:style-name="P117"><text:span text:style-name="T38"><text:s text:c="2"/></text:span><text:span text:style-name="T26">hlt.AddSymbSpec</text:span><text:span text:style-name="T79">(</text:span><text:span text:style-name="T114">'</text:span><text:span text:style-name="T115">-</text:span><text:span text:style-name="T114">'</text:span><text:span text:style-name="T26">, </text:span><text:span text:style-name="T30">tn</text:span><text:span text:style-name="T26">Operator</text:span><text:span text:style-name="T79">);</text:span></text:p>
      <text:p text:style-name="P117"><text:span text:style-name="T38"><text:s text:c="2"/></text:span><text:span text:style-name="T26">...</text:span></text:p>
      <text:p text:style-name="P117"><text:span text:style-name="T38"><text:s text:c="2"/></text:span><text:span text:style-name="T26">hlt.Rebuild</text:span><text:span text:style-name="T79">;</text:span><text:span text:style-name="T26"> </text:span><text:span text:style-name="T92">//</text:span><text:span text:style-name="T96">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5">As is standard practice to always make Rebuild() at the end of the language definition.</text:p>
      <text:p text:style-name="P15"/>
      <text:p text:style-name="P75">The AddSymbSpec() method lets you add special symbols, one by one. To add multiple symbols in a group must use the AddSymbSpecList () method:</text:p>
      <text:p text:style-name="P75"/>
      <text:p text:style-name="P117"><text:span text:style-name="T38"><text:s text:c="2"/></text:span><text:span text:style-name="T26">hlt.ClearSpecials</text:span><text:span text:style-name="T79">;</text:span></text:p>
      <text:p text:style-name="P117"><text:span text:style-name="T38"><text:s text:c="2"/></text:span><text:span text:style-name="T26">...</text:span></text:p>
      <text:p text:style-name="P117"><text:span text:style-name="T38"><text:s text:c="2"/></text:span><text:span text:style-name="T26">hlt.AddSymbSpecList</text:span><text:span text:style-name="T79">(</text:span><text:span text:style-name="T114">'+ - * / &lt;&gt; =: ='</text:span><text:span text:style-name="T26">, </text:span><text:span text:style-name="T30">tn</text:span><text:span text:style-name="T26">Operator</text:span><text:span text:style-name="T79">);</text:span></text:p>
      <text:p text:style-name="P75"/>
      <text:p text:style-name="P75">The symbols on the list must be separated by at least one blank. Therefore, this definition does not allow you to create special symbols including the space character.</text:p>
      <text:p text:style-name="P75"/>
      <text:p text:style-name="P75">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17"><text:span text:style-name="T11">procedure </text:span><text:span text:style-name="T26">AddSymbSpec</text:span><text:span text:style-name="T79">(</text:span><text:span text:style-name="T26">symb</text:span><text:span text:style-name="T79">:</text:span><text:span text:style-name="T26"> </text:span><text:span text:style-name="T11">string</text:span><text:span text:style-name="T79">;</text:span><text:span text:style-name="T26"> tokTyp</text:span><text:span text:style-name="T79">:</text:span><text:span text:style-name="T26"> </text:span><text:span text:style-name="T27">integer</text:span><text:span text:style-name="T79">;</text:span><text:span text:style-name="T26"> </text:span></text:p>
      <text:p text:style-name="P117"><text:span text:style-name="T38"><text:s text:c="22"/></text:span><text:span text:style-name="T26">TokPos</text:span><text:span text:style-name="T79">:</text:span><text:span text:style-name="T26"> integer</text:span><text:span text:style-name="T79">=</text:span><text:span text:style-name="T26">0</text:span><text:span text:style-name="T79">);</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17"><text:span text:style-name="T38"><text:s text:c="2"/></text:span><text:span text:style-name="T26">hlt.AddSymbSpec</text:span><text:span text:style-name="T79">(</text:span><text:span text:style-name="T114">'.'</text:span><text:span text:style-name="T26">, hlt.t</text:span><text:span text:style-name="T30">n</text:span><text:span text:style-name="T26">Keyword 1</text:span><text:span text:style-name="T79">);</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7"><text:span text:style-name="T38"><text:s text:c="2"/></text:span><text:span text:style-name="T26">hlt.AddIdentSpec</text:span><text:span text:style-name="T79">(</text:span><text:span text:style-name="T114">'.'</text:span><text:span text:style-name="T26">, </text:span><text:span text:style-name="T30">h</text:span><text:span text:style-name="T26">lt.t</text:span><text:span text:style-name="T30">n</text:span><text:span text:style-name="T26">Keyword, 1</text:span><text:span text:style-name="T79">);</text:span></text:p>
      <text:p text:style-name="P117"><text:span text:style-name="T38"><text:s text:c="2"/></text:span><text:span text:style-name="T26">hlt.AddIdentSpec</text:span><text:span text:style-name="T79">(</text:span><text:span text:style-name="T114">'.'</text:span><text:span text:style-name="T26">, </text:span><text:span text:style-name="T30">h</text:span><text:span text:style-name="T26">lt.t</text:span><text:span text:style-name="T30">n</text:span><text:span text:style-name="T26">Keyword, 2</text:span><text:span text:style-name="T79">);</text:span></text:p>
      <text:p text:style-name="P15"/>
      <text:p text:style-name="P15"><text:tab/>However, if the following definition will fail, since there is a crossing in the definitions:</text:p>
      <text:p text:style-name="P15"/>
      <text:p text:style-name="P117"><text:span text:style-name="T38"><text:s text:c="2"/></text:span><text:span text:style-name="T26">hlt.AddIdentSpec</text:span><text:span text:style-name="T79">(</text:span><text:span text:style-name="T114">'.'</text:span><text:span text:style-name="T26">, </text:span><text:span text:style-name="T30">h</text:span><text:span text:style-name="T26">lt.t</text:span><text:span text:style-name="T30">n</text:span><text:span text:style-name="T26">Keyword, 1</text:span><text:span text:style-name="T79">);</text:span></text:p>
      <text:p text:style-name="P117"><text:span text:style-name="T38"><text:s text:c="2"/></text:span><text:span text:style-name="T26">hlt.AddIdentSpec</text:span><text:span text:style-name="T79">(</text:span><text:span text:style-name="T114">'.'</text:span><text:span text:style-name="T26">, </text:span><text:span text:style-name="T30">h</text:span><text:span text:style-name="T26">lt.t</text:span><text:span text:style-name="T30">n</text:span><text:span text:style-name="T26">Keyword</text:span><text:span text:style-name="T79">);</text:span></text:p>
      <text:p text:style-name="P15"/>
      <text:p text:style-name="P15"/>
      <text:list xml:id="list230306177457813" text:continue-numbering="true" text:style-name="WW8Num24">
        <text:list-item>
          <text:list>
            <text:list-item>
              <text:h text:style-name="P246" text:outline-level="2"><text:bookmark-start text:name="__RefHeading___Toc404419503"/>Definition of Delimited Tokens<text:bookmark-end text:name="__RefHeading___Toc404419503"/></text:h>
            </text:list-item>
          </text:list>
        </text:list-item>
      </text:list>
      <text:p text:style-name="P15"/>
      <text:p text:style-name="P75">Defined with DefTokDelim() method, which has the following declaration:</text:p>
      <text:p text:style-name="P159"/>
      <text:p text:style-name="P151"><text:span text:style-name="T24"><text:s/></text:span><text:span text:style-name="T16">procedure </text:span><text:span text:style-name="T56">DefTokDelim</text:span><text:span text:style-name="T83">(</text:span><text:span text:style-name="T56">dStart, dEnd</text:span><text:span text:style-name="T83">:</text:span><text:span text:style-name="T24"> </text:span><text:span text:style-name="T16">string</text:span><text:span text:style-name="T83">;</text:span><text:span text:style-name="T24"> </text:span></text:p>
      <text:p text:style-name="P151"><text:span text:style-name="T24"><text:s text:c="3"/></text:span><text:span text:style-name="T56">tokTyp</text:span><text:span text:style-name="T83">:</text:span><text:span text:style-name="T24"> </text:span><text:span text:style-name="T67">integer</text:span><text:span text:style-name="T83">;</text:span></text:p>
      <text:p text:style-name="P151"><text:span text:style-name="T24"><text:s text:c="3"/></text:span><text:span text:style-name="T56">typDel</text:span><text:span text:style-name="T83">:</text:span><text:span text:style-name="T24"> </text:span><text:span text:style-name="T56">TFaTypeDel</text:span><text:span text:style-name="T83">=</text:span><text:span text:style-name="T56">tdUniLin</text:span><text:span text:style-name="T83">;</text:span><text:span text:style-name="T24"> </text:span><text:span text:style-name="T56">havFolding</text:span><text:span text:style-name="T83">:</text:span><text:span text:style-name="T24"> </text:span><text:span text:style-name="T56">boolean</text:span><text:span text:style-name="T83">=</text:span><text:span text:style-name="T16">false</text:span><text:span text:style-name="T83">;</text:span></text:p>
      <text:p text:style-name="P151"><text:span text:style-name="T24"><text:s text:c="3"/></text:span><text:span text:style-name="T56">chrEscape</text:span><text:span text:style-name="T83">:</text:span><text:span text:style-name="T24"> </text:span><text:span text:style-name="T56">char</text:span><text:span text:style-name="T83">=</text:span><text:span text:style-name="T56">#0</text:span><text:span text:style-name="T83">);</text:span></text:p>
      <text:p text:style-name="P114"/>
      <text:p text:style-name="P75"/>
      <text:p text:style-name="P75">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5"><text:soft-page-break/></text:p>
      <text:p text:style-name="P75">A simple case for string definition would be:</text:p>
      <text:p text:style-name="P75"/>
      <text:p text:style-name="P117"><text:span text:style-name="T38"><text:s text:c="2"/></text:span><text:span text:style-name="T26">hl </text:span><text:span text:style-name="T79">: =</text:span><text:span text:style-name="T26"> TSynFacilSyn.Create</text:span><text:span text:style-name="T79">(</text:span><text:span text:style-name="T11">nil</text:span><text:span text:style-name="T79">);</text:span></text:p>
      <text:p text:style-name="P117"><text:span text:style-name="T38"><text:s text:c="2"/></text:span><text:span text:style-name="T26">SynEdit1.Highlighter </text:span><text:span text:style-name="T79">: =</text:span><text:span text:style-name="T26"> hl</text:span><text:span text:style-name="T79">;</text:span></text:p>
      <text:p text:style-name="P117"><text:span text:style-name="T38"><text:s text:c="2"/></text:span><text:span text:style-name="T26">hl.DefTokDelim</text:span><text:span text:style-name="T79">(</text:span><text:span text:style-name="T114">'"'</text:span><text:span text:style-name="T26">,</text:span><text:span text:style-name="T114">'"'</text:span><text:span text:style-name="T26">, </text:span><text:span text:style-name="T31">h</text:span><text:span text:style-name="T26">l.t</text:span><text:span text:style-name="T31">n</text:span><text:span text:style-name="T26">String</text:span><text:span text:style-name="T79">);</text:span></text:p>
      <text:p text:style-name="P117"><text:span text:style-name="T38"><text:s text:c="2"/></text:span><text:span text:style-name="T26">hl.Rebuild</text:span><text:span text:style-name="T79">;</text:span></text:p>
      <text:p text:style-name="P123">...</text:p>
      <text:p text:style-name="P75"/>
      <text:p text:style-name="P75">The Rebuild () method, must be run, always, after entering all tokens delimited, otherwise the definition will not effect.</text:p>
      <text:p text:style-name="P75"/>
      <text:p text:style-name="P75">This statement, assigns the "tkString" attribute to the string that is between single quotes, including the single quotes.</text:p>
      <text:p text:style-name="P75"/>
      <text:p text:style-name="P75">If we want the strings can be extended for more than one line and also can fold, the following code will work:</text:p>
      <text:p text:style-name="P75"/>
      <text:p text:style-name="P123">...</text:p>
      <text:p text:style-name="P117"><text:span text:style-name="T38"><text:s text:c="2"/></text:span><text:span text:style-name="T26">hl.DefTokDelim</text:span><text:span text:style-name="T79">(</text:span><text:span text:style-name="T114">'"'</text:span><text:span text:style-name="T26">,</text:span><text:span text:style-name="T114">'"'</text:span><text:span text:style-name="T26">, </text:span><text:span text:style-name="T31">hl</text:span><text:span text:style-name="T26">.t</text:span><text:span text:style-name="T31">n</text:span><text:span text:style-name="T26">String, tdMulLin, </text:span><text:span text:style-name="T11">true</text:span><text:span text:style-name="T79">);</text:span></text:p>
      <text:p text:style-name="P117"><text:span text:style-name="T38"><text:s text:c="2"/></text:span><text:span text:style-name="T26">hl.Rebuild</text:span><text:span text:style-name="T79">;</text:span></text:p>
      <text:p text:style-name="P123">...</text:p>
      <text:p text:style-name="P75"/>
      <text:p text:style-name="P75">A text with this highlighter, could be shown as follows:</text:p>
      <text:p text:style-name="P75"/>
      <text:p text:style-name="P92"><draw:frame draw:style-name="fr4" draw:name="Image20" text:anchor-type="as-char" svg:width="8.387cm" svg:height="4.921cm" draw:z-index="69"><draw:image xlink:href="Pictures/100000000000013D000000BA6AACCF32B3559A8D.png" xlink:type="simple" xlink:show="embed" xlink:actuate="onLoad"/></draw:frame></text:p>
      <text:p text:style-name="P75"/>
      <text:p text:style-name="P75">The code folding option is only valid when multi-line tokens are handled. </text:p>
      <text:p text:style-name="P75"/>
      <text:p text:style-name="P75">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5"><text:soft-page-break/></text:p>
      <text:p text:style-name="P123">...</text:p>
      <text:p text:style-name="P117"><text:span text:style-name="T38"><text:s text:c="2"/></text:span><text:span text:style-name="T26">hl.DefTokDelim</text:span><text:span text:style-name="T79">(</text:span><text:span text:style-name="T114">'"'</text:span><text:span text:style-name="T26">,</text:span><text:span text:style-name="T114">'"'</text:span><text:span text:style-name="T26">, </text:span><text:span text:style-name="T31">h</text:span><text:span text:style-name="T26">l.t</text:span><text:span text:style-name="T31">n</text:span><text:span text:style-name="T26">String</text:span><text:span text:style-name="T79">);</text:span></text:p>
      <text:p text:style-name="P117"><text:span text:style-name="T38"><text:s text:c="2"/></text:span><text:span text:style-name="T26">hl.DefTokDelim</text:span><text:span text:style-name="T79">(</text:span><text:span text:style-name="T114">'//'</text:span><text:span text:style-name="T96">,</text:span><text:span text:style-name="T114">''</text:span><text:span text:style-name="T96">,</text:span><text:span text:style-name="T26">hl</text:span><text:span text:style-name="T96">.</text:span><text:span text:style-name="T26">t</text:span><text:span text:style-name="T31">n</text:span><text:span text:style-name="T26">Comment</text:span><text:span text:style-name="T79">)</text:span><text:span text:style-name="T92">;</text:span></text:p>
      <text:p text:style-name="P117"><text:span text:style-name="T38"><text:s text:c="2"/></text:span><text:span text:style-name="T26">hl.Rebuild</text:span><text:span text:style-name="T79">;</text:span></text:p>
      <text:p text:style-name="P123">...</text:p>
      <text:p text:style-name="P75"/>
      <text:p text:style-name="P75">The attributes that can be assigned, are all who has defined the highlighter or any other <text:s/>created.</text:p>
      <text:p text:style-name="P75"/>
      <text:p text:style-name="P75">You can define as many delimited tokens as you want, considering that more of them, the greater the processing that should do the highlighter. The tokens with a character delimiters are those that are processed faster.</text:p>
      <text:p text:style-name="P75"/>
      <text:p text:style-name="P15"><text:tab/>Strings and comments are classic examples of delimited tokens.</text:p>
      <text:p text:style-name="P15"/>
      <text:p text:style-name="P75">When defining delimited tokens, should be considered that a token delimiter is not the same delimiter for another token. Otherwise an internal error is generated and the definition, that conflicts will be ignored.</text:p>
      <text:p text:style-name="P75"/>
      <text:p text:style-name="P91"><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5"/>
      <text:p text:style-name="P75">An example of delimited token, using identifiers can be:</text:p>
      <text:p text:style-name="P75"/>
      <text:p text:style-name="P117"><text:span text:style-name="T38"><text:s text:c="2"/></text:span><text:span text:style-name="T26">hl.DefTokDelim</text:span><text:span text:style-name="T79">(</text:span><text:span text:style-name="T114">'REM'</text:span><text:span text:style-name="T96">,</text:span><text:span text:style-name="T114">''</text:span><text:span text:style-name="T96">,</text:span><text:span text:style-name="T26">hl.t</text:span><text:span text:style-name="T31">n</text:span><text:span text:style-name="T26">Comment</text:span><text:span text:style-name="T79">)</text:span><text:span text:style-name="T92">;</text:span></text:p>
      <text:p text:style-name="P75"/>
      <text:p text:style-name="P75">This syntax is for comments in the language of DOS Batch files, starting with the keyword REM and extend to the end of the line.</text:p>
      <text:p text:style-name="P75"/>
      <text:list xml:id="list230305538204451" text:continue-numbering="true" text:style-name="WW8Num24">
        <text:list-item>
          <text:list>
            <text:list-item>
              <text:list>
                <text:list-item>
                  <text:h text:style-name="P252" text:outline-level="2"><text:bookmark-start text:name="__RefHeading__27880_2030348867"/>Escape character<text:bookmark-end text:name="__RefHeading__27880_2030348867"/></text:h>
                </text:list-item>
              </text:list>
            </text:list-item>
          </text:list>
        </text:list-item>
      </text:list>
      <text:p text:style-name="P84"><text:line-break/><text:tab/>The "chrEscape" parameter allows you to specify a special character to be used as an escape character for delimited tokens. The following code shows how to define the "\" as an escape character for a string definition.</text:p>
      <text:p text:style-name="P84"/>
      <text:p text:style-name="P151"><text:span text:style-name="T24"><text:s text:c="3"/></text:span><text:span text:style-name="T56">hlt.DefTokDelim</text:span><text:span text:style-name="T83">(</text:span><text:span text:style-name="T118">'"'</text:span><text:span text:style-name="T56">,</text:span><text:span text:style-name="T118">'"'</text:span><text:span text:style-name="T56">, hlt.t</text:span><text:span text:style-name="T70">n</text:span><text:span text:style-name="T56">String, tdMulLin, </text:span><text:span text:style-name="T16">false</text:span><text:span text:style-name="T56">, </text:span><text:span text:style-name="T118">'\'</text:span><text:span text:style-name="T83">);</text:span></text:p>
      <text:p text:style-name="P84"/>
      <text:p text:style-name="P75"><text:soft-page-break/><text:span text:style-name="T136"><text:line-break/><text:tab/>For definitions, with an escape character, take effect, observe that the start and end delimiters must be equal and of one character wide.</text:span> </text:p>
      <text:p text:style-name="P75"/>
      <text:list xml:id="list230305369047926" text:continue-numbering="true" text:style-name="WW8Num24">
        <text:list-item>
          <text:list>
            <text:list-item>
              <text:h text:style-name="P246" text:outline-level="2"><text:bookmark-start text:name="__RefHeading___Toc404419504"/>Considerations of delimited tokens<text:bookmark-end text:name="__RefHeading___Toc404419504"/></text:h>
            </text:list-item>
          </text:list>
        </text:list-item>
      </text:list>
      <text:p text:style-name="P75"/>
      <text:p text:style-name="P85"><text:bookmark text:name="result_box52"/>When symbols are used, it should be noted that the "dStart" and "dEnd" parameters are receive</text:p>
      <text:p text:style-name="P77"><text:span text:style-name="T136">d in the form of regular expressions, with the limitation that "dStart" can only be a string literal or a simple list of characters, and "dEnd" can only be string literal. The following example defines a string beginning with quotes or the character "#":</text:span> </text:p>
      <text:p text:style-name="P63"> </text:p>
      <text:p text:style-name="P146"><text:span text:style-name="T24">  </text:span><text:span text:style-name="T56">hl.DefTokDelim</text:span><text:span text:style-name="T83">(</text:span><text:span text:style-name="T118">'["#]'</text:span><text:span text:style-name="T56">,</text:span><text:span text:style-name="T118">'"'</text:span><text:span text:style-name="T56">,hl.t</text:span><text:span text:style-name="T70">n</text:span><text:span text:style-name="T56">String</text:span><text:span text:style-name="T83">);</text:span></text:p>
      <text:p text:style-name="P63"> </text:p>
      <text:p text:style-name="P9"><text:bookmark text:name="result_box53"/><text:span text:style-name="T136"><text:tab/>Moreover, as the characters "*", "?", "+", "." And "\" have special meaning in regular expressions must be escaped. So to define C style comments (/ * ... * /) would:</text:span> </text:p>
      <text:p text:style-name="P63"/>
      <text:p text:style-name="P146"><text:span text:style-name="T24">  </text:span><text:span text:style-name="T56">hl.DefTokDelim</text:span><text:span text:style-name="T83">(</text:span><text:span text:style-name="T118">'</text:span><text:span text:style-name="T119">/</text:span><text:span text:style-name="T118">\</text:span><text:span text:style-name="T119">*</text:span><text:span text:style-name="T118">'</text:span><text:span text:style-name="T56">,</text:span><text:span text:style-name="T118">'\</text:span><text:span text:style-name="T119">*/</text:span><text:span text:style-name="T118">'</text:span><text:span text:style-name="T56">, hl.t</text:span><text:span text:style-name="T70">n</text:span><text:span text:style-name="T56">Comment, tdMulLin</text:span><text:span text:style-name="T83">);</text:span></text:p>
      <text:p text:style-name="P63">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136"><text:line-break/><text:tab/>The following statement defines a token string from two identifiers:</text:span> </text:p>
      <text:p text:style-name="P53"/>
      <text:p text:style-name="P117"><text:span text:style-name="T38"><text:s text:c="2"/></text:span><text:span text:style-name="T26">hl.DefTokDelim</text:span><text:span text:style-name="T79">(</text:span><text:span text:style-name="T114">'Start'</text:span><text:span text:style-name="T26">,</text:span><text:span text:style-name="T114">'End'</text:span><text:span text:style-name="T26">, </text:span><text:span text:style-name="T32">h</text:span><text:span text:style-name="T26">l.t</text:span><text:span text:style-name="T32">n</text:span><text:span text:style-name="T26">String, tdMulLin</text:span><text:span text:style-name="T79">);</text:span></text:p>
      <text:p text:style-name="P75"/>
      <text:p text:style-name="P75">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5"/>
      <text:p text:style-name="P75">If the token "Start" has already been defined before, as a special token, its attribute is ignored and becomes a delimiter token. If it had not defined, it will be defined when creating the delimited token.</text:p>
      <text:p text:style-name="P75"/>
      <text:p text:style-name="P75"><text:soft-page-break/>The token "End" is not created or updated as a special token. The search routines will find the identifier "End", by other means, without having to exist as a special token.</text:p>
      <text:p text:style-name="P75"/>
      <text:p text:style-name="P91"><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5"/>
      <text:p text:style-name="P75">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5"/>
      <text:p text:style-name="P75">When a multi-line token is created, there is the option to enable or code folding. And there is no greater difference in tokens with or without folding, except for the fold mark that appears when you create with code folding. </text:p>
      <text:p text:style-name="P75"/>
      <text:p text:style-name="P91"><text:span text:style-name="T2">However, there is a difference. The tokens created with code folding, generate "code blocks" (see section </text:span><text:span text:style-name="T2"><text:bookmark-ref text:reference-format="number" text:ref-name="_Ref395525432">5.11</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2</text:bookmark-ref></text:span><text:span text:style-name="T2"> - </text:span><text:span text:style-name="T2"><text:bookmark-ref text:reference-format="text" text:ref-name="_Ref379136914">Blocks as objects</text:bookmark-ref></text:span><text:span text:style-name="T2">.</text:span></text:p>
      <text:p text:style-name="P75"/>
      <text:list xml:id="list230306507373089" text:continue-numbering="true" text:style-name="WW8Num24">
        <text:list-item>
          <text:list>
            <text:list-item>
              <text:h text:style-name="P250" text:outline-level="2"><text:bookmark-start text:name="__RefHeading___Toc404419505"/><text:bookmark-start text:name="_Ref379136781"/><text:bookmark-start text:name="_Ref379136783"/><text:bookmark-start text:name="_Ref379281217"/><text:bookmark-start text:name="_Ref379281222"/><text:bookmark-start text:name="_Ref379281239"/>Configuration Example<text:bookmark-end text:name="__RefHeading___Toc404419505"/></text:h>
            </text:list-item>
          </text:list>
        </text:list-item>
      </text:list>
      <text:p text:style-name="P75"/>
      <text:p text:style-name="P75">The following code creates a simple syntax for PHP:</text:p>
      <text:p text:style-name="P75"/>
      <text:p text:style-name="P117"><text:span text:style-name="T11">procedure </text:span><text:span text:style-name="T26">TForm1.FormCreate</text:span><text:span text:style-name="T79">(</text:span><text:span text:style-name="T26">Sender</text:span><text:span text:style-name="T79">:</text:span><text:span text:style-name="T26"> TObject</text:span><text:span text:style-name="T79">);</text:span></text:p>
      <text:p text:style-name="P127">var</text:p>
      <text:p text:style-name="P117"><text:span text:style-name="T38"><text:s text:c="2"/></text:span><text:span text:style-name="T26">hlt1</text:span><text:span text:style-name="T79">:</text:span><text:span text:style-name="T26"> TSynFacilSyn</text:span><text:span text:style-name="T79">;</text:span></text:p>
      <text:p text:style-name="P127">begin</text:p>
      <text:p text:style-name="P117"><text:span text:style-name="T38"><text:s text:c="2"/></text:span><text:span text:style-name="T26">hlt1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highlighter</text:span></text:p>
      <text:p text:style-name="P117"><text:span text:style-name="T38"><text:s text:c="2"/></text:span><text:span text:style-name="T26">SynEdit1.Highlighter </text:span><text:span text:style-name="T79">: =</text:span><text:span text:style-name="T26"> hlt1</text:span><text:span text:style-name="T79">;</text:span><text:span text:style-name="T26"> </text:span><text:span text:style-name="T92">//</text:span><text:span text:style-name="T96">assigned to the editor</text:span></text:p>
      <text:p text:style-name="P117"><text:span text:style-name="T38"><text:s text:c="2"/></text:span><text:span text:style-name="T26">hlt1.ClearSpecials</text:span><text:span text:style-name="T79">;</text:span><text:span text:style-name="T26"> </text:span><text:span text:style-name="T92">//</text:span><text:span text:style-name="T96">to begin defining tokens</text:span></text:p>
      <text:p text:style-name="P117"><text:span text:style-name="T38"><text:s text:c="2"/></text:span><text:span text:style-name="T26">hlt1.CreateAttributes</text:span><text:span text:style-name="T79">;</text:span><text:span text:style-name="T26"> </text:span><text:span text:style-name="T92">//</text:span><text:span text:style-name="T96">Clean attributes</text:span></text:p>
      <text:p text:style-name="P117"><text:span text:style-name="T38"><text:s text:c="2"/></text:span><text:span text:style-name="T26">hlt1.ClearMethodTables</text:span><text:span text:style-name="T79">;</text:span><text:span text:style-name="T26"> </text:span><text:span text:style-name="T92">//</text:span><text:span text:style-name="T96">clean method table</text:span></text:p>
      <text:p text:style-name="P117"><text:span text:style-name="T38"><text:s text:c="2"/></text:span><text:span text:style-name="T92">//</text:span><text:span text:style-name="T96">tokens created by content</text:span></text:p>
      <text:p text:style-name="P117"><text:span text:style-name="T38"><text:s text:c="2"/></text:span><text:span text:style-name="T26">hlt1.DefTokIdentif</text:span><text:span text:style-name="T79">(</text:span><text:span text:style-name="T114">'[$ A..Za..z_]'</text:span><text:span text:style-name="T26">,</text:span><text:span text:style-name="T114">'[A-Za-z0-9_]*'</text:span><text:span text:style-name="T79">);</text:span></text:p>
      <text:p text:style-name="P117"><text:span text:style-name="T38"><text:s text:c="2"/></text:span><text:span text:style-name="T26">hlt1.DefTokContent</text:span><text:span text:style-name="T79">(</text:span><text:span text:style-name="T114">'[0..9.]'</text:span><text:span text:style-name="T26">,</text:span><text:span text:style-name="T114">'[0-9xabcdefXABCDEF]*'</text:span><text:span text:style-name="T26">,</text:span><text:span text:style-name="T114">''</text:span><text:span text:style-name="T26">, Hlt1.t</text:span><text:span text:style-name="T32">n</text:span><text:span text:style-name="T26">Number</text:span><text:span text:style-name="T79">);</text:span></text:p>
      <text:p text:style-name="P117"><text:span text:style-name="T38"><text:s text:c="2"/></text:span><text:span text:style-name="T92">//</text:span><text:span text:style-name="T96">defined keywords</text:span></text:p>
      <text:p text:style-name="P117"><text:span text:style-name="T38"><text:s text:c="2"/></text:span><text:span text:style-name="T26">hlt1.AddIdentSpec</text:span><text:span text:style-name="T79">(</text:span><text:span text:style-name="T114">'__</text:span><text:span text:style-name="T115">file</text:span><text:span text:style-name="T114">__ '</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text:span><text:span text:style-name="T79">(</text:span><text:span text:style-name="T114">'__LINE__'</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text:span><text:span text:style-name="T79">(</text:span><text:span text:style-name="T114">'Array'</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text:span><text:span text:style-name="T79">(</text:span><text:span text:style-name="T114">'And'</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text:span><text:span text:style-name="T79">(</text:span><text:span text:style-name="T114">'Break'</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92">//</text:span><text:span text:style-name="T96">Alternatively declaration</text:span></text:p>
      <text:p text:style-name="P117"><text:span text:style-name="T38"><text:s text:c="2"/></text:span><text:span text:style-name="T26">hlt1.AddIdentSpecList</text:span><text:span text:style-name="T79">(</text:span><text:span text:style-name="T114">'Case </text:span><text:span text:style-name="T115">class const </text:span><text:span text:style-name="T114">continue '</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List</text:span><text:span text:style-name="T79">(</text:span><text:span text:style-name="T114">'Default die </text:span><text:span text:style-name="T115">do </text:span><text:span text:style-name="T114">double '</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List</text:span><text:span text:style-name="T79">(</text:span><text:span text:style-name="T114">'Elseif else echo empty endif endfor'</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List</text:span><text:span text:style-name="T79">(</text:span><text:span text:style-name="T114">'Eval endswitch endwhile </text:span><text:span text:style-name="T115">exit </text:span><text:span text:style-name="T114">extends'</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26">hlt1.AddIdentSpecList</text:span><text:span text:style-name="T79">(</text:span><text:span text:style-name="T114">'Function </text:span><text:span text:style-name="T115">false </text:span><text:span text:style-name="T114">float for '</text:span><text:span text:style-name="T26">, </text:span><text:span text:style-name="T32">h</text:span><text:span text:style-name="T26">lt1.t</text:span><text:span text:style-name="T32">n</text:span><text:span text:style-name="T26">Keyword</text:span><text:span text:style-name="T79">);</text:span></text:p>
      <text:p text:style-name="P117"><text:span text:style-name="T38"><text:s text:c="2"/></text:span><text:span text:style-name="T92">//</text:span><text:span text:style-name="T96">Alternatively declaration</text:span></text:p>
      <text:p text:style-name="P117"><text:span text:style-name="T38"><text:s text:c="2"/></text:span><text:span text:style-name="T26">hlt1.AddKeyword</text:span><text:span text:style-name="T79">(</text:span><text:span text:style-name="T114">'Global'</text:span><text:span text:style-name="T79">);</text:span></text:p>
      <text:p text:style-name="P117"><text:span text:style-name="T38"><text:s text:c="2"/></text:span><text:span text:style-name="T26">hlt1.AddKeyword</text:span><text:span text:style-name="T79">(</text:span><text:span text:style-name="T114">'Highlight_file'</text:span><text:span text:style-name="T79">);</text:span></text:p>
      <text:p text:style-name="P117"><text:span text:style-name="T38"><text:s text:c="2"/></text:span><text:span text:style-name="T26">hlt1.AddKeyword</text:span><text:span text:style-name="T79">(</text:span><text:span text:style-name="T114">'Highlight_string'</text:span><text:span text:style-name="T79">);</text:span></text:p>
      <text:p text:style-name="P117"><text:span text:style-name="T38"><text:s text:c="2"/></text:span><text:span text:style-name="T26">hlt1.AddKeyword</text:span><text:span text:style-name="T79">(</text:span><text:span text:style-name="T114">'If'</text:span><text:span text:style-name="T79">);</text:span></text:p>
      <text:p text:style-name="P117"><text:span text:style-name="T38"><text:s text:c="2"/></text:span><text:span text:style-name="T26">hlt1.AddKeyword</text:span><text:span text:style-name="T79">(</text:span><text:span text:style-name="T114">'Int'</text:span><text:span text:style-name="T79">);</text:span></text:p>
      <text:p text:style-name="P117"><text:span text:style-name="T38"><text:s text:c="2"/></text:span><text:span text:style-name="T26">hlt1.AddKeyword</text:span><text:span text:style-name="T79">(</text:span><text:span text:style-name="T114">'Include'</text:span><text:span text:style-name="T79">);</text:span></text:p>
      <text:p text:style-name="P117"><text:span text:style-name="T38"><text:s text:c="2"/></text:span><text:span text:style-name="T26">hlt1.AddKeyword</text:span><text:span text:style-name="T79">(</text:span><text:span text:style-name="T114">'Integer'</text:span><text:span text:style-name="T79">);</text:span></text:p>
      <text:p text:style-name="P117"><text:span text:style-name="T38"><text:s text:c="2"/></text:span><text:span text:style-name="T26">hlt1.AddKeyword</text:span><text:span text:style-name="T79">(</text:span><text:span text:style-name="T114">'Isset'</text:span><text:span text:style-name="T79">);</text:span></text:p>
      <text:p text:style-name="P117"><text:span text:style-name="T38"><text:s text:c="2"/></text:span><text:span text:style-name="T26">hlt1.AddKeyword</text:span><text:span text:style-name="T79">(</text:span><text:span text:style-name="T114">'List'</text:span><text:span text:style-name="T79">);</text:span></text:p>
      <text:p text:style-name="P117"><text:span text:style-name="T38"><text:s text:c="2"/></text:span><text:span text:style-name="T26">hlt1.AddKeyword</text:span><text:span text:style-name="T79">(</text:span><text:span text:style-name="T114">'New'</text:span><text:span text:style-name="T79">);</text:span></text:p>
      <text:p text:style-name="P117"><text:span text:style-name="T38"><text:s text:c="2"/></text:span><text:span text:style-name="T26">hlt1.AddKeyword</text:span><text:span text:style-name="T79">(</text:span><text:span text:style-name="T114">'Object'</text:span><text:span text:style-name="T79">);</text:span></text:p>
      <text:p text:style-name="P117"><text:span text:style-name="T38"><text:s text:c="2"/></text:span><text:span text:style-name="T26">hlt1.AddKeyword</text:span><text:span text:style-name="T79">(</text:span><text:span text:style-name="T114">'Old_function'</text:span><text:span text:style-name="T79">);</text:span></text:p>
      <text:p text:style-name="P117"><text:span text:style-name="T38"><text:s text:c="2"/></text:span><text:span text:style-name="T26">hlt1.AddKeyword</text:span><text:span text:style-name="T79">(</text:span><text:span text:style-name="T114">'Or'</text:span><text:span text:style-name="T79">);</text:span></text:p>
      <text:p text:style-name="P117"><text:span text:style-name="T38"><text:s text:c="2"/></text:span><text:span text:style-name="T26">hlt1.AddKeyword</text:span><text:span text:style-name="T79">(</text:span><text:span text:style-name="T114">'Print'</text:span><text:span text:style-name="T79">);</text:span></text:p>
      <text:p text:style-name="P117"><text:span text:style-name="T38"><text:s text:c="2"/></text:span><text:span text:style-name="T26">hlt1.AddKeyword</text:span><text:span text:style-name="T79">(</text:span><text:span text:style-name="T114">'Real'</text:span><text:span text:style-name="T79">);</text:span></text:p>
      <text:p text:style-name="P117"><text:soft-page-break/><text:span text:style-name="T38"><text:s text:c="2"/></text:span><text:span text:style-name="T26">hlt1.AddKeyword</text:span><text:span text:style-name="T79">(</text:span><text:span text:style-name="T114">'Require'</text:span><text:span text:style-name="T79">);</text:span></text:p>
      <text:p text:style-name="P117"><text:span text:style-name="T38"><text:s text:c="2"/></text:span><text:span text:style-name="T26">hlt1.AddKeyword</text:span><text:span text:style-name="T79">(</text:span><text:span text:style-name="T114">'Return'</text:span><text:span text:style-name="T79">);</text:span></text:p>
      <text:p text:style-name="P117"><text:span text:style-name="T38"><text:s text:c="2"/></text:span><text:span text:style-name="T26">hlt1.AddKeyword</text:span><text:span text:style-name="T79">(</text:span><text:span text:style-name="T114">'Show_source'</text:span><text:span text:style-name="T79">);</text:span></text:p>
      <text:p text:style-name="P117"><text:span text:style-name="T38"><text:s text:c="2"/></text:span><text:span text:style-name="T26">hlt1.AddKeyword</text:span><text:span text:style-name="T79">(</text:span><text:span text:style-name="T114">'Static'</text:span><text:span text:style-name="T79">);</text:span></text:p>
      <text:p text:style-name="P117"><text:span text:style-name="T38"><text:s text:c="2"/></text:span><text:span text:style-name="T26">hlt1.AddKeyword</text:span><text:span text:style-name="T79">(</text:span><text:span text:style-name="T114">'String'</text:span><text:span text:style-name="T79">);</text:span></text:p>
      <text:p text:style-name="P117"><text:span text:style-name="T38"><text:s text:c="2"/></text:span><text:span text:style-name="T26">hlt1.AddKeyword</text:span><text:span text:style-name="T79">(</text:span><text:span text:style-name="T114">'Switch'</text:span><text:span text:style-name="T79">);</text:span></text:p>
      <text:p text:style-name="P117"><text:span text:style-name="T38"><text:s text:c="2"/></text:span><text:span text:style-name="T26">hlt1.AddKeyword</text:span><text:span text:style-name="T79">(</text:span><text:span text:style-name="T114">'True'</text:span><text:span text:style-name="T79">);</text:span></text:p>
      <text:p text:style-name="P117"><text:span text:style-name="T38"><text:s text:c="2"/></text:span><text:span text:style-name="T26">hlt1.AddKeyword</text:span><text:span text:style-name="T79">(</text:span><text:span text:style-name="T114">'Unset'</text:span><text:span text:style-name="T79">);</text:span></text:p>
      <text:p text:style-name="P117"><text:span text:style-name="T38"><text:s text:c="2"/></text:span><text:span text:style-name="T26">hlt1.AddKeyword</text:span><text:span text:style-name="T79">(</text:span><text:span text:style-name="T114">'Var'</text:span><text:span text:style-name="T79">);</text:span></text:p>
      <text:p text:style-name="P117"><text:span text:style-name="T38"><text:s text:c="2"/></text:span><text:span text:style-name="T26">hlt1.AddKeyword</text:span><text:span text:style-name="T79">(</text:span><text:span text:style-name="T114">'While'</text:span><text:span text:style-name="T79">);</text:span></text:p>
      <text:p text:style-name="P117"><text:span text:style-name="T38"><text:s text:c="2"/></text:span><text:span text:style-name="T26">hlt1.AddKeyword</text:span><text:span text:style-name="T79">(</text:span><text:span text:style-name="T114">'Xor'</text:span><text:span text:style-name="T79">);</text:span></text:p>
      <text:p text:style-name="P117"><text:span text:style-name="T38"><text:s text:c="2"/></text:span><text:span text:style-name="T92">//</text:span><text:span text:style-name="T96">creates delimited tokens</text:span></text:p>
      <text:p text:style-name="P117"><text:span text:style-name="T38"><text:s text:c="2"/></text:span><text:span text:style-name="T26">hlt1.DefTokDelim</text:span><text:span text:style-name="T79">(</text:span><text:span text:style-name="T114">''</text:span><text:span text:style-name="T26">,</text:span><text:span text:style-name="T114">''</text:span><text:span text:style-name="T26">, </text:span><text:span text:style-name="T32">hl</text:span><text:span text:style-name="T26">t1.t</text:span><text:span text:style-name="T32">n</text:span><text:span text:style-name="T26">String</text:span><text:span text:style-name="T79">);</text:span></text:p>
      <text:p text:style-name="P117"><text:span text:style-name="T38"><text:s text:c="2"/></text:span><text:span text:style-name="T26">hlt1.DefTokDelim</text:span><text:span text:style-name="T79">(</text:span><text:span text:style-name="T114">'"'</text:span><text:span text:style-name="T26">,</text:span><text:span text:style-name="T114">'"'</text:span><text:span text:style-name="T26">, </text:span><text:span text:style-name="T32">h</text:span><text:span text:style-name="T26">lt1.t</text:span><text:span text:style-name="T32">n</text:span><text:span text:style-name="T26">String</text:span><text:span text:style-name="T79">);</text:span></text:p>
      <text:p text:style-name="P117"><text:span text:style-name="T38"><text:s text:c="2"/></text:span><text:span text:style-name="T26">hlt1.DefTokDelim</text:span><text:span text:style-name="T79">(</text:span><text:span text:style-name="T114">'</text:span><text:span text:style-name="T92">//</text:span><text:span text:style-name="T96">',' ', </text:span><text:span text:style-name="T26">hlt1.t</text:span><text:span text:style-name="T32">n</text:span><text:span text:style-name="T26">Comment</text:span><text:span text:style-name="T79">);</text:span></text:p>
      <text:p text:style-name="P117"><text:span text:style-name="T38"><text:s text:c="2"/></text:span><text:span text:style-name="T26">hlt1.DefTokDelim</text:span><text:span text:style-name="T79">(</text:span><text:span text:style-name="T114">'</text:span><text:span text:style-name="T115">/ *</text:span><text:span text:style-name="T114">'</text:span><text:span text:style-name="T26">,</text:span><text:span text:style-name="T114">'</text:span><text:span text:style-name="T115">* /</text:span><text:span text:style-name="T114">'</text:span><text:span text:style-name="T26">, </text:span><text:span text:style-name="T32">h</text:span><text:span text:style-name="T26">lt1.t</text:span><text:span text:style-name="T32">n</text:span><text:span text:style-name="T26">Comment, tdMulLin</text:span><text:span text:style-name="T79">);</text:span></text:p>
      <text:p text:style-name="P117"><text:span text:style-name="T38"><text:s text:c="2"/></text:span><text:span text:style-name="T26">hlt1.Rebuild</text:span><text:span text:style-name="T79">;</text:span><text:span text:style-name="T26"> </text:span></text:p>
      <text:p text:style-name="P117"><text:span text:style-name="T11">end</text:span><text:span text:style-name="T79">;</text:span></text:p>
      <text:p text:style-name="P75"/>
      <text:p text:style-name="P75">In this syntax, only the treatment of tokens are defined. Only token types that already exist in the highlighter is used, no new types of tokens are created.</text:p>
      <text:p text:style-name="P75"/>
      <text:list xml:id="list230305310739431" text:continue-numbering="true" text:style-name="WW8Num24">
        <text:list-item>
          <text:list>
            <text:list-item>
              <text:h text:style-name="P250" text:outline-level="2"><text:bookmark-start text:name="_Ref395525432"/><text:bookmark-start text:name="_Ref395525435"/><text:bookmark-start text:name="__RefHeading___Toc404419506"/>Definition of block<text:bookmark-end text:name="_Ref395525432"/><text:bookmark-end text:name="_Ref395525435"/><text:bookmark-end text:name="_Ref379136781"/><text:bookmark-end text:name="_Ref379136783"/><text:bookmark-end text:name="_Ref379281217"/><text:bookmark-end text:name="_Ref379281222"/><text:bookmark-end text:name="_Ref379281239"/>s<text:bookmark-end text:name="__RefHeading___Toc404419506"/></text:h>
            </text:list-item>
          </text:list>
        </text:list-item>
      </text:list>
      <text:p text:style-name="P75"/>
      <text:p text:style-name="P75">The blocks can be understood as sets of consecutive tokens with syntactic meaning, clearly defined by delimiters, which are also tokens.</text:p>
      <text:p text:style-name="P75"/>
      <text:p text:style-name="P75">The easiest way to define blocks is using the AddBlock() method, which has the following declaration:</text:p>
      <text:p text:style-name="P159"/>
      <text:p text:style-name="P117"><text:span text:style-name="T11">function </text:span><text:span text:style-name="T26">TSynFacilSyn.AddBlock</text:span><text:span text:style-name="T79">(</text:span></text:p>
      <text:p text:style-name="P117"><text:span text:style-name="T80"><text:s text:c="2"/></text:span><text:span text:style-name="T26">dStart, dEnd</text:span><text:span text:style-name="T79">:</text:span><text:span text:style-name="T26"> </text:span><text:span text:style-name="T11">string</text:span><text:span text:style-name="T79">;</text:span><text:span text:style-name="T26"> </text:span></text:p>
      <text:p text:style-name="P117"><text:span text:style-name="T38"><text:s text:c="2"/></text:span><text:span text:style-name="T26">showFold</text:span><text:span text:style-name="T79">:</text:span><text:span text:style-name="T26"> boolean </text:span><text:span text:style-name="T79">=</text:span><text:span text:style-name="T26"> </text:span><text:span text:style-name="T11">true</text:span><text:span text:style-name="T79">;</text:span><text:span text:style-name="T26"> </text:span></text:p>
      <text:p text:style-name="P117"><text:span text:style-name="T38"><text:s text:c="2"/></text:span><text:span text:style-name="T26">parentBlk</text:span><text:span text:style-name="T79">:</text:span><text:span text:style-name="T26"> TFaSynBlock </text:span><text:span text:style-name="T79">=</text:span><text:span text:style-name="T26"> </text:span><text:span text:style-name="T11">nil</text:span><text:span text:style-name="T79">;</text:span></text:p>
      <text:p text:style-name="P117"><text:span text:style-name="T79">):</text:span><text:span text:style-name="T26"> TFaSynBlock</text:span><text:span text:style-name="T79">;</text:span></text:p>
      <text:p text:style-name="P75"/>
      <text:p text:style-name="P75">The description of the parameters is:</text:p>
      <text:p text:style-name="P7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5"/>
      <text:p text:style-name="P75">A simple case of block definition would be:</text:p>
      <text:p text:style-name="P75"/>
      <text:p text:style-name="P117"><text:span text:style-name="T38"><text:s text:c="2"/></text:span><text:span text:style-name="T26">hlt.AddBlock</text:span><text:span text:style-name="T79">(</text:span><text:span text:style-name="T114">'Begin'</text:span><text:span text:style-name="T26">,</text:span><text:span text:style-name="T114">'End'</text:span><text:span text:style-name="T79">);</text:span><text:span text:style-name="T26"> </text:span><text:span text:style-name="T92">//</text:span><text:span text:style-name="T96">adds the block</text:span></text:p>
      <text:p text:style-name="P123">...</text:p>
      <text:p text:style-name="P117"><text:span text:style-name="T38"><text:s text:c="2"/></text:span><text:span text:style-name="T26">Rebuild</text:span><text:span text:style-name="T79">;</text:span></text:p>
      <text:p text:style-name="P75"/>
      <text:p text:style-name="P75">The Rebuild() method, you must run, always, after entering all blocks, otherwise it may not effect the definition.</text:p>
      <text:p text:style-name="P75"/>
      <text:p text:style-name="P75">By default a defined block displays the fold mark:</text:p>
      <text:p text:style-name="P75"/>
      <text:p text:style-name="P92"><text:soft-page-break/><draw:frame draw:style-name="fr4" draw:name="Image21" text:anchor-type="as-char" svg:width="10.742cm" svg:height="4.895cm" draw:z-index="70"><draw:image xlink:href="Pictures/1000000000000196000000B9CBCA9BD47505A7F8.png" xlink:type="simple" xlink:show="embed" xlink:actuate="onLoad"/></draw:frame></text:p>
      <text:p text:style-name="P75"/>
      <text:p text:style-name="P75">The block will extend from the token "BEGIN" to the end of the token "END". The block may be distributed in one or more lines. Is not necessary to specify. The blocks are multiline by default.</text:p>
      <text:p text:style-name="P75"/>
      <text:p text:style-name="P75">If we want the block does not show the fold mark, we should explicitly indicate it in the third parameter:</text:p>
      <text:p text:style-name="P75"/>
      <text:p text:style-name="P117"><text:span text:style-name="T38"><text:s text:c="2"/></text:span><text:span text:style-name="T26">hlt.AddBlock</text:span><text:span text:style-name="T79">(</text:span><text:span text:style-name="T114">'Begin'</text:span><text:span text:style-name="T26">,</text:span><text:span text:style-name="T114">'End'</text:span><text:span text:style-name="T26">,</text:span><text:span text:style-name="T11">false</text:span><text:span text:style-name="T79">);</text:span></text:p>
      <text:p text:style-name="P75"/>
      <text:p text:style-name="P75">Block delimiters can also be symbols. For example, the following statement is valid:</text:p>
      <text:p text:style-name="P75"/>
      <text:p text:style-name="P117"><text:span text:style-name="T38"><text:s text:c="2"/></text:span><text:span text:style-name="T26">hlt.AddBlock</text:span><text:span text:style-name="T79">(</text:span><text:span text:style-name="T114">'('</text:span><text:span text:style-name="T26">,</text:span><text:span text:style-name="T114">')'</text:span><text:span text:style-name="T79">);</text:span></text:p>
      <text:p text:style-name="P75"/>
      <text:p text:style-name="P75">This definition, consider all tokens in parentheses as part of a block.</text:p>
      <text:p text:style-name="P75"/>
      <text:p text:style-name="P75">Block delimiters must always be special identifiers or special symbols. If it is used a delimiter of block that is not defined as a special token, it is first created as a special token before processing the block.</text:p>
      <text:p text:style-name="P75"/>
      <text:p text:style-name="P75">For example, in the following definition:</text:p>
      <text:p text:style-name="P75"/>
      <text:p text:style-name="P117"><text:span text:style-name="T38"><text:s text:c="2"/></text:span><text:span text:style-name="T26">hlt.AddBlock</text:span><text:span text:style-name="T79">(</text:span><text:span text:style-name="T114">'Begin'</text:span><text:span text:style-name="T26">,</text:span><text:span text:style-name="T114">'End'</text:span><text:span text:style-name="T79">);</text:span></text:p>
      <text:p text:style-name="P75"/>
      <text:p text:style-name="P75">If the identifier "Begin" was not created as a special identifier, then first "Begin"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text:soft-page-break/>It is noteworthy that the highlighter will always try to identify the block delimiters as a special identifier or a special symbol. The identification rule is simple:</text:p>
      <text:p text:style-name="P75"/>
      <text:list xml:id="list230304885801523" text:continue-list="list8988008278344373585" text:style-name="WW8Num18">
        <text:list-item>
          <text:p text:style-name="P225">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5"/>
      <text:p text:style-name="P75">For example the following code will fail when trying to run it, if the character “%” does not belong to the valid characters for an identifier:</text:p>
      <text:p text:style-name="P75"/>
      <text:p text:style-name="P117"><text:span text:style-name="T38"><text:s text:c="2"/></text:span><text:span text:style-name="T26">hlt.AddBlock</text:span><text:span text:style-name="T79">(</text:span><text:span text:style-name="T114">'Begin%'</text:span><text:span text:style-name="T26">,</text:span><text:span text:style-name="T114">'End'</text:span><text:span text:style-name="T79">);</text:span></text:p>
      <text:p text:style-name="P75"/>
      <text:list xml:id="list230306400642555" text:continue-numbering="true" text:style-name="WW8Num18">
        <text:list-item>
          <text:p text:style-name="P225">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5"/>
      <text:p text:style-name="P75">Consider for example the following definition:</text:p>
      <text:p text:style-name="P75"/>
      <text:p text:style-name="P117"><text:span text:style-name="T38"><text:s text:c="2"/></text:span><text:span text:style-name="T26">hlt.AddBlock</text:span><text:span text:style-name="T79">(</text:span><text:span text:style-name="T114">'”Hey”'</text:span><text:span text:style-name="T26">,</text:span><text:span text:style-name="T114">'”You”'</text:span><text:span text:style-name="T79">);</text:span></text:p>
      <text:p text:style-name="P75"/>
      <text:p text:style-name="P75">The highlighter try to encode "hey" (including the quotes) as a special symbol, and could leave without effect, some previous definition of strings (that uses quotes).</text:p>
      <text:p text:style-name="P75"/>
      <text:p text:style-name="P75">You can define as many blocks as you want, considering that more of them, the greater the processing that should do the highlighter.</text:p>
      <text:p text:style-name="P75"/>
      <text:list xml:id="list230304668846615" text:continue-list="list230305310739431" text:style-name="WW8Num24">
        <text:list-item>
          <text:list>
            <text:list-item>
              <text:h text:style-name="P246"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75"/>
      <text:p text:style-name="P75">Within the highlighter, the blocks are objects of the "TFaSynBlock" class, that have the following definition:</text:p>
      <text:p text:style-name="P75"/>
      <text:p text:style-name="P117"><text:span text:style-name="T38"><text:s text:c="2"/></text:span><text:span text:style-name="T26">TFaSynBlock </text:span><text:span text:style-name="T79">=</text:span><text:span text:style-name="T26"> </text:span><text:span text:style-name="T11">class </text:span><text:span text:style-name="T92">//</text:span><text:span text:style-name="T96">class to handle syntax blocks</text:span></text:p>
      <text:p text:style-name="P117"><text:span text:style-name="T38"><text:s text:c="4"/></text:span><text:span text:style-name="T26">name</text:span><text:span text:style-name="T11"> </text:span><text:span text:style-name="T79">:</text:span><text:span text:style-name="T26"> </text:span><text:span text:style-name="T11">string</text:span><text:span text:style-name="T79">;</text:span><text:span text:style-name="T26"> </text:span><text:span text:style-name="T92">//</text:span><text:span text:style-name="T96">block name</text:span></text:p>
      <text:p text:style-name="P117"><text:span text:style-name="T38"><text:s text:c="4"/></text:span><text:span text:style-name="T26">index</text:span><text:span text:style-name="T11"> </text:span><text:span text:style-name="T79">:</text:span><text:span text:style-name="T26"> integer</text:span><text:span text:style-name="T79">;</text:span><text:span text:style-name="T26"> </text:span><text:span text:style-name="T92">//</text:span><text:span text:style-name="T96">indicates its position within TFaListBlocks</text:span></text:p>
      <text:p text:style-name="P117"><text:span text:style-name="T38"><text:s text:c="4"/></text:span><text:span text:style-name="T26">showFold </text:span><text:span text:style-name="T79">:</text:span><text:span text:style-name="T26"> boolean</text:span><text:span text:style-name="T79">;</text:span><text:span text:style-name="T26"> </text:span><text:span text:style-name="T92">//</text:span><text:span text:style-name="T96">indicates whether the fold mark is displayed</text:span></text:p>
      <text:p text:style-name="P117"><text:span text:style-name="T38"><text:s text:c="4"/></text:span><text:span text:style-name="T26">parentBlk </text:span><text:span text:style-name="T79">:</text:span><text:span text:style-name="T26"> TFaSynBlock</text:span><text:span text:style-name="T79">;</text:span><text:span text:style-name="T26"> </text:span><text:span text:style-name="T92">//</text:span><text:span text:style-name="T96">parent block </text:span><text:span text:style-name="T92">(</text:span><text:span text:style-name="T96">where the block is valid</text:span><text:span text:style-name="T92">)</text:span></text:p>
      <text:p text:style-name="P117"><text:span text:style-name="T38"><text:s text:c="4"/></text:span><text:span text:style-name="T26">Backcol </text:span><text:span text:style-name="T79">:</text:span><text:span text:style-name="T26"> TColor</text:span><text:span text:style-name="T79">;</text:span><text:span text:style-name="T26"> </text:span><text:span text:style-name="T92">//</text:span><text:span text:style-name="T96">background color of a block</text:span></text:p>
      <text:p text:style-name="P117"><text:span text:style-name="T38"><text:s text:c="4"/></text:span><text:span text:style-name="T26">IsSection </text:span><text:span text:style-name="T79">:</text:span><text:span text:style-name="T26"> boolean</text:span><text:span text:style-name="T79">;</text:span><text:span text:style-name="T26"> </text:span><text:span text:style-name="T92">//</text:span><text:span text:style-name="T96">indicates whether a block of type section</text:span></text:p>
      <text:p text:style-name="P117"><text:span text:style-name="T38"><text:s text:c="4"/></text:span><text:span text:style-name="T26">UniqSec </text:span><text:span text:style-name="T79">:</text:span><text:span text:style-name="T26"> boolean</text:span><text:span text:style-name="T79">;</text:span><text:span text:style-name="T26"> </text:span><text:span text:style-name="T92">//</text:span><text:span text:style-name="T96">Indica is only section</text:span></text:p>
      <text:p text:style-name="P117"><text:soft-page-break/><text:span text:style-name="T38"><text:s text:c="2"/></text:span><text:span text:style-name="T11">end</text:span><text:span text:style-name="T79">;</text:span></text:p>
      <text:p text:style-name="P75"/>
      <text:p text:style-name="P75">An important detail is that a block does not store a reference to the delimiters. The following section will explain more about this.</text:p>
      <text:p text:style-name="P75"/>
      <text:p text:style-name="P75">The blocks are created in the highlighter, by AddBlock() method. </text:p>
      <text:p text:style-name="P75"/>
      <text:p text:style-name="P75">Whenever used AddBlock(), are creating a new object "TFaSynBlock". The AddBlock() method is actually a function that returns a reference to "TFaSynBlock" object, which represents the block.</text:p>
      <text:p text:style-name="P75"/>
      <text:p text:style-name="P75">Having reference to the block object, allows us to access additional properties. In the following code, access to the object block is used to name the block:</text:p>
      <text:p text:style-name="P75"/>
      <text:p text:style-name="P127">var</text:p>
      <text:p text:style-name="P117"><text:span text:style-name="T38"><text:s text:c="2"/></text:span><text:span text:style-name="T26">hlt </text:span><text:span text:style-name="T79">:</text:span><text:span text:style-name="T26"> TSynFacilSyn</text:span><text:span text:style-name="T79">;</text:span><text:span text:style-name="T26"> </text:span><text:span text:style-name="T92">//</text:span><text:span text:style-name="T96">object block</text:span></text:p>
      <text:p text:style-name="P117"><text:span text:style-name="T38"><text:s text:c="2"/></text:span><text:span text:style-name="T26">bl_llaves</text:span><text:span text:style-name="T79">:</text:span><text:span text:style-name="T26"> TFaSynBlock</text:span><text:span text:style-name="T79">;</text:span></text:p>
      <text:p text:style-name="P123">...</text:p>
      <text:p text:style-name="P117"><text:span text:style-name="T38"><text:s text:c="2"/></text:span><text:span text:style-name="T26">bl_llaves </text:span><text:span text:style-name="T79">: =</text:span><text:span text:style-name="T26"> hlt.AddBlock</text:span><text:span text:style-name="T79">(</text:span><text:span text:style-name="T114">'{'</text:span><text:span text:style-name="T26">,</text:span><text:span text:style-name="T114">'}'</text:span><text:span text:style-name="T79">);</text:span></text:p>
      <text:p text:style-name="P117"><text:span text:style-name="T38"><text:s text:c="2"/></text:span><text:span text:style-name="T26">bl_llaves.name</text:span><text:span text:style-name="T79">: =</text:span><text:span text:style-name="T114"> 'Bloque_llaves'</text:span><text:span text:style-name="T79">;</text:span><text:span text:style-name="T26"> </text:span><text:span text:style-name="T92">//</text:span><text:span text:style-name="T96">assigns a name</text:span></text:p>
      <text:p text:style-name="P129"/>
      <text:p text:style-name="P75"/>
      <text:p text:style-name="P75">The name of block is not an important property when the highlighter is configured by code. This property is used by the highlighter, when the syntax with the XML file is configured.</text:p>
      <text:p text:style-name="P75"/>
      <text:p text:style-name="P75">There are two predefined highlighter, which are always created blocks. These are:</text:p>
      <text:p text:style-name="P75"/>
      <text:list xml:id="list230306559351876" text:continue-list="list230306400642555" text:style-name="WW8Num18">
        <text:list-item>
          <text:p text:style-name="P225">MainBlk -&gt; Identifies the main block. The one who has no nesting.</text:p>
        </text:list-item>
        <text:list-item>
          <text:p text:style-name="P225">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27">var</text:p>
      <text:p text:style-name="P117"><text:span text:style-name="T38"><text:s text:c="2"/></text:span><text:span text:style-name="T26">hlt </text:span><text:span text:style-name="T79">:</text:span><text:span text:style-name="T26"> TSynFacilSyn</text:span><text:span text:style-name="T79">;</text:span></text:p>
      <text:p text:style-name="P123">...</text:p>
      <text:p text:style-name="P131"><text:soft-page-break/><text:s text:c="2"/>//disables folding of all multiline tokens</text:p>
      <text:p text:style-name="P117"><text:span text:style-name="T38"><text:s text:c="2"/></text:span><text:span text:style-name="T26">hlt.MulTokBlk.showFold</text:span><text:span text:style-name="T79">: =</text:span><text:span text:style-name="T11">false</text:span><text:span text:style-name="T79">;</text:span><text:span text:style-name="T26"> </text:span></text:p>
      <text:p text:style-name="P117"><text:span text:style-name="T94"><text:s text:c="2"/>//</text:span><text:span text:style-name="T100">creates multiline token with folding that won't show folding mark</text:span></text:p>
      <text:p text:style-name="P117"><text:span text:style-name="T38"><text:s text:c="2"/></text:span><text:span text:style-name="T26">hlt.DefTokDelim</text:span><text:span text:style-name="T79">(</text:span><text:span text:style-name="T114">'</text:span><text:span text:style-name="T115">/ *</text:span><text:span text:style-name="T114">'</text:span><text:span text:style-name="T26">,</text:span><text:span text:style-name="T114">'</text:span><text:span text:style-name="T115">* /</text:span><text:span text:style-name="T114">'</text:span><text:span text:style-name="T26">, </text:span><text:span text:style-name="T33">tn</text:span><text:span text:style-name="T26">Comment, tdMulLin, </text:span><text:span text:style-name="T11">true</text:span><text:span text:style-name="T79">);</text:span><text:span text:style-name="T26"> </text:span></text:p>
      <text:p text:style-name="P132"><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59"/>
      <text:list xml:id="list230305566359835" text:continue-list="list230304668846615" text:style-name="WW8Num24">
        <text:list-item>
          <text:list>
            <text:list-item>
              <text:h text:style-name="P246" text:outline-level="2"><text:bookmark-start text:name="__RefHeading___Toc404419508"/>Advanced Blocks<text:bookmark-end text:name="__RefHeading___Toc404419508"/></text:h>
            </text:list-item>
          </text:list>
        </text:list-item>
      </text:list>
      <text:p text:style-name="P75"/>
      <text:p text:style-name="P75">The AddBlock() method allows us to create blocks in a simple form, indicating a single delimiter start and an end. But not allow us more flexibility to define delimiters.</text:p>
      <text:p text:style-name="P75"/>
      <text:p text:style-name="P75">There is an alternative way that allows us greater freedom. This involves using the method of creating blocks CreateBlock (), which has the following declaration:</text:p>
      <text:p text:style-name="P75"/>
      <text:p text:style-name="P117"><text:span text:style-name="T38"><text:s text:c="4"/></text:span><text:span text:style-name="T11">function </text:span><text:span text:style-name="T26">CreateBlock</text:span><text:span text:style-name="T79">(</text:span><text:span text:style-name="T26">blkName</text:span><text:span text:style-name="T79">:</text:span><text:span text:style-name="T26"> </text:span><text:span text:style-name="T11">string</text:span><text:span text:style-name="T79">;</text:span><text:span text:style-name="T26"> </text:span></text:p>
      <text:p text:style-name="P117"><text:span text:style-name="T38"><text:s text:c="25"/></text:span><text:span text:style-name="T26">showFold</text:span><text:span text:style-name="T79">:</text:span><text:span text:style-name="T26"> boolean</text:span><text:span text:style-name="T79">=</text:span><text:span text:style-name="T11">true</text:span><text:span text:style-name="T79">;</text:span></text:p>
      <text:p text:style-name="P117"><text:span text:style-name="T38"><text:s text:c="25"/></text:span><text:span text:style-name="T26">parentBlk</text:span><text:span text:style-name="T79">:</text:span><text:span text:style-name="T26"> TFaSynBlock</text:span><text:span text:style-name="T79">=</text:span><text:span text:style-name="T11">nil</text:span><text:span text:style-name="T79">):</text:span><text:span text:style-name="T26"> TFaSynBlock</text:span><text:span text:style-name="T79">;</text:span></text:p>
      <text:p text:style-name="P75"/>
      <text:p text:style-name="P75">CreateBlock() allows us to internally create a block in the highlight (and their main properties) but without defining its delimiters. </text:p>
      <text:p text:style-name="P75"/>
      <text:p text:style-name="P75">Is it possible to have a block without delimiters? Certainly yes. However this block will not open in a normal highlighter exploration.</text:p>
      <text:p text:style-name="P75"/>
      <text:p text:style-name="P75">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5"/>
      <text:p text:style-name="P75">The blocks are stored in the memory of the highlighter, but they have no reference to any start or end delimiter (since there may be several tokens that open or close). Tokens are the delimiters, which keep the reference to blocks that open and close.</text:p>
      <text:p text:style-name="P75"/>
      <text:p text:style-name="P75">The diagram below will help to clarify the indicated:</text:p>
      <text:p text:style-name="P75"/>
      <text:p text:style-name="P38"><text:soft-page-break/><draw:frame draw:style-name="fr18" draw:name="Object13" text:anchor-type="as-char" svg:width="13.007cm" svg:height="7.982cm" draw:z-index="71"><draw:object-ole xlink:href="./Object 13" xlink:type="simple" xlink:show="embed" xlink:actuate="onLoad"/><draw:image xlink:href="./ObjectReplacements/Object 13" xlink:type="simple" xlink:show="embed" xlink:actuate="onLoad"/></draw:frame></text:p>
      <text:p text:style-name="P75"/>
      <text:p text:style-name="P75">For to associate the special delimiters, to one block, there are the functions AddIniBlockToTok() and AddFinBlockToTok(), that have the following statement:</text:p>
      <text:p text:style-name="P75"/>
      <text:p text:style-name="P117"><text:span text:style-name="T38"><text:s text:c="4"/></text:span><text:span text:style-name="T11">procedure </text:span><text:span text:style-name="T26">AddIniBlockToTok</text:span><text:span text:style-name="T79">(</text:span><text:span text:style-name="T26">dStart</text:span><text:span text:style-name="T79">:</text:span><text:span text:style-name="T26"> </text:span><text:span text:style-name="T11">string</text:span><text:span text:style-name="T79">;</text:span><text:span text:style-name="T26"> TokPos</text:span><text:span text:style-name="T79">:</text:span><text:span text:style-name="T26"> integer</text:span><text:span text:style-name="T79">;</text:span><text:span text:style-name="T26"> </text:span></text:p>
      <text:p text:style-name="P117"><text:span text:style-name="T38"><text:s text:c="31"/></text:span><text:span text:style-name="T26">blk</text:span><text:span text:style-name="T79">:</text:span><text:span text:style-name="T26"> TFaSynBlock</text:span><text:span text:style-name="T79">);</text:span></text:p>
      <text:p text:style-name="P117"><text:span text:style-name="T38"><text:s text:c="4"/></text:span><text:span text:style-name="T11">procedure </text:span><text:span text:style-name="T26">AddFinBlockToTok</text:span><text:span text:style-name="T79">(</text:span><text:span text:style-name="T26">dEnd</text:span><text:span text:style-name="T79">:</text:span><text:span text:style-name="T26"> </text:span><text:span text:style-name="T11">string</text:span><text:span text:style-name="T79">;</text:span><text:span text:style-name="T26"> TokPos</text:span><text:span text:style-name="T79">:</text:span><text:span text:style-name="T26"> integer</text:span><text:span text:style-name="T79">;</text:span><text:span text:style-name="T26"> </text:span></text:p>
      <text:p text:style-name="P117"><text:span text:style-name="T38"><text:s text:c="31"/></text:span><text:span text:style-name="T26">blk</text:span><text:span text:style-name="T79">:</text:span><text:span text:style-name="T26"> TFaSynBlock</text:span><text:span text:style-name="T79">);</text:span></text:p>
      <text:p text:style-name="P75"/>
      <text:p text:style-name="P75">To appreciate the difference in blocks creation, consider the following statement block:</text:p>
      <text:p text:style-name="P75"/>
      <text:p text:style-name="P117"><text:span text:style-name="T38"><text:s text:c="2"/></text:span><text:span text:style-name="T26">blq_codigo </text:span><text:span text:style-name="T79">: =</text:span><text:span text:style-name="T26"> hlt.AddBlock</text:span><text:span text:style-name="T79">(</text:span><text:span text:style-name="T114">'Start'</text:span><text:span text:style-name="T26">,</text:span><text:span text:style-name="T114">'End'</text:span><text:span text:style-name="T79">);</text:span></text:p>
      <text:p text:style-name="P75"/>
      <text:p text:style-name="P75">And the alternative equivalently, using CreateBlock ():</text:p>
      <text:p text:style-name="P75"/>
      <text:p text:style-name="P117"><text:span text:style-name="T38"><text:s text:c="2"/></text:span><text:span text:style-name="T26">blq_codigo </text:span><text:span text:style-name="T79">: =</text:span><text:span text:style-name="T26"> hlt.CreateBlock</text:span><text:span text:style-name="T79">(</text:span><text:span text:style-name="T114">''</text:span><text:span text:style-name="T79">);</text:span><text:span text:style-name="T26"> </text:span><text:span text:style-name="T92">//</text:span><text:span text:style-name="T96">Create block </text:span></text:p>
      <text:p text:style-name="P117"><text:span text:style-name="T94"><text:s text:c="2"/></text:span><text:span text:style-name="T92">//</text:span><text:span text:style-name="T96">Assigns refer. block the token 'Start' wishlist 'blocks that opens"</text:span></text:p>
      <text:p text:style-name="P117"><text:span text:style-name="T38"><text:s text:c="2"/></text:span><text:span text:style-name="T26">AddIniBlockToTok</text:span><text:span text:style-name="T79">(</text:span><text:span text:style-name="T114">'Start'</text:span><text:span text:style-name="T26">, 0, blq_codigo</text:span><text:span text:style-name="T79">);</text:span><text:span text:style-name="T26"> </text:span></text:p>
      <text:p text:style-name="P117"><text:span text:style-name="T94"><text:s text:c="2"/></text:span><text:span text:style-name="T92">//</text:span><text:span text:style-name="T96">Assigns refer. block the token 'End' in its list of "blocks that closes"</text:span></text:p>
      <text:p text:style-name="P117"><text:span text:style-name="T38"><text:s text:c="2"/></text:span><text:span text:style-name="T26">AddFinBlockToTok</text:span><text:span text:style-name="T79">(</text:span><text:span text:style-name="T114">'End'</text:span><text:span text:style-name="T26">, 0, blq_codigo</text:span><text:span text:style-name="T79">);</text:span><text:span text:style-name="T26"> </text:span></text:p>
      <text:p text:style-name="P75"/>
      <text:p text:style-name="P75">The AddIniBlockToTok() method accesses to the list "BlksToOpen", of the special token, to add the reference to the indicated block. So when this token is identified, <text:s/>we will know it is the beginning of the block "blq_codigo". Likewise works AddFinBlockToTok() but with "BlksToClose" list.</text:p>
      <text:p text:style-name="P75"/>
      <text:p text:style-name="P75"><text:soft-page-break/>This new block definition gives us more freedom to:</text:p>
      <text:p text:style-name="P75"/>
      <text:list xml:id="list230306758198089" text:continue-list="list230306318972079" text:style-name="WW8Num17">
        <text:list-item>
          <text:p text:style-name="P221">Including the additional parameter "TokPos" in the delimiters.</text:p>
        </text:list-item>
        <text:list-item>
          <text:p text:style-name="P221">To include multiple delimiters.</text:p>
        </text:list-item>
      </text:list>
      <text:p text:style-name="P75"/>
      <text:p text:style-name="P9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7"><text:span text:style-name="T38"><text:s text:c="2"/></text:span><text:span text:style-name="T26">blq_codigo </text:span><text:span text:style-name="T79">: =</text:span><text:span text:style-name="T26"> hlt.CreateBlock</text:span><text:span text:style-name="T79">(</text:span><text:span text:style-name="T114">''</text:span><text:span text:style-name="T79">);</text:span><text:span text:style-name="T26"> </text:span><text:span text:style-name="T92">//</text:span><text:span text:style-name="T96">Create block </text:span></text:p>
      <text:p text:style-name="P117"><text:span text:style-name="T38"><text:s text:c="2"/></text:span><text:span text:style-name="T26">AddIniBlockToTok</text:span><text:span text:style-name="T79">(</text:span><text:span text:style-name="T114">'Start'</text:span><text:span text:style-name="T26">2, blq_codigo</text:span><text:span text:style-name="T79">);</text:span><text:span text:style-name="T26"> </text:span></text:p>
      <text:p text:style-name="P75"/>
      <text:p text:style-name="P75">Hopes to use as a starting delimiter, a special identifier that is declared like this:</text:p>
      <text:p text:style-name="P75"/>
      <text:p text:style-name="P117"><text:span text:style-name="T38"><text:s text:c="2"/></text:span><text:span text:style-name="T26">hlt.AddIdentSpec</text:span><text:span text:style-name="T79">(</text:span><text:span text:style-name="T114">'Start'</text:span><text:span text:style-name="T26">, </text:span><text:span text:style-name="T33">tn</text:span><text:span text:style-name="T26">Keyword, 2</text:span><text:span text:style-name="T79">);</text:span></text:p>
      <text:p text:style-name="P75"/>
      <text:p text:style-name="P75">If there is not this definition, it will proceed to create it, because the block require always <text:s/>the delimiters exist first as special tokens.</text:p>
      <text:p text:style-name="P75"/>
      <text:p text:style-name="P75">The alternative delimiters, definition allows us also, to define more than one start or end delimiter, for the same block.</text:p>
      <text:p text:style-name="P159"/>
      <text:p text:style-name="P159">For example if we want the BEGIN ... END block can also be open with the keyword START, then the statement would be:</text:p>
      <text:p text:style-name="P159"/>
      <text:p text:style-name="P117"><text:span text:style-name="T38"><text:s text:c="2"/></text:span><text:span text:style-name="T26">blq_codigo </text:span><text:span text:style-name="T79">: =</text:span><text:span text:style-name="T26"> hlt.CreateBlock</text:span><text:span text:style-name="T79">(</text:span><text:span text:style-name="T114">''</text:span><text:span text:style-name="T79">);</text:span><text:span text:style-name="T26"> </text:span><text:span text:style-name="T92">//</text:span><text:span text:style-name="T96">Create block </text:span></text:p>
      <text:p text:style-name="P117"><text:span text:style-name="T38"><text:s text:c="2"/></text:span><text:span text:style-name="T26">AddIniBlockToTok</text:span><text:span text:style-name="T79">(</text:span><text:span text:style-name="T114">'Begin'</text:span><text:span text:style-name="T26">, 0, blq_codigo</text:span><text:span text:style-name="T79">);</text:span><text:span text:style-name="T26"> </text:span></text:p>
      <text:p text:style-name="P117"><text:span text:style-name="T38"><text:s text:c="2"/></text:span><text:span text:style-name="T26">AddIniBlockToTok</text:span><text:span text:style-name="T79">(</text:span><text:span text:style-name="T114">'Start'</text:span><text:span text:style-name="T26">, 0, blq_codigo</text:span><text:span text:style-name="T79">);</text:span><text:span text:style-name="T26"> </text:span></text:p>
      <text:p text:style-name="P117"><text:span text:style-name="T38"><text:s text:c="2"/></text:span><text:span text:style-name="T26">AddFinBlockToTok</text:span><text:span text:style-name="T79">(</text:span><text:span text:style-name="T114">End '</text:span><text:span text:style-name="T26">, 0, blq_codigo</text:span><text:span text:style-name="T79">);</text:span><text:span text:style-name="T26"> </text:span></text:p>
      <text:p text:style-name="P159"/>
      <text:p text:style-name="P159">Each call to AddIniBlockToTok(), will define an additional starting delimiter. The same applies to AddFinBlockToTok().</text:p>
      <text:p text:style-name="P159"/>
      <text:p text:style-name="P75">The AddIniBlockToTok() and AddFinBlockToTok() makes a verification of the validity of the delimiters, the same way to how it works AddBlock(). This means it is advisable to always check if an error occurs in the definition of the delimiters. </text:p>
      <text:p text:style-name="P75"/>
      <text:p text:style-name="P100"/>
      <text:p text:style-name="P75"/>
      <text:list xml:id="list230304927256788" text:continue-list="list230305566359835" text:style-name="WW8Num24">
        <text:list-item>
          <text:list>
            <text:list-item>
              <text:h text:style-name="P246" text:outline-level="2"><text:bookmark-start text:name="__RefHeading___Toc404419509"/><text:soft-page-break/>Coloring of <text:s/>blocks<text:bookmark-end text:name="__RefHeading___Toc404419509"/></text:h>
            </text:list-item>
          </text:list>
        </text:list-item>
      </text:list>
      <text:p text:style-name="P15"/>
      <text:p text:style-name="P75">As an additional feature, the highlighter lets us to color the background of the blocks to provide a visual aid, to identify the blocks extension. </text:p>
      <text:p text:style-name="P75"/>
      <text:p text:style-name="P75">To activate the coloring of blocks, we must set the "ColBlock" property of the highlighter. Allowed values ​​are:</text:p>
      <text:p text:style-name="P75"/>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5"/>
      <text:p text:style-name="P75">The following code sample sets the colored highlighter by level:</text:p>
      <text:p text:style-name="P75"/>
      <text:p text:style-name="P127">var</text:p>
      <text:p text:style-name="P117"><text:span text:style-name="T38"><text:s text:c="4"/></text:span><text:span text:style-name="T26">hlt </text:span><text:span text:style-name="T79">:</text:span><text:span text:style-name="T26"> TSynFacilSyn</text:span><text:span text:style-name="T79">;</text:span></text:p>
      <text:p text:style-name="P127">begin</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highlighter</text:span></text:p>
      <text:p text:style-name="P117"><text:span text:style-name="T38"><text:s text:c="2"/></text:span><text:span text:style-name="T26">SynEdit1.Highlighter </text:span><text:span text:style-name="T79">: =</text:span><text:span text:style-name="T26"> hlt</text:span><text:span text:style-name="T79">;</text:span></text:p>
      <text:p text:style-name="P117"><text:span text:style-name="T38"><text:s text:c="2"/></text:span><text:span text:style-name="T26">hlt.ColBlock</text:span><text:span text:style-name="T79">: =</text:span><text:span text:style-name="T25"> </text:span><text:span text:style-name="T26">cbLevel</text:span><text:span text:style-name="T79">;</text:span><text:span text:style-name="T26"> </text:span><text:span text:style-name="T92">//</text:span><text:span text:style-name="T96">colored set</text:span></text:p>
      <text:p text:style-name="P117"><text:span text:style-name="T38"><text:s text:c="2"/></text:span><text:span text:style-name="T26">hlt.AddBlock</text:span><text:span text:style-name="T79">(</text:span><text:span text:style-name="T114">'{'</text:span><text:span text:style-name="T26">,</text:span><text:span text:style-name="T114">'}'</text:span><text:span text:style-name="T79">);</text:span><text:span text:style-name="T26"> </text:span><text:span text:style-name="T92">//</text:span><text:span text:style-name="T96">creates block</text:span></text:p>
      <text:p text:style-name="P117"><text:span text:style-name="T38"><text:s text:c="2"/></text:span><text:span text:style-name="T26">hlt.Rebuild</text:span><text:span text:style-name="T79">;</text:span></text:p>
      <text:p text:style-name="P75"/>
      <text:p text:style-name="P75">When we set “ColBlock” to "cbLevel", it will proceed to do and automatic coloring <text:s/>of blocks, using the nesting level of each block. The following example shows how a simple C code would look with colored Level:</text:p>
      <text:p text:style-name="P75"/>
      <text:p text:style-name="P92"><draw:frame draw:style-name="fr4" draw:name="Image22" text:anchor-type="as-char" svg:width="9.922cm" svg:height="5.265cm" draw:z-index="72"><draw:image xlink:href="Pictures/1000000000000177000000C7663F0C9D8206C8D4.png" xlink:type="simple" xlink:show="embed" xlink:actuate="onLoad"/></draw:frame></text:p>
      <text:p text:style-name="P75"/>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5">The blocks only allow you to change the background color of the tokens that are contained in the block (including spaces). When the colored block is activated, the "Background" property attributes tokens are ignored.</text:p>
      <text:p text:style-name="P15"/>
      <text:p text:style-name="P75">You can not change the text color or some other visual attribute of tokens within a block. These always correspond to what is defined in the attributes of the highlighter.</text:p>
      <text:p text:style-name="P15"/>
      <text:p text:style-name="P75">The other colored is colored by block. If we ColorBlock in "cbBlock" will be colored using as background color, the color defined for each block. The figure below shows how the same text would be using colored blocks.</text:p>
      <text:p text:style-name="P75"/>
      <text:p text:style-name="P92"><draw:frame draw:style-name="fr4" draw:name="Image23" text:anchor-type="as-char" svg:width="10.345cm" svg:height="5.371cm" draw:z-index="17"><draw:image xlink:href="Pictures/1000000000000187000000CB33AA4C3E74D5CCC9.png" xlink:type="simple" xlink:show="embed" xlink:actuate="onLoad"/></draw:frame></text:p>
      <text:p text:style-name="P75"/>
      <text:p text:style-name="P75">This type of coloring, does not take into account the level of nesting, but uses the custom color that is specified in the definition of each block.</text:p>
      <text:p text:style-name="P75"/>
      <text:p text:style-name="P75">The background color of a block is specified in the "BackCol" property of the block. To change this property, you must have the reference to the object block:</text:p>
      <text:p text:style-name="P75"/>
      <text:p text:style-name="P127">var</text:p>
      <text:p text:style-name="P117"><text:span text:style-name="T38"><text:s text:c="2"/></text:span><text:span text:style-name="T26">hlt </text:span><text:span text:style-name="T79">:</text:span><text:span text:style-name="T26"> TSynFacilSyn</text:span><text:span text:style-name="T79">;</text:span></text:p>
      <text:p text:style-name="P117"><text:span text:style-name="T38"><text:s text:c="2"/></text:span><text:span text:style-name="T26">bl_llaves</text:span><text:span text:style-name="T79">:</text:span><text:span text:style-name="T26"> TFaSynBlock</text:span><text:span text:style-name="T79">;</text:span><text:span text:style-name="T26"> </text:span><text:span text:style-name="T92">//</text:span><text:span text:style-name="T96">object block</text:span></text:p>
      <text:p text:style-name="P127">begin</text:p>
      <text:p text:style-name="P117"><text:span text:style-name="T38"><text:s text:c="2"/></text:span><text:span text:style-name="T26">hlt </text:span><text:span text:style-name="T79">: =</text:span><text:span text:style-name="T26"> TSynFacilSyn.Create</text:span><text:span text:style-name="T79">(</text:span><text:span text:style-name="T11">self</text:span><text:span text:style-name="T79">);</text:span><text:span text:style-name="T26"> </text:span><text:span text:style-name="T92">//</text:span><text:span text:style-name="T96">creates highlighter</text:span></text:p>
      <text:p text:style-name="P117"><text:soft-page-break/><text:span text:style-name="T38"><text:s text:c="2"/></text:span><text:span text:style-name="T26">SynEdit1.Highlighter </text:span><text:span text:style-name="T79">: =</text:span><text:span text:style-name="T26"> hlt</text:span><text:span text:style-name="T79">;</text:span></text:p>
      <text:p text:style-name="P117"><text:span text:style-name="T38"><text:s text:c="2"/></text:span><text:span text:style-name="T26">hlt.ColBlock</text:span><text:span text:style-name="T79">: =</text:span><text:span text:style-name="T26">cbBlock</text:span><text:span text:style-name="T79">;</text:span><text:span text:style-name="T26"> </text:span><text:span text:style-name="T92">//</text:span><text:span text:style-name="T96">colored active block individually.</text:span></text:p>
      <text:p text:style-name="P117"><text:span text:style-name="T38"><text:s text:c="2"/></text:span><text:span text:style-name="T26">bl_llaves </text:span><text:span text:style-name="T79">: =</text:span><text:span text:style-name="T26"> hlt.AddBlock</text:span><text:span text:style-name="T79">(</text:span><text:span text:style-name="T114">'{'</text:span><text:span text:style-name="T26">,</text:span><text:span text:style-name="T114">'}'</text:span><text:span text:style-name="T79">);</text:span><text:span text:style-name="T26"> </text:span><text:span text:style-name="T92">//</text:span><text:span text:style-name="T96">creates block</text:span></text:p>
      <text:p text:style-name="P117"><text:span text:style-name="T38"><text:s text:c="2"/></text:span><text:span text:style-name="T26">bl_llaves.BackCol</text:span><text:span text:style-name="T79">: =</text:span><text:span text:style-name="T26">clYellow</text:span><text:span text:style-name="T79">;</text:span><text:span text:style-name="T26"> </text:span><text:span text:style-name="T92">//Set the </text:span><text:span text:style-name="T96">background color of the block.</text:span></text:p>
      <text:p text:style-name="P117"><text:span text:style-name="T38"><text:s text:c="2"/></text:span><text:span text:style-name="T26">hlt.Rebuild</text:span><text:span text:style-name="T79">;</text:span><text:span text:style-name="T26"> </text:span><text:span text:style-name="T92">//</text:span><text:span text:style-name="T96">reconstructs</text:span></text:p>
      <text:p text:style-name="P75"/>
      <text:p text:style-name="P15"><text:tab/>If not want to specify a particular color for a block without or want to use the color of the previous block, use the constant: COL_TRANSPAR: </text:p>
      <text:p text:style-name="P15"/>
      <text:p text:style-name="P117"><text:span text:style-name="T38"><text:s text:c="2"/></text:span><text:span text:style-name="T26">bl_llaves.BackCol</text:span><text:span text:style-name="T79">: =</text:span><text:span text:style-name="T26">COL_TRANSPAR</text:span><text:span text:style-name="T79">;</text:span><text:span text:style-name="T26"> </text:span><text:span text:style-name="T92">//Set</text:span><text:span text:style-name="T96"> transparent color.</text:span></text:p>
      <text:p text:style-name="P15"/>
      <text:p text:style-name="P75">It should be noted that by using the colored block work requires more processing in the highlighter, which when used for level highlighted.</text:p>
      <text:p text:style-name="P15"/>
      <text:list xml:id="list230304826983132" text:continue-numbering="true" text:style-name="WW8Num24">
        <text:list-item>
          <text:list>
            <text:list-item>
              <text:h text:style-name="P250" text:outline-level="2"><text:bookmark-start text:name="__RefHeading___Toc404419510"/>Scope of a block <text:bookmark-end text:name="__RefHeading___Toc404419510"/></text:h>
            </text:list-item>
          </text:list>
        </text:list-item>
      </text:list>
      <text:p text:style-name="P15"/>
      <text:p text:style-name="P75">The definition of a block is, by default, valid anywhere in the text. Thus, if we define the block:</text:p>
      <text:p text:style-name="P75"/>
      <text:p text:style-name="P117"><text:span text:style-name="T38"><text:s text:c="2"/></text:span><text:span text:style-name="T26">bl_llaves </text:span><text:span text:style-name="T79">: =</text:span><text:span text:style-name="T26"> hlt.AddBlock</text:span><text:span text:style-name="T79">(</text:span><text:span text:style-name="T114">'{'</text:span><text:span text:style-name="T26">,</text:span><text:span text:style-name="T114">'}'</text:span><text:span text:style-name="T79">);</text:span></text:p>
      <text:p text:style-name="P75"/>
      <text:p text:style-name="P75">This definition will always be valid, ie, whenever the highlighter find the special symbol "{", shall open the block "bl_llaves" and in the same way, each time it finds the symbol "}", proceed to close block.</text:p>
      <text:p text:style-name="P75"/>
      <text:p text:style-name="P75">So if we write C code with this syntax, we get the following image:</text:p>
      <text:p text:style-name="P75"/>
      <text:p text:style-name="P92"><draw:frame draw:style-name="fr4" draw:name="Image24" text:anchor-type="as-char" svg:width="9.922cm" svg:height="5.265cm" draw:z-index="23"><draw:image xlink:href="Pictures/1000000000000177000000C7663F0C9D8206C8D4.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5"/>
      <text:p text:style-name="P75">This is because in the block definition, have not specified the scope of the block in the "parentBlk" parameter, and this has taken the NIL value, which means that the block is valid anywhere where it appears.</text:p>
      <text:p text:style-name="P15"/>
      <text:p text:style-name="P75">The same result would have obtained had we explicitly since the block is valid anywhere using the following form:</text:p>
      <text:p text:style-name="P75"/>
      <text:p text:style-name="P117"><text:span text:style-name="T38"><text:s text:c="2"/></text:span><text:span text:style-name="T26">bl_llaves </text:span><text:span text:style-name="T79">: =</text:span><text:span text:style-name="T26"> hlt.AddBlock</text:span><text:span text:style-name="T79">(</text:span><text:span text:style-name="T114">'{'</text:span><text:span text:style-name="T26">,</text:span><text:span text:style-name="T114">'}'</text:span><text:span text:style-name="T26">,</text:span><text:span text:style-name="T11">true</text:span><text:span text:style-name="T26">,</text:span><text:span text:style-name="T11">nil</text:span><text:span text:style-name="T79">);</text:span></text:p>
      <text:p text:style-name="P100"/>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17"><text:span text:style-name="T38"><text:s text:c="2"/></text:span><text:span text:style-name="T26">aqui_si </text:span><text:span text:style-name="T79">: =</text:span><text:span text:style-name="T26"> hlt.AddBlock</text:span><text:span text:style-name="T79">(</text:span><text:span text:style-name="T114">'Aqui_si'</text:span><text:span text:style-name="T26">,</text:span><text:span text:style-name="T114">'fin'</text:span><text:span text:style-name="T79">);</text:span></text:p>
      <text:p text:style-name="P117"><text:span text:style-name="T38"><text:s text:c="2"/></text:span><text:span text:style-name="T26">bl_llaves </text:span><text:span text:style-name="T79">: =</text:span><text:span text:style-name="T26"> hlt.AddBlock</text:span><text:span text:style-name="T79">(</text:span><text:span text:style-name="T114">'{'</text:span><text:span text:style-name="T26">,</text:span><text:span text:style-name="T114">'}'</text:span><text:span text:style-name="T26">,</text:span><text:span text:style-name="T11">true</text:span><text:span text:style-name="T26">, Aqui_si</text:span><text:span text:style-name="T79">);</text:span></text:p>
      <text:p text:style-name="P123"/>
      <text:p text:style-name="P15"/>
      <text:p text:style-name="P15"><text:tab/>A sample code will show the effect of this definition:</text:p>
      <text:p text:style-name="P15"/>
      <text:p text:style-name="P39"><draw:frame draw:style-name="fr4" draw:name="Image25" text:anchor-type="as-char" svg:width="9.922cm" svg:height="6.033cm" draw:z-index="2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17"><text:span text:style-name="T38"><text:s text:c="2"/></text:span><text:span text:style-name="T26">bl_llaves </text:span><text:span text:style-name="T79">: =</text:span><text:span text:style-name="T26"> hlt.AddBlock</text:span><text:span text:style-name="T79">(</text:span><text:span text:style-name="T114">'{'</text:span><text:span text:style-name="T26">,</text:span><text:span text:style-name="T114">'}'</text:span><text:span text:style-name="T26">,</text:span><text:span text:style-name="T11">true</text:span><text:span text:style-name="T26">, Hlt.MainBlk</text:span><text:span text:style-name="T79">);</text:span></text:p>
      <text:p text:style-name="P123"/>
      <text:p text:style-name="P15"/>
      <text:p text:style-name="P159">We could have the following result:</text:p>
      <text:p text:style-name="P159"/>
      <text:p text:style-name="P161"><text:soft-page-break/><draw:frame draw:style-name="fr4" draw:name="Image26" text:anchor-type="as-char" svg:width="9.737cm" svg:height="5.503cm" draw:z-index="73"><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9">The "MainBlk" block, as we remember, is a predefined block highlighter, which includes the entire file. All tokens and blocks (or sections), believed to be directly or indirectly contained in the block "Main". </text:p>
      <text:p text:style-name="P159"/>
      <text:p text:style-name="P159">The interior of any block, is no longer part of the block "MainBlk". Only tokens or structures that are not within another block, pertain directly to the block "MainBlk"</text:p>
      <text:p text:style-name="P159"/>
      <text:p text:style-name="P162"><draw:custom-shape text:anchor-type="char" draw:z-index="31" draw:style-name="gr4" draw:text-style-name="P270" svg:width="3.123cm" svg:height="1.297cm" svg:x="-0.079cm" svg:y="0.656cm"><text:p text:style-name="P269"><text:span text:style-name="T167">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32" draw:style-name="gr4" draw:text-style-name="P270" svg:width="3.123cm" svg:height="1.297cm" svg:x="0.185cm" svg:y="2.323cm"><text:p text:style-name="P269"><text:span text:style-name="T167">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74"><draw:image xlink:href="Pictures/1000000000000177000000C7663F0C9D8206C8D4.png" xlink:type="simple" xlink:show="embed" xlink:actuate="onLoad"/></draw:frame></text:p>
      <text:p text:style-name="P159"/>
      <text:p text:style-name="P159">When blocks are only valid in the block "MainBlk", they are preventing these can be nested and may appear only in the main body are created.</text:p>
      <text:p text:style-name="P159"/>
      <text:p text:style-name="P159">You can limit the nesting level of a block. This requires specifying the structure, each block corresponding to each level. </text:p>
      <text:p text:style-name="P159"/>
      <text:p text:style-name="P159">The following example is a definition to allow only two levels of keys:</text:p>
      <text:p text:style-name="P159"><text:soft-page-break/></text:p>
      <text:p text:style-name="P117"><text:span text:style-name="T38"><text:s text:c="2"/></text:span><text:span text:style-name="T92">//</text:span><text:span text:style-name="T96">valid block "MainBlk"</text:span></text:p>
      <text:p text:style-name="P117"><text:span text:style-name="T38"><text:s text:c="2"/></text:span><text:span text:style-name="T26">bl_llaves </text:span><text:span text:style-name="T79">: =</text:span><text:span text:style-name="T26"> hlt.AddBlock</text:span><text:span text:style-name="T79">(</text:span><text:span text:style-name="T114">'{'</text:span><text:span text:style-name="T26">,</text:span><text:span text:style-name="T114">'}'</text:span><text:span text:style-name="T26">,</text:span><text:span text:style-name="T11">true</text:span><text:span text:style-name="T26">, Hlt.MainBlk</text:span><text:span text:style-name="T79">);</text:span></text:p>
      <text:p text:style-name="P117"><text:span text:style-name="T38"><text:s text:c="2"/></text:span><text:span text:style-name="T92">//</text:span><text:span text:style-name="T96">valid block "bl_llaves"</text:span></text:p>
      <text:p text:style-name="P117"><text:span text:style-name="T38"><text:s text:c="2"/></text:span><text:span text:style-name="T26">bl_llaves2 </text:span><text:span text:style-name="T79">: =</text:span><text:span text:style-name="T26"> hlt.AddBlock</text:span><text:span text:style-name="T79">(</text:span><text:span text:style-name="T114">'{'</text:span><text:span text:style-name="T26">,</text:span><text:span text:style-name="T114">'}'</text:span><text:span text:style-name="T26">,</text:span><text:span text:style-name="T11">true</text:span><text:span text:style-name="T26">, Bl_llaves</text:span><text:span text:style-name="T79">);</text:span></text:p>
      <text:p text:style-name="P159"/>
      <text:p text:style-name="P159">Now with this definition, be permitted to include a block "{}", within another, but no more. Thus, if a third nesting can be included, fail syntax:</text:p>
      <text:p text:style-name="P159"/>
      <text:p text:style-name="P161"><draw:frame draw:style-name="fr4" draw:name="Image28" text:anchor-type="as-char" svg:width="9.922cm" svg:height="6.033cm" draw:z-index="75"><draw:image xlink:href="Pictures/1000000000000177000000E4ACB8A853EE6E8AEB.png" xlink:type="simple" xlink:show="embed" xlink:actuate="onLoad"/></draw:frame></text:p>
      <text:p text:style-name="P159"/>
      <text:p text:style-name="P159">Note that that "bl_llaves" so that this definition to work properly, it is necessary, is defined only in the main block "MainBlk". Otherwise will have no effect, nesting limit we want.</text:p>
      <text:p text:style-name="P159"/>
      <text:list xml:id="list230306538615797" text:continue-numbering="true" text:style-name="WW8Num24">
        <text:list-item>
          <text:list>
            <text:list-item>
              <text:h text:style-name="P246" text:outline-level="2"><text:bookmark-start text:name="__RefHeading___Toc404419511"/>Defining sections<text:bookmark-end text:name="__RefHeading___Toc404419511"/></text:h>
            </text:list-item>
          </text:list>
        </text:list-item>
      </text:list>
      <text:p text:style-name="P75"/>
      <text:p text:style-name="P75">Defined with Addsection() method, which has the following declaration:</text:p>
      <text:p text:style-name="P159"/>
      <text:p text:style-name="P117"><text:span text:style-name="T11">function </text:span><text:span text:style-name="T26">TSynFacilSyn.AddSection</text:span><text:span text:style-name="T79">(</text:span></text:p>
      <text:p text:style-name="P117"><text:span text:style-name="T80"><text:s text:c="2"/></text:span><text:span text:style-name="T26">dStart</text:span><text:span text:style-name="T79">:</text:span><text:span text:style-name="T26"> </text:span><text:span text:style-name="T11">string</text:span><text:span text:style-name="T79">;</text:span><text:span text:style-name="T26"> </text:span></text:p>
      <text:p text:style-name="P117"><text:span text:style-name="T38"><text:s text:c="2"/></text:span><text:span text:style-name="T26">showFold</text:span><text:span text:style-name="T79">:</text:span><text:span text:style-name="T26"> boolean </text:span><text:span text:style-name="T79">=</text:span><text:span text:style-name="T26"> </text:span><text:span text:style-name="T11">true</text:span><text:span text:style-name="T79">;</text:span><text:span text:style-name="T26"> </text:span></text:p>
      <text:p text:style-name="P117"><text:span text:style-name="T38"><text:s text:c="2"/></text:span><text:span text:style-name="T26">parentBlk</text:span><text:span text:style-name="T79">:</text:span><text:span text:style-name="T26"> TFaSynBlock </text:span><text:span text:style-name="T79">=</text:span><text:span text:style-name="T26"> </text:span><text:span text:style-name="T11">nil</text:span><text:span text:style-name="T79">;</text:span></text:p>
      <text:p text:style-name="P117"><text:span text:style-name="T79">):</text:span><text:span text:style-name="T26"> TFaSynBlock</text:span><text:span text:style-name="T79">;</text:span></text:p>
      <text:p text:style-name="P75"/>
      <text:p text:style-name="P75">The description of the parameters is:</text:p>
      <text:p text:style-name="P7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5"/>
      <text:p text:style-name="P75">A section parameters are similar to the parameters of a block, except that there is not the ending delimiter, because the blocks have another mechanism to determine an end. </text:p>
      <text:p text:style-name="P75"/>
      <text:p text:style-name="P75">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5"/>
      <text:p text:style-name="P75">As the sections are also blocks most blocks rules apply also here. Coloring sections also is similar to the colored blocks.</text:p>
      <text:p text:style-name="P75"/>
      <text:p text:style-name="P75">A simple case of block definition would be:</text:p>
      <text:p text:style-name="P75"/>
      <text:p text:style-name="P117"><text:span text:style-name="T38"><text:s text:c="2"/></text:span><text:span text:style-name="T26">hlt.AddSection</text:span><text:span text:style-name="T79">(</text:span><text:span text:style-name="T114">'Implementation'</text:span><text:span text:style-name="T79">);</text:span></text:p>
      <text:p text:style-name="P123">...</text:p>
      <text:p text:style-name="P117"><text:span text:style-name="T38"><text:s text:c="2"/></text:span><text:span text:style-name="T26">hlt.Rebuild</text:span><text:span text:style-name="T79">;</text:span></text:p>
      <text:p text:style-name="P75"/>
      <text:p text:style-name="P75">This section will extend from after the token "interface" to the end of the program, if any other section is defined. </text:p>
      <text:p text:style-name="P75"/>
      <text:p text:style-name="P75">The Rebuild() method, must be executed, always, after entering all sections and blocks, otherwise it may not effect the definition.</text:p>
      <text:p text:style-name="P75"/>
      <text:p text:style-name="P75">You can define as many sections as you want, considering that more of them, the greater the processing that should do the highlighter.</text:p>
      <text:p text:style-name="P75"/>
      <text:p text:style-name="P75">If we define two sections, then we are dividing the code into two or more parts:</text:p>
      <text:p text:style-name="P75"/>
      <text:p text:style-name="P117"><text:span text:style-name="T38"><text:s text:c="2"/></text:span><text:span text:style-name="T26">hlt.AddSection</text:span><text:span text:style-name="T79">(</text:span><text:span text:style-name="T114">'Interface'</text:span><text:span text:style-name="T79">);</text:span></text:p>
      <text:p text:style-name="P117"><text:span text:style-name="T38"><text:s text:c="2"/></text:span><text:span text:style-name="T26">hlt.AddSection</text:span><text:span text:style-name="T79">(</text:span><text:span text:style-name="T114">'Implementation'</text:span><text:span text:style-name="T79">);</text:span></text:p>
      <text:p text:style-name="P75"/>
      <text:p text:style-name="P75">Now we have that, an "interface" section may end at the begining of an "implementation" section, if there is one.</text:p>
      <text:p text:style-name="P75"/>
      <text:p text:style-name="P75">The following figure shows a sample code with the created sections:</text:p>
      <text:p text:style-name="P75"/>
      <text:p text:style-name="P92"><text:soft-page-break/><draw:frame draw:style-name="fr4" draw:name="Image29" text:anchor-type="as-char" svg:width="10.689cm" svg:height="5.9cm" draw:z-index="76"><draw:image xlink:href="Pictures/1000000000000194000000DF90362ABAEA77896C.png" xlink:type="simple" xlink:show="embed" xlink:actuate="onLoad"/></draw:frame></text:p>
      <text:p text:style-name="P75"/>
      <text:p text:style-name="P75">The order in which the sections are defined is not important. Does not imply an order in recognizing sections. In our example the sections have been correctly recognized, and including a duplicate section.</text:p>
      <text:p text:style-name="P75"/>
      <text:p text:style-name="P75">To avoid that the same section, be recognized two or more consecutive times, use the property "UniqSec" of the block. If activated, it will not allow a repeat section after herself. This means that only recognize the first time it appears.</text:p>
      <text:p text:style-name="P75"/>
      <text:p text:style-name="P75">In our example does not allow the same section consecutively, we'd have:</text:p>
      <text:p text:style-name="P75"/>
      <text:p text:style-name="P127">var</text:p>
      <text:p text:style-name="P117"><text:span text:style-name="T38"><text:s text:c="2"/></text:span><text:span text:style-name="T26">sec1, sec2</text:span><text:span text:style-name="T79">:</text:span><text:span text:style-name="T26"> TFaSynBlock</text:span><text:span text:style-name="T79">;</text:span></text:p>
      <text:p text:style-name="P123">...</text:p>
      <text:p text:style-name="P117"><text:span text:style-name="T38"><text:s text:c="2"/></text:span><text:span text:style-name="T26">sec1 </text:span><text:span text:style-name="T79">: =</text:span><text:span text:style-name="T26"> hlt.AddSection</text:span><text:span text:style-name="T79">(</text:span><text:span text:style-name="T114">'Interface'</text:span><text:span text:style-name="T79">);</text:span></text:p>
      <text:p text:style-name="P117"><text:span text:style-name="T38"><text:s text:c="2"/></text:span><text:span text:style-name="T26">sec2 </text:span><text:span text:style-name="T79">: =</text:span><text:span text:style-name="T26"> hlt.AddSection</text:span><text:span text:style-name="T79">(</text:span><text:span text:style-name="T114">'Implementation'</text:span><text:span text:style-name="T79">);</text:span></text:p>
      <text:p text:style-name="P117"><text:span text:style-name="T38"><text:s text:c="2"/></text:span><text:span text:style-name="T26">sec1.UniqSec</text:span><text:span text:style-name="T79">: =</text:span><text:span text:style-name="T11">true</text:span><text:span text:style-name="T79">;</text:span></text:p>
      <text:p text:style-name="P117"><text:span text:style-name="T38"><text:s text:c="2"/></text:span><text:span text:style-name="T26">sec2.UniqSec</text:span><text:span text:style-name="T79">: =</text:span><text:span text:style-name="T11">true</text:span><text:span text:style-name="T79">;</text:span></text:p>
      <text:p text:style-name="P75"/>
      <text:p text:style-name="P75">The effect would be this:</text:p>
      <text:p text:style-name="P75"/>
      <text:p text:style-name="P92"><text:soft-page-break/><draw:frame draw:style-name="fr4" draw:name="Image30" text:anchor-type="as-char" svg:width="11.351cm" svg:height="5.847cm" draw:z-index="28"><draw:image xlink:href="Pictures/10000000000001AD000000DD95B805C0D9CE8245.png" xlink:type="simple" xlink:show="embed" xlink:actuate="onLoad"/></draw:frame></text:p>
      <text:p text:style-name="P75"/>
      <text:p text:style-name="P75">As you can see, there is only one "implementation" section (see fold mark), since the latter is not regarded as a new section. However, if it is possible to define "implementation" section again, after an "interface" section.</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examples seen previously worked only in the main block, but sections can also work within other specific blocks. This is to segment regions of code within these blocks.</text:p>
      <text:p text:style-name="P75"/>
      <text:p text:style-name="P75">As an example consider the class declaration syntax in Pascal. In it, there may be the "private", "public" and "protected" sections. </text:p>
      <text:p text:style-name="P75"/>
      <text:p text:style-name="P75">To define these sections within the class declaration, we first define a block that includes the class, and then the inner sections.</text:p>
      <text:p text:style-name="P75"/>
      <text:p text:style-name="P117"><text:span text:style-name="T38"><text:s text:c="2"/></text:span><text:span text:style-name="T26">bloClas </text:span><text:span text:style-name="T79">: =</text:span><text:span text:style-name="T26"> hlt.AddBlock</text:span><text:span text:style-name="T79">(</text:span><text:span text:style-name="T114">'Class'</text:span><text:span text:style-name="T26">,</text:span><text:span text:style-name="T114">'End'</text:span><text:span text:style-name="T79">);</text:span></text:p>
      <text:p text:style-name="P117"><text:span text:style-name="T38"><text:s text:c="2"/></text:span><text:span text:style-name="T26">hlt.AddSection</text:span><text:span text:style-name="T79">(</text:span><text:span text:style-name="T114">'Private'</text:span><text:span text:style-name="T26">,</text:span><text:span text:style-name="T11">true</text:span><text:span text:style-name="T26">, BloClas</text:span><text:span text:style-name="T79">);</text:span></text:p>
      <text:p text:style-name="P117"><text:span text:style-name="T38"><text:s text:c="2"/></text:span><text:span text:style-name="T26">hlt.AddSection</text:span><text:span text:style-name="T79">(</text:span><text:span text:style-name="T114">'Public'</text:span><text:span text:style-name="T26">,</text:span><text:span text:style-name="T11">true</text:span><text:span text:style-name="T26">, BloClas</text:span><text:span text:style-name="T79">);</text:span></text:p>
      <text:p text:style-name="P117"><text:span text:style-name="T38"><text:s text:c="2"/></text:span><text:span text:style-name="T26">hlt.AddSection</text:span><text:span text:style-name="T79">(</text:span><text:span text:style-name="T114">'Protected'</text:span><text:span text:style-name="T26">,</text:span><text:span text:style-name="T11">true</text:span><text:span text:style-name="T26">, BloClas</text:span><text:span text:style-name="T79">);</text:span></text:p>
      <text:p text:style-name="P75"/>
      <text:p text:style-name="P75">A class declaration text, would be as shown in the following figure:</text:p>
      <text:p text:style-name="P75"/>
      <text:p text:style-name="P39"><text:soft-page-break/><draw:frame draw:style-name="fr4" draw:name="Image31" text:anchor-type="as-char" svg:width="11.748cm" svg:height="6.085cm" draw:z-index="77"><draw:image xlink:href="Pictures/10000000000001BC000000E68F89781137175A69.png" xlink:type="simple" xlink:show="embed" xlink:actuate="onLoad"/></draw:frame></text:p>
      <text:p text:style-name="P75"/>
      <text:p text:style-name="P75"/>
      <text:list xml:id="list230306126621667" text:continue-numbering="true" text:style-name="WW8Num24">
        <text:list-item>
          <text:list>
            <text:list-item>
              <text:h text:style-name="P246" text:outline-level="2"><text:bookmark-start text:name="__RefHeading___Toc404419512"/>First Section<text:bookmark-end text:name="__RefHeading___Toc404419512"/></text:h>
            </text:list-item>
          </text:list>
        </text:list-item>
      </text:list>
      <text:p text:style-name="P75"/>
      <text:p text:style-name="P75">Sections usually begin, after the block that containing it, has begun. However, it may be that we need to open a section while a block is open.</text:p>
      <text:p text:style-name="P75"/>
      <text:p text:style-name="P75">This is what is called the "First Section". To understand this concept, consider the following structure:</text:p>
      <text:p text:style-name="P75"/>
      <text:p text:style-name="P75">SELECT field1, </text:p>
      <text:p text:style-name="P75">field2</text:p>
      <text:p text:style-name="P75">FROM</text:p>
      <text:p text:style-name="P75">table1, table2</text:p>
      <text:p text:style-name="P75">;</text:p>
      <text:p text:style-name="P75"/>
      <text:p text:style-name="P75">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5"/>
      <text:p text:style-name="P75">The first solution would be to simply define two separate sections that begin with SELECT and FROM words. But if we wanted to keep the syntactic unit of full consultation, should be included in a block.</text:p>
      <text:p text:style-name="P75"/>
      <text:p text:style-name="P75">As a solution will raise the option of defining a block begins with the word Reserved SELECT and end with a semicolon:</text:p>
      <text:p text:style-name="P75"/>
      <text:p text:style-name="P117"><text:soft-page-break/><text:span text:style-name="T38"><text:s text:c="2"/></text:span><text:span text:style-name="T26">bloSelect</text:span><text:span text:style-name="T79">: =</text:span><text:span text:style-name="T26"> hlt.AddBlock</text:span><text:span text:style-name="T79">(</text:span><text:span text:style-name="T114">'SELECT'</text:span><text:span text:style-name="T26">,</text:span><text:span text:style-name="T114">'</text:span><text:span text:style-name="T115">;</text:span><text:span text:style-name="T114">'</text:span><text:span text:style-name="T79">);</text:span></text:p>
      <text:p text:style-name="P75"/>
      <text:p text:style-name="P75">In this way we manage the entire query as a block. But now we need to divide it into two sections. The FROM section offers no problem, because it is a common section. </text:p>
      <text:p text:style-name="P75"/>
      <text:p text:style-name="P75">However, the first section, which starts with SELECT, can not be defined directly as SELECT, it is also the starting delimiter of the block. If we tried to define it like this:</text:p>
      <text:p text:style-name="P75"/>
      <text:p text:style-name="P117"><text:span text:style-name="T38"><text:s text:c="2"/></text:span><text:span text:style-name="T26">bloSelect</text:span><text:span text:style-name="T79">: =</text:span><text:span text:style-name="T26"> hlt.AddBlock</text:span><text:span text:style-name="T79">(</text:span><text:span text:style-name="T114">'SELECT'</text:span><text:span text:style-name="T26">,</text:span><text:span text:style-name="T114">'</text:span><text:span text:style-name="T115">;</text:span><text:span text:style-name="T114">'</text:span><text:span text:style-name="T79">);</text:span></text:p>
      <text:p text:style-name="P117"><text:span text:style-name="T38"><text:s text:c="2"/></text:span><text:span text:style-name="T26">hlt.AddSection</text:span><text:span text:style-name="T79">(</text:span><text:span text:style-name="T114">'SELECT'</text:span><text:span text:style-name="T26">,</text:span><text:span text:style-name="T11">true</text:span><text:span text:style-name="T26">, BloSelect</text:span><text:span text:style-name="T79">);</text:span></text:p>
      <text:p text:style-name="P117"><text:span text:style-name="T38"><text:s text:c="2"/></text:span><text:span text:style-name="T26">hlt.AddSection</text:span><text:span text:style-name="T79">(</text:span><text:span text:style-name="T114">'FROM'</text:span><text:span text:style-name="T26">,</text:span><text:span text:style-name="T11">true</text:span><text:span text:style-name="T26">, BloSelect</text:span><text:span text:style-name="T79">);</text:span></text:p>
      <text:p text:style-name="P75"/>
      <text:p text:style-name="P75">The SELECT section would not open at the beginning of the consultation, because verification of sections, is made after recognizing the word SELECT.</text:p>
      <text:p text:style-name="P75"/>
      <text:p text:style-name="P75">To open the block, while a section, we set up a special section on the delimiter token. This is called "First Section". </text:p>
      <text:p text:style-name="P75"/>
      <text:p text:style-name="P75">To create a first section, use the AddFirstSection() method, which is similar to Addsection(), in his statement: </text:p>
      <text:p text:style-name="P75"/>
      <text:p text:style-name="P117"><text:span text:style-name="T11">function </text:span><text:span text:style-name="T26">TSynFacilSyn.AddFirstSection</text:span><text:span text:style-name="T79">(</text:span></text:p>
      <text:p text:style-name="P117"><text:span text:style-name="T80"><text:s text:c="6"/></text:span><text:span text:style-name="T26">dStart</text:span><text:span text:style-name="T79">:</text:span><text:span text:style-name="T26"> </text:span><text:span text:style-name="T11">string</text:span><text:span text:style-name="T79">;</text:span><text:span text:style-name="T26"> showFold</text:span><text:span text:style-name="T79">:</text:span><text:span text:style-name="T26"> </text:span></text:p>
      <text:p text:style-name="P117"><text:span text:style-name="T38"><text:s text:c="6"/></text:span><text:span text:style-name="T26">boolean </text:span><text:span text:style-name="T79">=</text:span><text:span text:style-name="T26"> </text:span><text:span text:style-name="T11">true</text:span><text:span text:style-name="T79">;</text:span></text:p>
      <text:p text:style-name="P117"><text:span text:style-name="T38"><text:s text:c="6"/></text:span><text:span text:style-name="T26">parentBlk</text:span><text:span text:style-name="T79">:</text:span><text:span text:style-name="T26"> TFaSynBlock </text:span><text:span text:style-name="T79">=</text:span><text:span text:style-name="T26"> </text:span><text:span text:style-name="T11">nil</text:span><text:span text:style-name="T79">):</text:span><text:span text:style-name="T26"> TFaSynBlock</text:span><text:span text:style-name="T79">;</text:span></text:p>
      <text:p text:style-name="P75"/>
      <text:p text:style-name="P75">With AddFirstSection(), we can tell the highlighter, indicated that the token (which should open a block), also open the indicated section.</text:p>
      <text:p text:style-name="P75"/>
      <text:p text:style-name="P75">Thus, the solution to our problem would be in the following code:</text:p>
      <text:p text:style-name="P75"/>
      <text:p text:style-name="P117"><text:span text:style-name="T38"><text:s text:c="2"/></text:span><text:span text:style-name="T26">bloSelect</text:span><text:span text:style-name="T79">: =</text:span><text:span text:style-name="T26"> hlt.AddBlock</text:span><text:span text:style-name="T79">(</text:span><text:span text:style-name="T114">'SELECT'</text:span><text:span text:style-name="T26">,</text:span><text:span text:style-name="T114">'</text:span><text:span text:style-name="T115">;</text:span><text:span text:style-name="T114">'</text:span><text:span text:style-name="T79">);</text:span></text:p>
      <text:p text:style-name="P117"><text:span text:style-name="T38"><text:s text:c="2"/></text:span><text:span text:style-name="T26">hlt.AddFirstSection</text:span><text:span text:style-name="T79">(</text:span><text:span text:style-name="T114">'SELECT'</text:span><text:span text:style-name="T26">,</text:span><text:span text:style-name="T11">true</text:span><text:span text:style-name="T26">, BloSelect</text:span><text:span text:style-name="T79">);</text:span></text:p>
      <text:p text:style-name="P117"><text:span text:style-name="T38"><text:s text:c="2"/></text:span><text:span text:style-name="T26">hlt.AddSection</text:span><text:span text:style-name="T79">(</text:span><text:span text:style-name="T114">'FROM'</text:span><text:span text:style-name="T26">,</text:span><text:span text:style-name="T11">true</text:span><text:span text:style-name="T26">, BloSelect</text:span><text:span text:style-name="T79">);</text:span></text:p>
      <text:p text:style-name="P75"/>
      <text:p text:style-name="P75">Now, when the block "bloSelect" opens, a section will appear. The effect is similar to that shown:</text:p>
      <text:p text:style-name="P75"/>
      <text:p text:style-name="P39"><text:soft-page-break/><draw:frame draw:style-name="fr4" draw:name="Image32" text:anchor-type="as-char" svg:width="9.922cm" svg:height="5.371cm" draw:z-index="78"><draw:image xlink:href="Pictures/1000000000000177000000CB5703A31F1ECEB90C.png" xlink:type="simple" xlink:show="embed" xlink:actuate="onLoad"/></draw:frame></text:p>
      <text:p text:style-name="P93"/>
      <text:p text:style-name="P75">Now you have two collapsible sections within a block, which is also foldable, but that is not accessible with the mouse, by appear "under" the folding mark. </text:p>
      <text:list xml:id="list230306283544246" text:continue-numbering="true" text:style-name="WW8Num24">
        <text:list-item>
          <text:list>
            <text:list-item>
              <text:h text:style-name="P250" text:outline-level="2"><text:bookmark-start text:name="__RefHeading___Toc404419513"/>Advanced sections<text:bookmark-end text:name="__RefHeading___Toc404419513"/></text:h>
            </text:list-item>
          </text:list>
        </text:list-item>
      </text:list>
      <text:p text:style-name="P75"/>
      <text:p text:style-name="P75">The method Addsection() allows us to create sections, in a easy way, indicating a simple start delimiter. But not allow us greater freedom to define this delimiter.</text:p>
      <text:p text:style-name="P75"/>
      <text:p text:style-name="P75">There is an alternative way that allows us greater freedom. This involves using the method of creating blocks CreateBlock (), which has the following declaration:</text:p>
      <text:p text:style-name="P75"/>
      <text:p text:style-name="P117"><text:span text:style-name="T38"><text:s text:c="4"/></text:span><text:span text:style-name="T11">function </text:span><text:span text:style-name="T26">CreateBlock</text:span><text:span text:style-name="T79">(</text:span><text:span text:style-name="T26">blkName</text:span><text:span text:style-name="T79">:</text:span><text:span text:style-name="T26"> </text:span><text:span text:style-name="T11">string</text:span><text:span text:style-name="T79">;</text:span><text:span text:style-name="T26"> </text:span></text:p>
      <text:p text:style-name="P117"><text:span text:style-name="T38"><text:s text:c="25"/></text:span><text:span text:style-name="T26">showFold</text:span><text:span text:style-name="T79">:</text:span><text:span text:style-name="T26"> boolean</text:span><text:span text:style-name="T79">=</text:span><text:span text:style-name="T11">true</text:span><text:span text:style-name="T79">;</text:span></text:p>
      <text:p text:style-name="P117"><text:span text:style-name="T38"><text:s text:c="25"/></text:span><text:span text:style-name="T26">parentBlk</text:span><text:span text:style-name="T79">:</text:span><text:span text:style-name="T26"> TFaSynBlock</text:span><text:span text:style-name="T79">=</text:span><text:span text:style-name="T11">nil</text:span><text:span text:style-name="T79">):</text:span><text:span text:style-name="T26"> TFaSynBlock</text:span><text:span text:style-name="T79">;</text:span></text:p>
      <text:p text:style-name="P75"/>
      <text:p text:style-name="P75">CreateBlock() allows us to internally create a block or section in the highlight (and their main properties) but without defining its delimiters. </text:p>
      <text:p text:style-name="P75"/>
      <text:p text:style-name="P75">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5"/>
      <text:p text:style-name="P75">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5"/>
      <text:p text:style-name="P75">The diagram below will help clarify as indicated:</text:p>
      <text:p text:style-name="P75"/>
      <text:p text:style-name="P38"><text:soft-page-break/><draw:frame draw:style-name="fr18" draw:name="Object14" text:anchor-type="as-char" svg:width="13.007cm" svg:height="7.982cm" draw:z-index="79"><draw:object-ole xlink:href="./Object 14" xlink:type="simple" xlink:show="embed" xlink:actuate="onLoad"/><draw:image xlink:href="./ObjectReplacements/Object 14" xlink:type="simple" xlink:show="embed" xlink:actuate="onLoad"/></draw:frame></text:p>
      <text:p text:style-name="P75"/>
      <text:p text:style-name="P91"><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5"/>
      <text:p text:style-name="P75">To associate special delimiters, to a section, there is AddIniSectToTok() method, which has the following declaration:</text:p>
      <text:p text:style-name="P75"/>
      <text:p text:style-name="P117"><text:span text:style-name="T38"><text:s text:c="2"/></text:span><text:span text:style-name="T11">procedure </text:span><text:span text:style-name="T26">AddIniSectToTok</text:span><text:span text:style-name="T79">(</text:span><text:span text:style-name="T26">dStart</text:span><text:span text:style-name="T79">:</text:span><text:span text:style-name="T26"> </text:span><text:span text:style-name="T11">string</text:span><text:span text:style-name="T79">;</text:span><text:span text:style-name="T26"> TokPos</text:span><text:span text:style-name="T79">:</text:span><text:span text:style-name="T26"> integer</text:span><text:span text:style-name="T79">;</text:span><text:span text:style-name="T26"> blk</text:span><text:span text:style-name="T79">:</text:span><text:span text:style-name="T26"> TFaSynBlock</text:span><text:span text:style-name="T79">);</text:span></text:p>
      <text:p text:style-name="P75"/>
      <text:p text:style-name="P75">To appreciate the difference in creating sections, consider the following statement:</text:p>
      <text:p text:style-name="P75"/>
      <text:p text:style-name="P117"><text:span text:style-name="T38"><text:s text:c="2"/></text:span><text:span text:style-name="T26">sec1 </text:span><text:span text:style-name="T79">: =</text:span><text:span text:style-name="T26"> hlt.AddSection</text:span><text:span text:style-name="T79">(</text:span><text:span text:style-name="T114">'Interface'</text:span><text:span text:style-name="T26">,</text:span><text:span text:style-name="T11">true</text:span><text:span text:style-name="T26">, Hlt.MainBlk</text:span><text:span text:style-name="T79">);</text:span></text:p>
      <text:p text:style-name="P75"/>
      <text:p text:style-name="P75">And the alternative equivalently, using CreateBlock():</text:p>
      <text:p text:style-name="P75"/>
      <text:p text:style-name="P117"><text:span text:style-name="T38"><text:s text:c="2"/></text:span><text:span text:style-name="T26">sec1 </text:span><text:span text:style-name="T79">: =</text:span><text:span text:style-name="T26"> hlt.CreateBlock</text:span><text:span text:style-name="T79">(</text:span><text:span text:style-name="T114">''</text:span><text:span text:style-name="T26">,</text:span><text:span text:style-name="T11">true</text:span><text:span text:style-name="T26">, Hlt.MainBlk</text:span><text:span text:style-name="T79">);</text:span><text:span text:style-name="T26"> </text:span><text:span text:style-name="T92">//</text:span><text:span text:style-name="T96">Create block </text:span></text:p>
      <text:p text:style-name="P117"><text:span text:style-name="T38"><text:s text:c="2"/></text:span><text:span text:style-name="T26">sec1.IsSection </text:span><text:span text:style-name="T79">: =</text:span><text:span text:style-name="T26"> </text:span><text:span text:style-name="T11">true</text:span><text:span text:style-name="T79">;</text:span><text:span text:style-name="T26"> </text:span><text:span text:style-name="T92">//</text:span><text:span text:style-name="T96">mark as section</text:span></text:p>
      <text:p text:style-name="P117"><text:span text:style-name="T94"><text:s text:c="2"/></text:span><text:span text:style-name="T92">//</text:span><text:span text:style-name="T96">Assigns section to the token 'interface', in its list of "sections that opens"</text:span></text:p>
      <text:p text:style-name="P117"><text:span text:style-name="T38"><text:s text:c="2"/></text:span><text:span text:style-name="T26">AddIniSectToTok</text:span><text:span text:style-name="T79">(</text:span><text:span text:style-name="T114">'Interface'</text:span><text:span text:style-name="T26">, 0, sec1</text:span><text:span text:style-name="T79">);</text:span><text:span text:style-name="T26"> </text:span></text:p>
      <text:p text:style-name="P101"/>
      <text:p text:style-name="P75"/>
      <text:p text:style-name="P75">Here we can see better that a section is a simple block, but with the "IsSection" property set to TRUE. This will do that the highlight try to this block, on a different form.</text:p>
      <text:p text:style-name="P75"/>
      <text:p text:style-name="P75"><text:soft-page-break/>IMPORTANT. By creating sections AddBlock, must take into account two considerations:</text:p>
      <text:p text:style-name="P75"/>
      <text:list xml:id="list582298649224046471" text:style-name="WW8Num5">
        <text:list-item>
          <text:p text:style-name="P228">Always put the IsSection property to TRUE.</text:p>
        </text:list-item>
        <text:list-item>
          <text:p text:style-name="P228">Always specify the parent block. Leave the default (NIL), the section will not be recognized</text:p>
        </text:list-item>
      </text:list>
      <text:p text:style-name="P75"/>
      <text:p text:style-name="P75">The AddIniSectToTok() method accesses to the list "SecsToOpen" of the special token, to add the reference to the indicated block. So when it's identified this token, <text:s/>we will know that it is the beginning of the Section 'sec1 ".</text:p>
      <text:p text:style-name="P75"/>
      <text:p text:style-name="P75">This new block definition gives us more freedom to:</text:p>
      <text:p text:style-name="P75"/>
      <text:list xml:id="list230306417873272" text:continue-list="list230306758198089" text:style-name="WW8Num17">
        <text:list-item>
          <text:p text:style-name="P221">Include the additional parameter "TokPos" in the start delimiter.</text:p>
        </text:list-item>
        <text:list-item>
          <text:p text:style-name="P221">Include multiple start <text:s/>delimiters.</text:p>
        </text:list-item>
      </text:list>
      <text:p text:style-name="P75"/>
      <text:p text:style-name="P91"><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7"><text:span text:style-name="T38"><text:s text:c="2"/></text:span><text:span text:style-name="T26">sec_clase </text:span><text:span text:style-name="T79">: =</text:span><text:span text:style-name="T26"> hlt.CreateBlock</text:span><text:span text:style-name="T79">(</text:span><text:span text:style-name="T114">''</text:span><text:span text:style-name="T79"> </text:span><text:span text:style-name="T11">true</text:span><text:span text:style-name="T26">, </text:span><text:span text:style-name="T33">h</text:span><text:span text:style-name="T26">lt.MainBlk</text:span><text:span text:style-name="T79">);</text:span><text:span text:style-name="T26"> </text:span><text:span text:style-name="T92">//</text:span><text:span text:style-name="T96">Create block </text:span></text:p>
      <text:p text:style-name="P117"><text:span text:style-name="T38"><text:s text:c="2"/></text:span><text:span text:style-name="T26">sec_clase.IsSection </text:span><text:span text:style-name="T79">: =</text:span><text:span text:style-name="T26"> </text:span><text:span text:style-name="T11">true</text:span><text:span text:style-name="T79">;</text:span><text:span text:style-name="T26"> </text:span><text:span text:style-name="T92">//</text:span><text:span text:style-name="T96">mark as section</text:span></text:p>
      <text:p text:style-name="P117"><text:span text:style-name="T38"><text:s text:c="2"/></text:span><text:span text:style-name="T26">AddIniSectToTok</text:span><text:span text:style-name="T79">(</text:span><text:span text:style-name="T114">'Private'</text:span><text:span text:style-name="T26">1, sec_clase</text:span><text:span text:style-name="T79">);</text:span></text:p>
      <text:p text:style-name="P75"/>
      <text:p text:style-name="P75">Hopes to use, as a starting delimiter, a special identifier that is declared like this:</text:p>
      <text:p text:style-name="P75"/>
      <text:p text:style-name="P117"><text:span text:style-name="T38"><text:s text:c="2"/></text:span><text:span text:style-name="T26">hlt.AddIdentSpec</text:span><text:span text:style-name="T79">(</text:span><text:span text:style-name="T114">'Private'</text:span><text:span text:style-name="T26">, </text:span><text:span text:style-name="T33">tn</text:span><text:span text:style-name="T26">Keyword 1</text:span><text:span text:style-name="T79">);</text:span></text:p>
      <text:p text:style-name="P75"/>
      <text:p text:style-name="P75">If there is not this definition, it proceeds to create it, because the block (section) always requires that the delimiter exists first as a special token.</text:p>
      <text:p text:style-name="P75"/>
      <text:p text:style-name="P75">The alternative definition for delimiters also allows us to define more of one starting delimiter, for the same section.</text:p>
      <text:p text:style-name="P159"/>
      <text:p text:style-name="P159">For example if we want the previous section can be open using the keyword "private2" then the statement would be:</text:p>
      <text:p text:style-name="P159"/>
      <text:p text:style-name="P117"><text:span text:style-name="T38"><text:s text:c="2"/></text:span><text:span text:style-name="T26">sec_clase </text:span><text:span text:style-name="T79">: =</text:span><text:span text:style-name="T26"> hlt.CreateBlock</text:span><text:span text:style-name="T79">(</text:span><text:span text:style-name="T114">''</text:span><text:span text:style-name="T79"> </text:span><text:span text:style-name="T11">true</text:span><text:span text:style-name="T26">, Hlt.MainBlk</text:span><text:span text:style-name="T79">);</text:span><text:span text:style-name="T26"> </text:span><text:span text:style-name="T92">//</text:span><text:span text:style-name="T96">Create block </text:span></text:p>
      <text:p text:style-name="P117"><text:soft-page-break/><text:span text:style-name="T38"><text:s text:c="2"/></text:span><text:span text:style-name="T26">sec_clase.IsSection </text:span><text:span text:style-name="T79">: =</text:span><text:span text:style-name="T26"> </text:span><text:span text:style-name="T11">true</text:span><text:span text:style-name="T79">;</text:span><text:span text:style-name="T26"> </text:span><text:span text:style-name="T92">//</text:span><text:span text:style-name="T96">mark as section</text:span></text:p>
      <text:p text:style-name="P117"><text:span text:style-name="T38"><text:s text:c="2"/></text:span><text:span text:style-name="T26">AddIniSectToTok</text:span><text:span text:style-name="T79">(</text:span><text:span text:style-name="T114">'Private'</text:span><text:span text:style-name="T26">, 0, sec_clase</text:span><text:span text:style-name="T79">);</text:span></text:p>
      <text:p text:style-name="P117"><text:span text:style-name="T38"><text:s text:c="2"/></text:span><text:span text:style-name="T26">AddIniSectToTok</text:span><text:span text:style-name="T79">(</text:span><text:span text:style-name="T114">'Private2'</text:span><text:span text:style-name="T26">, 0, sec_clase</text:span><text:span text:style-name="T79">);</text:span></text:p>
      <text:p text:style-name="P159"/>
      <text:p text:style-name="P159">Each call to AddIniSectToTok(), will define an additional starting delimiter. There may be as many as desired.</text:p>
      <text:p text:style-name="P159"/>
      <text:p text:style-name="P75">The AddIniSectToTok() method, makes a validation for the delimiter, in the same way that Addsection() works. This means that it is advisable to always check if an error occurs in the definition of the delimiter. </text:p>
      <text:p text:style-name="P75"/>
      <text:p text:style-name="P75">This method of creating sections, also allows us to define "First Sections", using the method: AddFirstSectToTok(), as does AddFirstSection().</text:p>
      <text:p text:style-name="P75"/>
      <text:list xml:id="list230305333584739" text:continue-list="list230306283544246" text:style-name="WW8Num24">
        <text:list-item>
          <text:list>
            <text:list-item>
              <text:h text:style-name="P250" text:outline-level="2"><text:bookmark-start text:name="__RefHeading___Toc404419514"/>Getting information about blocks<text:bookmark-end text:name="__RefHeading___Toc404419514"/></text:h>
            </text:list-item>
          </text:list>
        </text:list-item>
      </text:list>
      <text:p text:style-name="P75"/>
      <text:p text:style-name="P75">The highlighter TSynFacilSyn, can define blocks that can be colored or folded. But for better benefits, it is needed to access to internal information on these blocks.</text:p>
      <text:p text:style-name="P75"/>
      <text:p text:style-name="P75">To this end, we have defined the following methods:</text:p>
      <text:p text:style-name="P75"/>
      <text:list xml:id="list230305380684246" text:continue-numbering="true" text:style-name="WW8Num24">
        <text:list-item>
          <text:list>
            <text:list-item>
              <text:list>
                <text:list-item>
                  <text:h text:style-name="P256" text:outline-level="3"><text:bookmark-start text:name="__RefHeading___Toc404419515"/>SetHighlighterAtXY()<text:bookmark-end text:name="__RefHeading___Toc404419515"/></text:h>
                </text:list-item>
              </text:list>
            </text:list-item>
          </text:list>
        </text:list-item>
      </text:list>
      <text:p text:style-name="P75"/>
      <text:p text:style-name="P75">It has the following statement:</text:p>
      <text:p text:style-name="P75"/>
      <text:p text:style-name="P117"><text:span text:style-name="T11">function </text:span><text:span text:style-name="T26">SetHighlighterAtXY</text:span><text:span text:style-name="T79">(</text:span><text:span text:style-name="T26">XY</text:span><text:span text:style-name="T79">:</text:span><text:span text:style-name="T26"> TPoint</text:span><text:span text:style-name="T79">):</text:span><text:span text:style-name="T26"> boolean</text:span><text:span text:style-name="T79">;</text:span></text:p>
      <text:p text:style-name="P75"/>
      <text:p text:style-name="P75">This method allows to locate the highlighter in a specific position of the text. It's like if you were doing the normal scan text and stops at the position indicated.</text:p>
      <text:p text:style-name="P75"/>
      <text:p text:style-name="P75">This is useful because it allows us to read the status of highlighter when reached anywhere in the text. So we can see information about tokens and blocks.</text:p>
      <text:p text:style-name="P75"/>
      <text:p text:style-name="P75">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5"/>
      <text:p text:style-name="P117"><text:span text:style-name="T38"><text:s text:c="2"/></text:span><text:span text:style-name="T26">SynFacilSyn1.SetHighlighterAtXY</text:span><text:span text:style-name="T79">(</text:span><text:span text:style-name="T26">SynEdit1.CaretXY</text:span><text:span text:style-name="T79">);</text:span><text:span text:style-name="T26"> </text:span><text:span text:style-name="T92">//</text:span><text:span text:style-name="T96">positions</text:span></text:p>
      <text:p text:style-name="P117"><text:span text:style-name="T38"><text:s text:c="2"/></text:span><text:span text:style-name="T92">//</text:span><text:span text:style-name="T96">from here you can get information about the highlighter</text:span></text:p>
      <text:p text:style-name="P117"><text:span text:style-name="T38"><text:s text:c="2"/></text:span><text:span text:style-name="T26">tok </text:span><text:span text:style-name="T79">: =</text:span><text:span text:style-name="T26"> SynFacilSyn1.GetToken</text:span><text:span text:style-name="T79">;</text:span><text:span text:style-name="T26"> </text:span><text:span text:style-name="T92">//</text:span><text:span text:style-name="T96">reads the current token</text:span></text:p>
      <text:p text:style-name="P75"/>
      <text:p text:style-name="P75">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5"/>
      <text:p text:style-name="P75">Internally SetHighlighterAtXY(), takes a little exploration, but only in the line of work. No need to be explored throughout the text, because the highlighter status information, is saved internally for each line.</text:p>
      <text:p text:style-name="P75"/>
      <text:list xml:id="list230305601143637" text:continue-numbering="true" text:style-name="WW8Num24">
        <text:list-item>
          <text:list>
            <text:list-item>
              <text:list>
                <text:list-item>
                  <text:h text:style-name="P256" text:outline-level="3"><text:bookmark-start text:name="__RefHeading___Toc404419516"/><text:soft-page-break/>NestedBlocks ()<text:bookmark-end text:name="__RefHeading___Toc404419516"/></text:h>
                </text:list-item>
              </text:list>
            </text:list-item>
          </text:list>
        </text:list-item>
      </text:list>
      <text:p text:style-name="P75"/>
      <text:p text:style-name="P75">It has the following statement:</text:p>
      <text:p text:style-name="P80"><text:s/></text:p>
      <text:p text:style-name="P117"><text:span text:style-name="T11">function </text:span><text:span text:style-name="T26">NestedBlocks</text:span><text:span text:style-name="T79">:</text:span><text:span text:style-name="T26"> Integer</text:span><text:span text:style-name="T79">;</text:span></text:p>
      <text:p text:style-name="P75"/>
      <text:p text:style-name="P75">This function returns the number of currently open blocks. This value can be read at any time, but usually will be used after calling SetHighlighterAtXY() to see the open blocks in any position of the text.</text:p>
      <text:p text:style-name="P75"/>
      <text:p text:style-name="P75">The following example shows how to read the nesting level at the cursor position:</text:p>
      <text:p text:style-name="P75"/>
      <text:p text:style-name="P117"><text:span text:style-name="T38"><text:s text:c="2"/></text:span><text:span text:style-name="T26">SynFacilSyn1.SetHighlighterAtXY</text:span><text:span text:style-name="T79">(</text:span><text:span text:style-name="T26">SynEdit1.CaretXY</text:span><text:span text:style-name="T79">);</text:span><text:span text:style-name="T26"> </text:span><text:span text:style-name="T92">//</text:span><text:span text:style-name="T96">positions</text:span></text:p>
      <text:p text:style-name="P117"><text:span text:style-name="T38"><text:s text:c="2"/></text:span><text:span text:style-name="T26">level </text:span><text:span text:style-name="T79">: =</text:span><text:span text:style-name="T26"> SynFacilSyn1.NestedBlocks</text:span><text:span text:style-name="T79">;</text:span><text:span text:style-name="T26"> </text:span><text:span text:style-name="T92">//</text:span><text:span text:style-name="T96">read nesting</text:span></text:p>
      <text:p text:style-name="P75"/>
      <text:p text:style-name="P75">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5"/>
      <text:list xml:id="list230306339329538" text:continue-numbering="true" text:style-name="WW8Num24">
        <text:list-item>
          <text:list>
            <text:list-item>
              <text:list>
                <text:list-item>
                  <text:h text:style-name="P256" text:outline-level="3"><text:bookmark-start text:name="__RefHeading___Toc404419517"/>NestedBlocksBegin ()<text:bookmark-end text:name="__RefHeading___Toc404419517"/></text:h>
                </text:list-item>
              </text:list>
            </text:list-item>
          </text:list>
        </text:list-item>
      </text:list>
      <text:p text:style-name="P75"/>
      <text:p text:style-name="P75">It has the following statement:</text:p>
      <text:p text:style-name="P80"><text:s/></text:p>
      <text:p text:style-name="P117"><text:span text:style-name="T11">function </text:span><text:span text:style-name="T26">NestedBlocksBegin</text:span><text:span text:style-name="T79">(</text:span><text:span text:style-name="T26">LineNumber</text:span><text:span text:style-name="T79">:</text:span><text:span text:style-name="T26"> integer</text:span><text:span text:style-name="T79">):</text:span><text:span text:style-name="T26"> Integer</text:span><text:span text:style-name="T79">;</text:span></text:p>
      <text:p text:style-name="P75"/>
      <text:p text:style-name="P75">This function returns the number of open blocks at the beginning of a line.</text:p>
      <text:p text:style-name="P75"/>
      <text:p text:style-name="P75">Unlike NestedBlocks(), this method need not be positioned first in the text, using SetHighlighterAtXY(). Simply you must pass as a parameter the line number and the function returns the number of open blocks, when starting a line scanning.</text:p>
      <text:p text:style-name="P75"/>
      <text:p text:style-name="P75">This value is obtained by reading the state of the end of the line to the previous line, accessing information ranges.</text:p>
      <text:list xml:id="list230305135213761" text:continue-numbering="true" text:style-name="WW8Num24">
        <text:list-item>
          <text:list>
            <text:list-item>
              <text:list>
                <text:list-item>
                  <text:h text:style-name="P256" text:outline-level="3"><text:bookmark-start text:name="__RefHeading___Toc404419518"/>TopCodeFoldBlock()<text:bookmark-end text:name="__RefHeading___Toc404419518"/></text:h>
                </text:list-item>
              </text:list>
            </text:list-item>
          </text:list>
        </text:list-item>
      </text:list>
      <text:p text:style-name="P75"/>
      <text:p text:style-name="P75">It has the following statement:</text:p>
      <text:p text:style-name="P80"><text:s/></text:p>
      <text:p text:style-name="P117"><text:soft-page-break/><text:span text:style-name="T11">function </text:span><text:span text:style-name="T26">TopCodeFoldBlock</text:span><text:span text:style-name="T79">(</text:span><text:span text:style-name="T26">DownIndex</text:span><text:span text:style-name="T79">:</text:span><text:span text:style-name="T26"> Integer</text:span><text:span text:style-name="T79">):</text:span><text:span text:style-name="T26"> TFaSynBlock</text:span><text:span text:style-name="T79">;</text:span></text:p>
      <text:p text:style-name="P75"/>
      <text:p text:style-name="P75">This function returns the last open block on the highlighter. The "DownIndex" parameter indicates the depth of the requested block. When is 0, refers to the last open block; when one refers to the penultimate, and so on.</text:p>
      <text:p text:style-name="P75"/>
      <text:p text:style-name="P75">The same information could be obtained with TSynCustomFoldHighlighter.TopCodeFoldBlockType() method, but it is inaccessible from outside the class, andTopCodeFoldBlock() returns directly <text:s/>an object TFaSynBlock.</text:p>
      <text:p text:style-name="P75"/>
      <text:p text:style-name="P75">When the current block is the main block, that is, there is not any block open, TopCodeFoldBlock() returns NIL.</text:p>
      <text:p text:style-name="P75"/>
      <text:p text:style-name="P75">The following code shows how to read the name of the last open block at the cursor position:</text:p>
      <text:p text:style-name="P75"/>
      <text:p text:style-name="P117"><text:span text:style-name="T38"><text:s text:c="2"/></text:span><text:span text:style-name="T26">SynFacilSyn1.SetHighlighterAtXY</text:span><text:span text:style-name="T79">(</text:span><text:span text:style-name="T26">SynEdit1.CaretXY</text:span><text:span text:style-name="T79">);</text:span><text:span text:style-name="T26"> </text:span><text:span text:style-name="T92">//</text:span><text:span text:style-name="T96">positions</text:span></text:p>
      <text:p text:style-name="P117"><text:span text:style-name="T38"><text:s text:c="2"/></text:span><text:span text:style-name="T26">blk </text:span><text:span text:style-name="T79">: =</text:span><text:span text:style-name="T26"> TopCodeFoldBlock</text:span><text:span text:style-name="T79">(</text:span><text:span text:style-name="T26">0</text:span><text:span text:style-name="T79">);</text:span><text:span text:style-name="T26"> </text:span><text:span text:style-name="T92">//</text:span><text:span text:style-name="T96">read current block</text:span></text:p>
      <text:p text:style-name="P117"><text:span text:style-name="T38"><text:s text:c="2"/></text:span><text:span text:style-name="T11">if </text:span><text:span text:style-name="T26">blk </text:span><text:span text:style-name="T79">&lt;&gt;</text:span><text:span text:style-name="T26"> </text:span><text:span text:style-name="T11">nil then </text:span><text:span text:style-name="T26">nombre_bloque </text:span><text:span text:style-name="T79">: =</text:span><text:span text:style-name="T26"> blk.</text:span><text:span text:style-name="T11">name</text:span><text:span text:style-name="T79">;</text:span></text:p>
      <text:p text:style-name="P15"/>
      <text:list xml:id="list230305990276734" text:continue-numbering="true" text:style-name="WW8Num24">
        <text:list-item>
          <text:list>
            <text:list-item>
              <text:list>
                <text:list-item>
                  <text:h text:style-name="P256" text:outline-level="3"><text:bookmark-start text:name="__RefHeading___Toc404419519"/>GetBlockInfoAtXY()<text:bookmark-end text:name="__RefHeading___Toc404419519"/></text:h>
                </text:list-item>
              </text:list>
            </text:list-item>
          </text:list>
        </text:list-item>
      </text:list>
      <text:p text:style-name="P75"/>
      <text:p text:style-name="P75">It has the following statement:</text:p>
      <text:p text:style-name="P75"/>
      <text:p text:style-name="P117"><text:span text:style-name="T11">function </text:span><text:span text:style-name="T26">GetBlockInfoAtXY</text:span><text:span text:style-name="T79">(</text:span><text:span text:style-name="T26">XY</text:span><text:span text:style-name="T79">:</text:span><text:span text:style-name="T26"> TPoint</text:span><text:span text:style-name="T79">;</text:span><text:span text:style-name="T26"> out blk</text:span><text:span text:style-name="T79">:</text:span><text:span text:style-name="T26"> TFaSynBlock</text:span><text:span text:style-name="T79">;</text:span><text:span text:style-name="T26"> out level</text:span><text:span text:style-name="T79">:</text:span><text:span text:style-name="T26"> integer</text:span><text:span text:style-name="T79">):</text:span><text:span text:style-name="T26"> boolean</text:span><text:span text:style-name="T79">;</text:span></text:p>
      <text:p text:style-name="P75"/>
      <text:p text:style-name="P75">This method allows us to obtain the latest open block, for any position of the text. It returns the number of open blocks in that position, in the parameter "level".</text:p>
      <text:p text:style-name="P75"/>
      <text:p text:style-name="P75">It job is simple, since only places the highlighter at the indicated position, and there reads the information from the last block, using TSynCustomFoldHighlighter.TopCodeFoldBlockType().</text:p>
      <text:p text:style-name="P75"/>
      <text:p text:style-name="P75">It is a shorthand way to access the active block in a text position.</text:p>
      <text:p text:style-name="P75"/>
      <text:p text:style-name="P75">The XY parameter indicates the position of the text where you want to read the block. These are values that start at 1 for the first row or first column.</text:p>
      <text:p text:style-name="P75"/>
      <text:p text:style-name="P75"><text:soft-page-break/>The following example shows how you can read the name of the current block, where the cursor of a SynEdit1 editor is:</text:p>
      <text:p text:style-name="P75"/>
      <text:p text:style-name="P127">var</text:p>
      <text:p text:style-name="P117"><text:span text:style-name="T38"><text:s text:c="2"/></text:span><text:span text:style-name="T26">blq</text:span><text:span text:style-name="T79">:</text:span><text:span text:style-name="T26"> TFaSynBlock</text:span><text:span text:style-name="T79">;</text:span></text:p>
      <text:p text:style-name="P117"><text:span text:style-name="T38"><text:s text:c="2"/></text:span><text:span text:style-name="T26">level</text:span><text:span text:style-name="T79">:</text:span><text:span text:style-name="T26"> integer</text:span><text:span text:style-name="T79">;</text:span></text:p>
      <text:p text:style-name="P123">...</text:p>
      <text:p text:style-name="P117"><text:span text:style-name="T38"><text:s text:c="2"/></text:span><text:span text:style-name="T26">SynFacilSyn1.GetBlockInfoAtXY</text:span><text:span text:style-name="T79">(</text:span><text:span text:style-name="T26">SynEdit1.CaretXY, blq, level</text:span><text:span text:style-name="T79">);</text:span></text:p>
      <text:p text:style-name="P117"><text:span text:style-name="T38"><text:s text:c="2"/></text:span><text:span text:style-name="T11">if </text:span><text:span text:style-name="T26">blq </text:span><text:span text:style-name="T79">=</text:span><text:span text:style-name="T26"> </text:span><text:span text:style-name="T11">nil then</text:span></text:p>
      <text:p text:style-name="P117"><text:span text:style-name="T38"><text:s text:c="4"/></text:span><text:span text:style-name="T26">debugln</text:span><text:span text:style-name="T79">(</text:span><text:span text:style-name="T114">'Block</text:span><text:span text:style-name="T115">= NIL</text:span><text:span text:style-name="T114">, Level</text:span><text:span text:style-name="T115">=</text:span><text:span text:style-name="T114">'</text:span><text:span text:style-name="T79">+</text:span><text:span text:style-name="T26">IntToStr</text:span><text:span text:style-name="T79">(</text:span><text:span text:style-name="T26">level</text:span><text:span text:style-name="T79">))</text:span></text:p>
      <text:p text:style-name="P117"><text:span text:style-name="T38"><text:s text:c="2"/></text:span><text:span text:style-name="T11">else begin</text:span></text:p>
      <text:p text:style-name="P117"><text:span text:style-name="T38"><text:s text:c="4"/></text:span><text:span text:style-name="T26">debugln</text:span><text:span text:style-name="T79">(</text:span><text:span text:style-name="T114">'Block</text:span><text:span text:style-name="T115">=</text:span><text:span text:style-name="T114">'</text:span><text:span text:style-name="T26"> </text:span><text:span text:style-name="T79">+</text:span><text:span text:style-name="T26"> blq.</text:span><text:span text:style-name="T11">name</text:span><text:span text:style-name="T79">+</text:span><text:span text:style-name="T114">'Level</text:span><text:span text:style-name="T115">=</text:span><text:span text:style-name="T114">'</text:span><text:span text:style-name="T79">+</text:span><text:span text:style-name="T26">IntToStr</text:span><text:span text:style-name="T79">(</text:span><text:span text:style-name="T26">level</text:span><text:span text:style-name="T79">));</text:span></text:p>
      <text:p text:style-name="P117"><text:span text:style-name="T38"><text:s text:c="2"/></text:span><text:span text:style-name="T11">end</text:span><text:span text:style-name="T79">;</text:span></text:p>
      <text:p text:style-name="P75"/>
      <text:list xml:id="list230305932736780" text:continue-numbering="true" text:style-name="WW8Num24">
        <text:list-item>
          <text:list>
            <text:list-item>
              <text:list>
                <text:list-item>
                  <text:h text:style-name="P256" text:outline-level="3"><text:bookmark-start text:name="__RefHeading___Toc404419520"/>ExploreLine()<text:bookmark-end text:name="__RefHeading___Toc404419520"/></text:h>
                </text:list-item>
              </text:list>
            </text:list-item>
          </text:list>
        </text:list-item>
      </text:list>
      <text:p text:style-name="P75"/>
      <text:p text:style-name="P75">It has the following statement:</text:p>
      <text:p text:style-name="P75"/>
      <text:p text:style-name="P117"><text:span text:style-name="T11">function </text:span><text:span text:style-name="T26">ExploreLine</text:span><text:span text:style-name="T79">(</text:span><text:span text:style-name="T26">XY</text:span><text:span text:style-name="T79">:</text:span><text:span text:style-name="T26"> TPoint</text:span><text:span text:style-name="T79">;</text:span><text:span text:style-name="T26"> out toks</text:span><text:span text:style-name="T79">:</text:span><text:span text:style-name="T26"> TATokInfo</text:span><text:span text:style-name="T79">;</text:span><text:span text:style-name="T26"> out CurTok</text:span><text:span text:style-name="T79">:</text:span><text:span text:style-name="T26"> integer</text:span><text:span text:style-name="T79">):</text:span><text:span text:style-name="T26"> boolean</text:span><text:span text:style-name="T79">;</text:span></text:p>
      <text:p text:style-name="P75"/>
      <text:p text:style-name="P75">This method performs a scan of the line in "XY", and read detailed information of tokens at that line, also indicating what is the token in the "XY" position.</text:p>
      <text:p text:style-name="P75"/>
      <text:p text:style-name="P75">The TATokInfo type, is an aray of elements of type TFaTokInfo:</text:p>
      <text:p text:style-name="P75"/>
      <text:p text:style-name="P117"><text:span text:style-name="T38"><text:s text:c="2"/></text:span><text:span text:style-name="T26">TFaTokInfo </text:span><text:span text:style-name="T79">=</text:span><text:span text:style-name="T26"> </text:span><text:span text:style-name="T11">record</text:span></text:p>
      <text:p text:style-name="P117"><text:span text:style-name="T38"><text:s text:c="5"/></text:span><text:span text:style-name="T26">txt </text:span><text:span text:style-name="T79">:</text:span><text:span text:style-name="T26"> </text:span><text:span text:style-name="T11">string</text:span><text:span text:style-name="T79">;</text:span><text:span text:style-name="T26"> <text:s text:c="5"/></text:span><text:span text:style-name="T92">//</text:span><text:span text:style-name="T96">Token text</text:span></text:p>
      <text:p text:style-name="P117"><text:span text:style-name="T38"><text:s text:c="5"/></text:span><text:span text:style-name="T26">TokPos </text:span><text:span text:style-name="T79">:</text:span><text:span text:style-name="T26"> integer</text:span><text:span text:style-name="T79">; </text:span><text:span text:style-name="T26"><text:s/></text:span><text:span text:style-name="T92">//</text:span><text:span text:style-name="T96">Token position within the line</text:span></text:p>
      <text:p text:style-name="P117"><text:span text:style-name="T38"><text:s text:c="5"/></text:span><text:span text:style-name="T26">TokTyp </text:span><text:span text:style-name="T79">:</text:span><text:span text:style-name="T26"> </text:span><text:span text:style-name="T27">integer</text:span><text:span text:style-name="T79">; </text:span><text:span text:style-name="T26"><text:s/></text:span><text:span text:style-name="T92">//</text:span><text:span text:style-name="T96">token </text:span><text:span text:style-name="T97">type</text:span></text:p>
      <text:p text:style-name="P117"><text:span text:style-name="T38"><text:s text:c="5"/></text:span><text:span text:style-name="T26">posIni </text:span><text:span text:style-name="T79">:</text:span><text:span text:style-name="T26"> integer</text:span><text:span text:style-name="T79">; </text:span><text:span text:style-name="T26"><text:s/></text:span><text:span text:style-name="T92">//</text:span><text:span text:style-name="T96">starting position on the line</text:span></text:p>
      <text:p text:style-name="P117"><text:span text:style-name="T38"><text:s text:c="5"/></text:span><text:span text:style-name="T26">curBlk </text:span><text:span text:style-name="T79">:</text:span><text:span text:style-name="T26"> TFaSynBlock</text:span><text:span text:style-name="T79">;</text:span><text:span text:style-name="T26"> </text:span><text:span text:style-name="T92">//</text:span><text:span text:style-name="T96">Token reference to block</text:span></text:p>
      <text:p text:style-name="P117"><text:span text:style-name="T38"><text:s text:c="2"/></text:span><text:span text:style-name="T11">end</text:span><text:span text:style-name="T79">;</text:span></text:p>
      <text:p text:style-name="P123"/>
      <text:p text:style-name="P117"><text:span text:style-name="T38"><text:s text:c="2"/></text:span><text:span text:style-name="T26">TATokInfo </text:span><text:span text:style-name="T79">=</text:span><text:span text:style-name="T26"> </text:span><text:span text:style-name="T11">array of </text:span><text:span text:style-name="T26">TFaTokInfo</text:span><text:span text:style-name="T79">;</text:span></text:p>
      <text:p text:style-name="P75"/>
      <text:p text:style-name="P75">The TFaTokInfo structure contains all the information relating to a token that may be needed in a typical scan text.</text:p>
      <text:p text:style-name="P75"/>
      <text:p text:style-name="P75">After a call to ExploreLine(), the tokens of the line in "XY", are returned in the toks[] parameter. This array start at index 0.</text:p>
      <text:p text:style-name="P75"><text:soft-page-break/></text:p>
      <text:p text:style-name="P75">The CurTok parameter indicates the position within toks[], corresponding to the token that is below the "XY" coordinate. So you can easily locate the token of the current position.</text:p>
      <text:p text:style-name="P75"/>
      <text:p text:style-name="P75">This feature was designed thinking on easing the implementation of the “completion code” option, using information from tokens and blocks of the highlighter.</text:p>
      <text:p text:style-name="P75"/>
      <text:p text:style-name="P75">The functions SearchBeginBlock(), SearchEndBlock() are extensions that are still in development, so should not be used yet.</text:p>
      <text:p text:style-name="P75"/>
      <text:list xml:id="list230306170090468" text:continue-numbering="true" text:style-name="WW8Num24">
        <text:list-item>
          <text:list>
            <text:list-item>
              <text:h text:style-name="P250" text:outline-level="2"><text:bookmark-start text:name="__RefHeading___Toc404419521"/>Using the highlighter as lexical analyzer - syntactic<text:bookmark-end text:name="__RefHeading___Toc404419521"/></text:h>
            </text:list-item>
          </text:list>
        </text:list-item>
      </text:list>
      <text:p text:style-name="P75"/>
      <text:p text:style-name="P75">The TSynFacilSyn highlighter is not only a highlighter for SynEdit component, but is also an excellent configurable lexical analyzer (lexer).</text:p>
      <text:p text:style-name="P75"/>
      <text:p text:style-name="P75">It behaves like a scanner, because once configured to one syntax, it can extract each of the tokens in the source text.</text:p>
      <text:p text:style-name="P75"/>
      <text:p text:style-name="P75">Scanning can be done in a single line or an entire multiline text.</text:p>
      <text:p text:style-name="P75"/>
      <text:p text:style-name="P75">Note that to use SynFacilSyn, necessarily requires SynEdit package even if you do not intend to use any component of SynEdit. </text:p>
      <text:p text:style-name="P75"/>
      <text:list xml:id="list230305093730526" text:continue-numbering="true" text:style-name="WW8Num24">
        <text:list-item>
          <text:list>
            <text:list-item>
              <text:list>
                <text:list-item>
                  <text:h text:style-name="P256" text:outline-level="3"><text:bookmark-start text:name="__RefHeading___Toc404419522"/>Scanning in a line<text:bookmark-end text:name="__RefHeading___Toc404419522"/></text:h>
                </text:list-item>
              </text:list>
            </text:list-item>
          </text:list>
        </text:list-item>
      </text:list>
      <text:p text:style-name="P75"/>
      <text:p text:style-name="P75">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5"/>
      <text:p text:style-name="P75">To scan a line of text, simply call setline () with the line to be analyzed.</text:p>
      <text:p text:style-name="P75"/>
      <text:p text:style-name="P135"><text:span text:style-name="Código_20_HTML"><text:span text:style-name="T15">you use </text:span></text:span><text:span text:style-name="Código_20_HTML"><text:span text:style-name="T51">..., SynHighlighterFacil</text:span></text:span><text:span text:style-name="Código_20_HTML"><text:span text:style-name="T82">;</text:span></text:span><text:span text:style-name="T51"><text:line-break/></text:span></text:p>
      <text:p text:style-name="P135"><text:span text:style-name="Código_20_HTML"><text:span text:style-name="T51">xLex </text:span></text:span><text:span text:style-name="Código_20_HTML"><text:span text:style-name="T82">: =</text:span></text:span><text:span text:style-name="Código_20_HTML"><text:span text:style-name="T51"> TSynFacilSyn.Create</text:span></text:span><text:span text:style-name="Código_20_HTML"><text:span text:style-name="T82">(</text:span></text:span><text:span text:style-name="Código_20_HTML"><text:span text:style-name="T15">self</text:span></text:span><text:span text:style-name="Código_20_HTML"><text:span text:style-name="T82">);</text:span></text:span><text:span text:style-name="Código_20_HTML"><text:span text:style-name="T51"><text:line-break/></text:span></text:span><text:span text:style-name="T106"> // Define the syntax<text:line-break/></text:span><text:span text:style-name="Código_20_HTML"><text:span text:style-name="T51"> ...</text:span></text:span></text:p>
      <text:p text:style-name="P136"/>
      <text:p text:style-name="P135"><text:span text:style-name="T107"><text:s text:c="2"/></text:span><text:span text:style-name="T106">// Explores<text:line-break/></text:span><text:span text:style-name="Código_20_HTML"><text:span text:style-name="T51"> xLex.SetLine</text:span></text:span><text:span text:style-name="Código_20_HTML"><text:span text:style-name="T82">(</text:span></text:span><text:span text:style-name="Código_20_HTML"><text:span text:style-name="T117">'Somewhere in the spot'</text:span></text:span><text:span text:style-name="Código_20_HTML"><text:span text:style-name="T51">, 0</text:span></text:span><text:span text:style-name="Código_20_HTML"><text:span text:style-name="T82">);</text:span></text:span><text:span text:style-name="T51"><text:line-break/></text:span><text:span text:style-name="Código_20_HTML"><text:span text:style-name="T51"> </text:span></text:span><text:span text:style-name="Código_20_HTML"><text:span text:style-name="T15">while not </text:span></text:span><text:span text:style-name="Código_20_HTML"><text:span text:style-name="T51">xLex.GetEol </text:span></text:span><text:span text:style-name="Código_20_HTML"><text:span text:style-name="T15">do begin</text:span></text:span><text:span text:style-name="T51"><text:line-break/></text:span><text:span text:style-name="Código_20_HTML"><text:span text:style-name="T51"> </text:span></text:span><text:span text:style-name="Código_20_HTML"><text:span text:style-name="T105">//</text:span></text:span><text:span text:style-name="Código_20_HTML"><text:span text:style-name="T108">here is pointing to a token</text:span></text:span></text:p>
      <text:p text:style-name="P112"><text:span text:style-name="T39"><text:s text:c="4"/></text:span><text:span text:style-name="T41">Token </text:span><text:span text:style-name="T81">: =</text:span><text:span text:style-name="T41"> </text:span><text:span text:style-name="Código_20_HTML"><text:span text:style-name="T54">xLex</text:span></text:span><text:span text:style-name="T41">.GetToken</text:span><text:span text:style-name="T81">;</text:span><text:span text:style-name="T41"> </text:span><text:span text:style-name="T101">//</text:span><text:span text:style-name="T104">reads the token</text:span></text:p>
      <text:p text:style-name="P112"><text:span text:style-name="T39"><text:s text:c="4"/></text:span><text:span text:style-name="T41">Token</text:span><text:span text:style-name="T42">Att</text:span><text:span text:style-name="T41"> </text:span><text:span text:style-name="T81">: =</text:span><text:span text:style-name="T41"> </text:span><text:span text:style-name="Código_20_HTML"><text:span text:style-name="T54">xLex</text:span></text:span><text:span text:style-name="T41">.GetToken</text:span><text:span text:style-name="T42">Attribute</text:span><text:span text:style-name="T81">;</text:span><text:span text:style-name="T41"> </text:span><text:span text:style-name="T101">//</text:span><text:span text:style-name="T104">read attribute</text:span></text:p>
      <text:p text:style-name="P129"/>
      <text:p text:style-name="P135"><text:span text:style-name="T55"><text:s text:c="4"/></text:span><text:span text:style-name="Código_20_HTML"><text:span text:style-name="T105">//</text:span></text:span><text:span text:style-name="Código_20_HTML"><text:span text:style-name="T108">passes to the next</text:span></text:span><text:span text:style-name="T51"><text:line-break/></text:span><text:span text:style-name="Código_20_HTML"><text:span text:style-name="T51"> xLex.Next</text:span></text:span><text:span text:style-name="Código_20_HTML"><text:span text:style-name="T82">;</text:span></text:span><text:span text:style-name="Código_20_HTML"><text:span text:style-name="T51"> </text:span></text:span><text:span text:style-name="T108"><text:line-break/></text:span><text:span text:style-name="Código_20_HTML"><text:span text:style-name="T15"> end;</text:span></text:span></text:p>
      <text:p text:style-name="P75"/>
      <text:p text:style-name="P75">The second parameter setline() is the line number that is being explored, but for our purposes it is not important, so we left at zero.</text:p>
      <text:p text:style-name="P75"/>
      <text:p text:style-name="P75"><text:soft-page-break/>The text of the token is read with GetToken() method. It is a simple string with the text of the current token.</text:p>
      <text:p text:style-name="P75"/>
      <text:p text:style-name="P75">We can also use the highlighter to extract text fragments, if these can be defined as tokens. In the following example, used the highlighter to extract the strings that are in parentheses.</text:p>
      <text:p text:style-name="P75"/>
      <text:p text:style-name="P135"><text:span text:style-name="Código_20_HTML"><text:span text:style-name="T15">uses </text:span></text:span><text:span text:style-name="Código_20_HTML"><text:span text:style-name="T51">..., SynEditHighlighter, SynHighlighterFacil</text:span></text:span><text:span text:style-name="Código_20_HTML"><text:span text:style-name="T82">;</text:span></text:span><text:span text:style-name="T51"><text:line-break/></text:span></text:p>
      <text:p text:style-name="P135"><text:span text:style-name="Código_20_HTML"><text:span text:style-name="T51"><text:s text:c="2"/>xLex </text:span></text:span><text:span text:style-name="Código_20_HTML"><text:span text:style-name="T82">: =</text:span></text:span><text:span text:style-name="Código_20_HTML"><text:span text:style-name="T51"> TSynFacilSyn.Create</text:span></text:span><text:span text:style-name="Código_20_HTML"><text:span text:style-name="T82">(</text:span></text:span><text:span text:style-name="Código_20_HTML"><text:span text:style-name="T15">self</text:span></text:span><text:span text:style-name="Código_20_HTML"><text:span text:style-name="T82">);</text:span></text:span><text:span text:style-name="Código_20_HTML"><text:span text:style-name="T51"><text:line-break/> </text:span></text:span><text:span text:style-name="T106"><text:s/>// Define the syntax<text:line-break/> </text:span><text:span text:style-name="Código_20_HTML"><text:span text:style-name="T51"><text:s/>xLex.DefTokDelim</text:span></text:span><text:span text:style-name="Código_20_HTML"><text:span text:style-name="T82">(</text:span></text:span><text:span text:style-name="Código_20_HTML"><text:span text:style-name="T117">'</text:span></text:span><text:span text:style-name="Código_20_HTML"><text:span text:style-name="T116">(</text:span></text:span><text:span text:style-name="Código_20_HTML"><text:span text:style-name="T117">'</text:span></text:span><text:span text:style-name="Código_20_HTML"><text:span text:style-name="T51">,</text:span></text:span><text:span text:style-name="Código_20_HTML"><text:span text:style-name="T117">'</text:span></text:span><text:span text:style-name="Código_20_HTML"><text:span text:style-name="T116">)</text:span></text:span><text:span text:style-name="Código_20_HTML"><text:span text:style-name="T117">'</text:span></text:span><text:span text:style-name="Código_20_HTML"><text:span text:style-name="T51">, </text:span></text:span><text:span text:style-name="Código_20_HTML"><text:span text:style-name="T53">x</text:span></text:span><text:span text:style-name="Código_20_HTML"><text:span text:style-name="T51">Lex.t</text:span></text:span><text:span text:style-name="Código_20_HTML"><text:span text:style-name="T53">n</text:span></text:span><text:span text:style-name="Código_20_HTML"><text:span text:style-name="T51">Keyword</text:span></text:span><text:span text:style-name="Código_20_HTML"><text:span text:style-name="T82">);</text:span></text:span><text:span text:style-name="Código_20_HTML"><text:span text:style-name="T51"><text:line-break/> <text:s/>xLex.Rebuild</text:span></text:span><text:span text:style-name="Código_20_HTML"><text:span text:style-name="T82">;</text:span></text:span></text:p>
      <text:p text:style-name="P135"><text:span text:style-name="Código_20_HTML"><text:span text:style-name="T51"><text:line-break/> </text:span></text:span><text:span text:style-name="T106"><text:s/>// Explores<text:line-break/> </text:span><text:span text:style-name="Código_20_HTML"><text:span text:style-name="T51"><text:s/>xLex.SetLine</text:span></text:span><text:span text:style-name="Código_20_HTML"><text:span text:style-name="T82">(</text:span></text:span><text:span text:style-name="Código_20_HTML"><text:span text:style-name="T117">'123</text:span></text:span><text:span text:style-name="Código_20_HTML"><text:span text:style-name="T116">(</text:span></text:span><text:span text:style-name="Código_20_HTML"><text:span text:style-name="T117">abc</text:span></text:span><text:span text:style-name="Código_20_HTML"><text:span text:style-name="T116">)</text:span></text:span><text:span text:style-name="Código_20_HTML"><text:span text:style-name="T117">345</text:span></text:span><text:span text:style-name="Código_20_HTML"><text:span text:style-name="T116">(</text:span></text:span><text:span text:style-name="Código_20_HTML"><text:span text:style-name="T117">def</text:span></text:span><text:span text:style-name="Código_20_HTML"><text:span text:style-name="T116">)</text:span></text:span><text:span text:style-name="Código_20_HTML"><text:span text:style-name="T117">000'</text:span></text:span><text:span text:style-name="Código_20_HTML"><text:span text:style-name="T51">, 0</text:span></text:span><text:span text:style-name="Código_20_HTML"><text:span text:style-name="T82">);</text:span></text:span><text:span text:style-name="Código_20_HTML"><text:span text:style-name="T51"><text:line-break/> <text:s/></text:span></text:span><text:span text:style-name="Código_20_HTML"><text:span text:style-name="T15">while not </text:span></text:span><text:span text:style-name="Código_20_HTML"><text:span text:style-name="T51">xLex.GetEol </text:span></text:span><text:span text:style-name="Código_20_HTML"><text:span text:style-name="T15">do begin</text:span></text:span><text:span text:style-name="Código_20_HTML"><text:span text:style-name="T51"><text:line-break/> <text:s text:c="3"/></text:span></text:span><text:span text:style-name="Código_20_HTML"><text:span text:style-name="T15">if </text:span></text:span><text:span text:style-name="Código_20_HTML"><text:span text:style-name="T51">xLex.GetToken</text:span></text:span><text:span text:style-name="Código_20_HTML"><text:span text:style-name="T52">Kind</text:span></text:span><text:span text:style-name="Código_20_HTML"><text:span text:style-name="T51"> </text:span></text:span><text:span text:style-name="Código_20_HTML"><text:span text:style-name="T82">=</text:span></text:span><text:span text:style-name="Código_20_HTML"><text:span text:style-name="T51"> xLex.t</text:span></text:span><text:span text:style-name="Código_20_HTML"><text:span text:style-name="T52">n</text:span></text:span><text:span text:style-name="Código_20_HTML"><text:span text:style-name="T51">Keyword </text:span></text:span><text:span text:style-name="Código_20_HTML"><text:span text:style-name="T15">then </text:span></text:span></text:p>
      <text:p text:style-name="P135"><text:span text:style-name="Código_20_HTML"><text:span text:style-name="T55"><text:s text:c="6"/></text:span></text:span><text:span text:style-name="Código_20_HTML"><text:span text:style-name="T51">ShowMessage</text:span></text:span><text:span text:style-name="Código_20_HTML"><text:span text:style-name="T82">(</text:span></text:span><text:span text:style-name="Código_20_HTML"><text:span text:style-name="T51">xLex.GetToken</text:span></text:span><text:span text:style-name="Código_20_HTML"><text:span text:style-name="T82">);</text:span></text:span><text:span text:style-name="Código_20_HTML"><text:span text:style-name="T51"><text:line-break/> <text:s text:c="3"/>xLex.Next</text:span></text:span><text:span text:style-name="Código_20_HTML"><text:span text:style-name="T82">;</text:span></text:span><text:span text:style-name="Código_20_HTML"><text:span text:style-name="T51"> </text:span></text:span><text:span text:style-name="T106">//Next token</text:span><text:span text:style-name="Código_20_HTML"><text:span text:style-name="T51"><text:line-break/> <text:s/></text:span></text:span><text:span text:style-name="Código_20_HTML"><text:span text:style-name="T15">end</text:span></text:span><text:span text:style-name="Código_20_HTML"><text:span text:style-name="T82">;</text:span></text:span></text:p>
      <text:p text:style-name="P136"/>
      <text:p text:style-name="P75"/>
      <text:p text:style-name="P75"><text:bookmark text:name="result_box69"/><text:span text:style-name="T136">The tokens returned, also include the parentheses because the definition of tokens, always includes delimiters.</text:span> </text:p>
      <text:p text:style-name="P75"/>
      <text:list xml:id="list230306037650014" text:continue-numbering="true" text:style-name="WW8Num24">
        <text:list-item>
          <text:list>
            <text:list-item>
              <text:list>
                <text:list-item>
                  <text:h text:style-name="P256" text:outline-level="3"><text:bookmark-start text:name="__RefHeading___Toc404419523"/>Scanning multiple lines <text:bookmark-end text:name="__RefHeading___Toc404419523"/></text:h>
                </text:list-item>
              </text:list>
            </text:list-item>
          </text:list>
        </text:list-item>
      </text:list>
      <text:p text:style-name="P75"/>
      <text:p text:style-name="P75">The exploration of several lines, consists in to explore one by one the lines of text. An exploration loop for extracting tokens in a text on multiple lines will look like this:</text:p>
      <text:p text:style-name="P75"/>
      <text:p text:style-name="P123"/>
      <text:p text:style-name="P117"><text:span text:style-name="T38"><text:s text:c="2"/></text:span><text:span text:style-name="T92">//</text:span><text:span text:style-name="T96">defines the syntax</text:span></text:p>
      <text:p text:style-name="P117"><text:span text:style-name="T38"><text:s text:c="2"/></text:span><text:span text:style-name="T26">...</text:span></text:p>
      <text:p text:style-name="P117"><text:span text:style-name="T38"><text:s text:c="2"/></text:span><text:span text:style-name="T92">//</text:span><text:span text:style-name="T96">explores</text:span></text:p>
      <text:p text:style-name="P117"><text:span text:style-name="T38"><text:s text:c="2"/></text:span><text:span text:style-name="T26">xLex.ResetRange</text:span><text:span text:style-name="T79">;</text:span><text:span text:style-name="T26"> </text:span><text:span text:style-name="T92">//</text:span><text:span text:style-name="T96">to initiate "Frange" appropriately</text:span></text:p>
      <text:p text:style-name="P117"><text:span text:style-name="T38"><text:s text:c="2"/></text:span><text:span text:style-name="T11">for </text:span><text:span text:style-name="T26">lin </text:span><text:span text:style-name="T11">in </text:span><text:span text:style-name="T26">SynEdit1.lines </text:span><text:span text:style-name="T11">do begin</text:span></text:p>
      <text:p text:style-name="P117"><text:span text:style-name="T38"><text:s text:c="4"/></text:span><text:span text:style-name="T26">xLex.SetLine</text:span><text:span text:style-name="T79">(</text:span><text:span text:style-name="T26">lin, 0</text:span><text:span text:style-name="T79">);</text:span><text:span text:style-name="T26"> </text:span><text:span text:style-name="T92">//</text:span><text:span text:style-name="T96">xLex is the highlighter</text:span></text:p>
      <text:p text:style-name="P117"><text:span text:style-name="T38"><text:s text:c="4"/></text:span><text:span text:style-name="T11">while not </text:span><text:span text:style-name="T26">xLex.GetEol </text:span><text:span text:style-name="T11">do begin</text:span></text:p>
      <text:p text:style-name="P117"><text:span text:style-name="T38"><text:s text:c="6"/></text:span><text:span text:style-name="T92">//</text:span><text:span text:style-name="T96">do something with the current token</text:span></text:p>
      <text:p text:style-name="P117"><text:span text:style-name="T38"><text:s text:c="6"/></text:span><text:span text:style-name="T26">...</text:span></text:p>
      <text:p text:style-name="P117"><text:span text:style-name="T38"><text:s text:c="6"/></text:span><text:span text:style-name="T26">xLex.Next</text:span><text:span text:style-name="T79">;</text:span><text:span text:style-name="T26"> </text:span><text:span text:style-name="T92">//</text:span><text:span text:style-name="T96">passes to the next</text:span></text:p>
      <text:p text:style-name="P117"><text:span text:style-name="T38"><text:s text:c="4"/></text:span><text:span text:style-name="T11">end</text:span><text:span text:style-name="T79">;</text:span></text:p>
      <text:p text:style-name="P117"><text:span text:style-name="T38"><text:s text:c="2"/></text:span><text:span text:style-name="T11">end</text:span><text:span text:style-name="T79">;</text:span></text:p>
      <text:p text:style-name="P75"/>
      <text:p text:style-name="P75"><text:soft-page-break/>The current token is accessed, as usual, with GetToken() and GetTokenKind().</text:p>
      <text:p text:style-name="P75"/>
      <text:p text:style-name="P74"><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128"><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5"/>
      <text:p text:style-name="P75">If we want to avoid having to load the entire text in a SynEdit, to begin to explore the most appropriate solution would be to use a TStringList object to store the text to explore and then work on that TStringList, as shown in the following code :</text:p>
      <text:p text:style-name="P75"/>
      <text:p text:style-name="P117"><text:span text:style-name="T38"><text:s text:c="2"/></text:span><text:span text:style-name="T26">lines </text:span><text:span text:style-name="T79">:=</text:span><text:span text:style-name="T26"> TStringList.Create</text:span><text:span text:style-name="T79">;</text:span></text:p>
      <text:p text:style-name="P117"><text:span text:style-name="T38"><text:s text:c="2"/></text:span><text:span text:style-name="T26">lineas.Text</text:span><text:span text:style-name="T79">:=</text:span><text:span text:style-name="T114">'In place of the world,'</text:span><text:span text:style-name="T79">+</text:span><text:span text:style-name="T26">LineEnding</text:span><text:span text:style-name="T79">+</text:span></text:p>
      <text:p text:style-name="P117"><text:span text:style-name="T38"><text:s text:c="15"/></text:span><text:span text:style-name="T114">'Whose name'</text:span><text:span text:style-name="T79">+</text:span><text:span text:style-name="T26">LineEnding</text:span><text:span text:style-name="T79">+</text:span></text:p>
      <text:p text:style-name="P117"><text:span text:style-name="T38"><text:s text:c="15"/></text:span><text:span text:style-name="T114">'I do not want to remember.'</text:span><text:span text:style-name="T79">;</text:span></text:p>
      <text:p text:style-name="P117"><text:span text:style-name="T38"><text:s text:c="2"/></text:span><text:span text:style-name="T92">//</text:span><text:span text:style-name="T96">explores</text:span></text:p>
      <text:p text:style-name="P117"><text:span text:style-name="T38"><text:s text:c="2"/></text:span><text:span text:style-name="T26">xLex.ResetRange</text:span><text:span text:style-name="T79">;</text:span><text:span text:style-name="T26"> </text:span><text:span text:style-name="T92">//</text:span><text:span text:style-name="T96">to initiate "Frange" appropriately</text:span></text:p>
      <text:p text:style-name="P117"><text:span text:style-name="T38"><text:s text:c="2"/></text:span><text:span text:style-name="T11">for </text:span><text:span text:style-name="T26">lin </text:span><text:span text:style-name="T11">in </text:span><text:span text:style-name="T26">lineas </text:span><text:span text:style-name="T11">do begin</text:span></text:p>
      <text:p text:style-name="P117"><text:span text:style-name="T38"><text:s text:c="4"/></text:span><text:span text:style-name="T26">xLex.SetLine</text:span><text:span text:style-name="T79">(</text:span><text:span text:style-name="T26">lin, 0</text:span><text:span text:style-name="T79">);</text:span><text:span text:style-name="T26"> </text:span><text:span text:style-name="T92">//</text:span><text:span text:style-name="T96">xLex is the highlighter</text:span></text:p>
      <text:p text:style-name="P117"><text:span text:style-name="T38"><text:s text:c="4"/></text:span><text:span text:style-name="T11">while not </text:span><text:span text:style-name="T26">xLex.GetEol </text:span><text:span text:style-name="T11">do begin</text:span></text:p>
      <text:p text:style-name="P117"><text:span text:style-name="T38"><text:s text:c="6"/></text:span><text:span text:style-name="T92">//</text:span><text:span text:style-name="T96">do something with the current token</text:span></text:p>
      <text:p text:style-name="P117"><text:span text:style-name="T38"><text:s text:c="6"/></text:span><text:span text:style-name="T26">...</text:span></text:p>
      <text:p text:style-name="P117"><text:span text:style-name="T38"><text:s text:c="6"/></text:span><text:span text:style-name="T26">xLex.Next</text:span><text:span text:style-name="T79">;</text:span><text:span text:style-name="T26"> </text:span><text:span text:style-name="T92">//</text:span><text:span text:style-name="T96">passes to the next</text:span></text:p>
      <text:p text:style-name="P117"><text:span text:style-name="T38"><text:s text:c="4"/></text:span><text:span text:style-name="T11">end</text:span><text:span text:style-name="T79">;</text:span></text:p>
      <text:p text:style-name="P117"><text:span text:style-name="T38"><text:s text:c="2"/></text:span><text:span text:style-name="T11">end</text:span><text:span text:style-name="T79">;</text:span></text:p>
      <text:p text:style-name="P117"><text:span text:style-name="T38"><text:s text:c="2"/></text:span><text:span text:style-name="T26">lineas.Destroy</text:span><text:span text:style-name="T79">;</text:span></text:p>
      <text:p text:style-name="P75"/>
      <text:p text:style-name="P75">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5"/>
      <text:p text:style-name="P75"><text:bookmark text:name="result_box70"/><text:span text:style-name="T136">This exploration work well, because it is done sequentially, so that you do not need careful handling ranges (GetRange and SetRange methods).</text:span> </text:p>
      <text:p text:style-name="P75"/>
      <text:p text:style-name="P80"><text:s/></text:p>
      <text:p text:style-name="P75"/>
      <text:list xml:id="list230306903377621" text:continue-numbering="true" text:style-name="WW8Num24">
        <text:list-item>
          <text:list>
            <text:list-item>
              <text:list>
                <text:list-item>
                  <text:h text:style-name="P256" text:outline-level="3"><text:bookmark-start text:name="__RefHeading___Toc404419524"/>Random access to text<text:bookmark-end text:name="__RefHeading___Toc404419524"/></text:h>
                </text:list-item>
              </text:list>
            </text:list-item>
          </text:list>
        </text:list-item>
      </text:list>
      <text:p text:style-name="P75"/>
      <text:p text:style-name="P75"><text:soft-page-break/>We can access any line of text directly at any time to extract containing tokens, but as long as it meets any of the following conditions:</text:p>
      <text:p text:style-name="P75"/>
      <text:list xml:id="list230305915673377" text:continue-list="list230306417873272" text:style-name="WW8Num17">
        <text:list-item>
          <text:p text:style-name="P241">There is no multiline tokens in all the content (fRange always point to NIL).</text:p>
        </text:list-item>
        <text:list-item>
          <text:p text:style-name="P241">There are multi tokens, but the line that is accessed, will not contain, even partially, a multiline token.</text:p>
        </text:list-item>
      </text:list>
      <text:p text:style-name="P15"/>
      <text:p text:style-name="P75">If any of these conditions are met, the random scan of anywhere on text, is possible. We could just call SetLine() with the line we wish to explore, and advance to the desired token.</text:p>
      <text:p text:style-name="P75"/>
      <text:p text:style-name="P75">But if our syntax provides multi tokens (such as multiline comments) then the random access is not so simple.</text:p>
      <text:p text:style-name="P75"/>
      <text:p text:style-name="P75">Suppose we apply the previous scan to a hypothetical multi-code elements. The code includes multiline comments:</text:p>
      <text:p text:style-name="P75"/>
      <text:p text:style-name="P102">//sample code</text:p>
      <text:p text:style-name="P102">{</text:p>
      <text:p text:style-name="P91"><text:span text:style-name="T21"><text:s text:c="2"/></text:span><text:span text:style-name="T20">x = x + 2;</text:span></text:p>
      <text:p text:style-name="P91"><text:span text:style-name="T21"><text:s text:c="2"/></text:span><text:span text:style-name="T20">c = "Hello World";</text:span></text:p>
      <text:p text:style-name="P91"><text:span text:style-name="T21"><text:s text:c="2"/></text:span><text:span text:style-name="T20">/* This is a</text:span></text:p>
      <text:p text:style-name="P91"><text:span text:style-name="T21"><text:s text:c="2"/></text:span><text:span text:style-name="T20">comment</text:span></text:p>
      <text:p text:style-name="P91"><text:span text:style-name="T21"><text:s text:c="2"/></text:span><text:span text:style-name="T20">several lines */</text:span></text:p>
      <text:p text:style-name="P102">}</text:p>
      <text:p text:style-name="P75"/>
      <text:p text:style-name="P75">If we set our highlighter, with a syntax for this language, extracting tokens might look like:</text:p>
      <text:p text:style-name="P75"/>
      <text:p text:style-name="P103">Comment : //sample code</text:p>
      <text:p text:style-name="P103">Symbol : {</text:p>
      <text:p text:style-name="P103">Space : </text:p>
      <text:p text:style-name="P103">Identifier : X</text:p>
      <text:p text:style-name="P103">Space : </text:p>
      <text:p text:style-name="P103">Symbol : =</text:p>
      <text:p text:style-name="P103">Space : </text:p>
      <text:p text:style-name="P103">Identifier : X</text:p>
      <text:p text:style-name="P103">Space : </text:p>
      <text:p text:style-name="P103">Symbol +</text:p>
      <text:p text:style-name="P103">Space : </text:p>
      <text:p text:style-name="P103">Number : 2</text:p>
      <text:p text:style-name="P103">Symbol :;</text:p>
      <text:p text:style-name="P103"><text:soft-page-break/>Space : </text:p>
      <text:p text:style-name="P103">Identifier : C</text:p>
      <text:p text:style-name="P103">Space : </text:p>
      <text:p text:style-name="P103">Symbol : =</text:p>
      <text:p text:style-name="P103">Space : </text:p>
      <text:p text:style-name="P103">String "Hello World"</text:p>
      <text:p text:style-name="P103">Symbol :;</text:p>
      <text:p text:style-name="P103">Space : </text:p>
      <text:p text:style-name="P103">Comment /* This is a</text:p>
      <text:p text:style-name="P103">Comment : comment</text:p>
      <text:p text:style-name="P103">Comment : several lines */</text:p>
      <text:p text:style-name="P103">Symbol :} </text:p>
      <text:p text:style-name="P75"/>
      <text:p text:style-name="P75">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5"/>
      <text:p text:style-name="P75">Even the blocks information, will be handled correctly, if blocks are defined in the highlighter. So you can climb a little beyond the lexical level and reach the syntactic level.</text:p>
      <text:p text:style-name="P75"/>
      <text:p text:style-name="P75">The key is in the sequential scanning. from start to finish. So it's always correctly updated the value of "fRange". </text:p>
      <text:p text:style-name="P75"/>
      <text:p text:style-name="P75"/>
      <text:p text:style-name="P75">But if we wished to perform a scan that will not necessarily sequential, and directly access the text line 6 (which is the second line a comment multiline), then we will be in the same problem in SynEdit found when exploring its contents.</text:p>
      <text:p text:style-name="P75"/>
      <text:p text:style-name="P75">The solution would be to use the same technique that performs SynEdit, which is basically:</text:p>
      <text:p text:style-name="P75"/>
      <text:list xml:id="list230306350103012" text:continue-numbering="true" text:style-name="WW8Num17">
        <text:list-item>
          <text:p text:style-name="P241">First perform a sequential scan of the entire text content.</text:p>
        </text:list-item>
        <text:list-item>
          <text:p text:style-name="P241">At the end of each line, store the value of Frange (in a table that has an entry for each line)</text:p>
        </text:list-item>
      </text:list>
      <text:p text:style-name="P75"/>
      <text:p text:style-name="P75">Now when we want to access randomly anywhere in the text, we must first read “fRrange” of the previous line and put it as the initial value of fRange (unless we are in the first line) at the beginning of the line.</text:p>
      <text:p text:style-name="P75"/>
      <text:p text:style-name="P20"><text:soft-page-break/><draw:frame draw:style-name="fr2" draw:name="Frame2" text:anchor-type="as-char" svg:y="-0.012cm" svg:width="16.852cm" svg:height="8.939cm" draw:z-index="80"><draw:text-box><text:p text:style-name="P90">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90"/><text:p text:style-name="P90">Use SynEdit as container, gives us the additional advantage that we can "see" the real lexical analyzer, coloring text content. </text:p><text:p text:style-name="P90"/><text:p text:style-name="P90">However, it may be too heavy, use all the SynEdit to perform lexical analysis, especially if this is to be performed on various files (should always be loaded each file in a SynEdit before analysis). </text:p><text:p text:style-name="P90"/><text:p text:style-name="P90">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5">To implement this solution, it would be best to use a TStringList to store the text to explore.</text:p>
      <text:p text:style-name="P75"/>
      <text:p text:style-name="P75">The advantage of using a TStringList, is that we can use the extra field that holds for each line, like a space to store the value of "fRange" and thus implement random access.</text:p>
      <text:p text:style-name="P75"/>
      <text:p text:style-name="P75">The following code shows how to perform the process described:</text:p>
      <text:p text:style-name="P75"/>
      <text:p text:style-name="P117"><text:span text:style-name="T11">procedure </text:span><text:span text:style-name="T26">TForm1.Button3Click</text:span><text:span text:style-name="T79">(</text:span><text:span text:style-name="T26">Sender</text:span><text:span text:style-name="T79">:</text:span><text:span text:style-name="T26"> TObject</text:span><text:span text:style-name="T79">);</text:span></text:p>
      <text:p text:style-name="P127">var</text:p>
      <text:p text:style-name="P117"><text:span text:style-name="T38"><text:s text:c="2"/></text:span><text:span text:style-name="T26">lin</text:span><text:span text:style-name="T79">:</text:span><text:span text:style-name="T26"> </text:span><text:span text:style-name="T11">String</text:span><text:span text:style-name="T79">;</text:span></text:p>
      <text:p text:style-name="P117"><text:span text:style-name="T38"><text:s text:c="2"/></text:span><text:span text:style-name="T26">lines</text:span><text:span text:style-name="T79">:</text:span><text:span text:style-name="T26"> TStringList</text:span><text:span text:style-name="T79">;</text:span></text:p>
      <text:p text:style-name="P117"><text:span text:style-name="T38"><text:s text:c="2"/></text:span><text:span text:style-name="T26">i</text:span><text:span text:style-name="T79">:</text:span><text:span text:style-name="T26"> Integer</text:span><text:span text:style-name="T79">;</text:span></text:p>
      <text:p text:style-name="P127">begin</text:p>
      <text:p text:style-name="P123"/>
      <text:p text:style-name="P117"><text:span text:style-name="T38"><text:s text:c="2"/></text:span><text:span text:style-name="T92">///////////</text:span><text:span text:style-name="T96">Create content</text:span></text:p>
      <text:p text:style-name="P117"><text:span text:style-name="T38"><text:s text:c="2"/></text:span><text:span text:style-name="T26">lines </text:span><text:span text:style-name="T79">: =</text:span><text:span text:style-name="T26"> TStringList.Create</text:span><text:span text:style-name="T79">;</text:span></text:p>
      <text:p text:style-name="P117"><text:span text:style-name="T38"><text:s text:c="2"/></text:span><text:span text:style-name="T26">lineas.Text</text:span><text:span text:style-name="T79">: =</text:span><text:span text:style-name="T26"> </text:span><text:span text:style-name="T114">'</text:span><text:span text:style-name="T92">//</text:span><text:span text:style-name="T96">example code '</text:span><text:span text:style-name="T92">+</text:span><text:span text:style-name="T96">LineEnding</text:span><text:span text:style-name="T92">+</text:span></text:p>
      <text:p text:style-name="P117"><text:span text:style-name="T38"><text:s text:c="16"/></text:span><text:span text:style-name="T114">'{'</text:span><text:span text:style-name="T79">+</text:span><text:span text:style-name="T26">LineEnding</text:span><text:span text:style-name="T79">+</text:span></text:p>
      <text:p text:style-name="P117"><text:span text:style-name="T38"><text:s text:c="16"/></text:span><text:span text:style-name="T114">' x </text:span><text:span text:style-name="T115">=</text:span><text:span text:style-name="T114"> x </text:span><text:span text:style-name="T115">+</text:span><text:span text:style-name="T114"> February</text:span><text:span text:style-name="T115">;</text:span><text:span text:style-name="T114">'</text:span><text:span text:style-name="T79">+</text:span><text:span text:style-name="T26">LineEnding</text:span><text:span text:style-name="T79">+</text:span></text:p>
      <text:p text:style-name="P117"><text:span text:style-name="T38"><text:s text:c="16"/></text:span><text:span text:style-name="T114">' c </text:span><text:span text:style-name="T115">=</text:span><text:span text:style-name="T114"> "Hello World"</text:span><text:span text:style-name="T115">;</text:span><text:span text:style-name="T114">'</text:span><text:span text:style-name="T79">+</text:span><text:span text:style-name="T26">LineEnding</text:span><text:span text:style-name="T79">+</text:span></text:p>
      <text:p text:style-name="P117"><text:span text:style-name="T38"><text:s text:c="16"/></text:span><text:span text:style-name="T114">'</text:span><text:span text:style-name="T115">/ *</text:span><text:span text:style-name="T114">This is a '</text:span><text:span text:style-name="T79">+</text:span><text:span text:style-name="T26">LineEnding</text:span><text:span text:style-name="T79">+</text:span></text:p>
      <text:p text:style-name="P117"><text:span text:style-name="T38"><text:s text:c="16"/></text:span><text:span text:style-name="T114">' comment '</text:span><text:span text:style-name="T79">+</text:span><text:span text:style-name="T26">LineEnding</text:span><text:span text:style-name="T79">+</text:span></text:p>
      <text:p text:style-name="P117"><text:span text:style-name="T38"><text:s text:c="16"/></text:span><text:span text:style-name="T114">' multiline </text:span><text:span text:style-name="T115">* /</text:span><text:span text:style-name="T114">'</text:span><text:span text:style-name="T79">+</text:span><text:span text:style-name="T26">LineEnding</text:span><text:span text:style-name="T79">+</text:span></text:p>
      <text:p text:style-name="P117"><text:span text:style-name="T38"><text:s text:c="16"/></text:span><text:span text:style-name="T114">'}'</text:span><text:span text:style-name="T79">+</text:span><text:span text:style-name="T26">LineEnding</text:span><text:span text:style-name="T79">+</text:span><text:span text:style-name="T114">''</text:span><text:span text:style-name="T79">;</text:span></text:p>
      <text:p text:style-name="P123"/>
      <text:p text:style-name="P117"><text:soft-page-break/><text:span text:style-name="T38"><text:s text:c="2"/></text:span><text:span text:style-name="T92">///////////</text:span><text:span text:style-name="T96">performs the first scan</text:span></text:p>
      <text:p text:style-name="P117"><text:span text:style-name="T38"><text:s text:c="2"/></text:span><text:span text:style-name="T26">xLex.ResetRange</text:span><text:span text:style-name="T79">;</text:span><text:span text:style-name="T26"> </text:span><text:span text:style-name="T92">//</text:span><text:span text:style-name="T96">to initiate "Frange" appropriately</text:span></text:p>
      <text:p text:style-name="P117"><text:span text:style-name="T38"><text:s text:c="2"/></text:span><text:span text:style-name="T11">for </text:span><text:span text:style-name="T26">i</text:span><text:span text:style-name="T79">:=</text:span><text:span text:style-name="T26">0 </text:span><text:span text:style-name="T11">to </text:span><text:span text:style-name="T26">lineas.Count</text:span><text:span text:style-name="T79">-1</text:span><text:span text:style-name="T26"> </text:span><text:span text:style-name="T11">do begin</text:span></text:p>
      <text:p text:style-name="P117"><text:span text:style-name="T38"><text:s text:c="4"/></text:span><text:span text:style-name="T26">lin </text:span><text:span text:style-name="T79">:=</text:span><text:span text:style-name="T26"> lines[i]</text:span><text:span text:style-name="T79">;</text:span></text:p>
      <text:p text:style-name="P117"><text:span text:style-name="T38"><text:s text:c="4"/></text:span><text:span text:style-name="T26">xLex.SetLine</text:span><text:span text:style-name="T79">(</text:span><text:span text:style-name="T26">lin, 0</text:span><text:span text:style-name="T79">);</text:span><text:span text:style-name="T26"> </text:span><text:span text:style-name="T92">//</text:span><text:span text:style-name="T96">"XLex" is the highlighter</text:span></text:p>
      <text:p text:style-name="P117"><text:span text:style-name="T38"><text:s text:c="4"/></text:span><text:span text:style-name="T11">while true do begin</text:span></text:p>
      <text:p text:style-name="P117"><text:span text:style-name="T38"><text:s text:c="6"/></text:span><text:span text:style-name="T11">if </text:span><text:span text:style-name="T26">xLex.GetEol </text:span><text:span text:style-name="T11">then begin</text:span></text:p>
      <text:p text:style-name="P117"><text:span text:style-name="T38"><text:s text:c="8"/></text:span><text:span text:style-name="T26">lineas.Objects[i] </text:span><text:span text:style-name="T79">:=</text:span><text:span text:style-name="T26"> TObject</text:span><text:span text:style-name="T79">(</text:span><text:span text:style-name="T26">xLex.Range</text:span><text:span text:style-name="T79">);</text:span></text:p>
      <text:p text:style-name="P117"><text:span text:style-name="T38"><text:s text:c="8"/></text:span><text:span text:style-name="T11">break</text:span><text:span text:style-name="T79">;</text:span></text:p>
      <text:p text:style-name="P117"><text:span text:style-name="T38"><text:s text:c="6"/></text:span><text:span text:style-name="T11">end</text:span><text:span text:style-name="T79">;</text:span></text:p>
      <text:p text:style-name="P117"><text:span text:style-name="T38"><text:s text:c="6"/></text:span><text:span text:style-name="T92">//</text:span><text:span text:style-name="T96">you can use to do something in this exploration</text:span></text:p>
      <text:p text:style-name="P117"><text:span text:style-name="T38"><text:s text:c="6"/></text:span><text:span text:style-name="T26">xLex.Next</text:span><text:span text:style-name="T79">;</text:span><text:span text:style-name="T26"> </text:span><text:span text:style-name="T92">//</text:span><text:span text:style-name="T96">passes to the next</text:span></text:p>
      <text:p text:style-name="P117"><text:span text:style-name="T38"><text:s text:c="4"/></text:span><text:span text:style-name="T11">end</text:span><text:span text:style-name="T79">;</text:span></text:p>
      <text:p text:style-name="P117"><text:span text:style-name="T38"><text:s text:c="2"/></text:span><text:span text:style-name="T11">end</text:span><text:span text:style-name="T79">;</text:span></text:p>
      <text:p text:style-name="P117"><text:span text:style-name="T38"><text:s text:c="2"/></text:span><text:span text:style-name="T92">//</text:span><text:span text:style-name="T96">Make random access to line 6</text:span></text:p>
      <text:p text:style-name="P117"><text:span text:style-name="T38"><text:s text:c="2"/></text:span><text:span text:style-name="T26">xLex.ran</text:span><text:span text:style-name="T79">: =</text:span><text:span text:style-name="T26">TPtrTokEspec</text:span><text:span text:style-name="T79">(</text:span><text:span text:style-name="T26">lineas.Objects[4]</text:span><text:span text:style-name="T79">); </text:span><text:span text:style-name="T92">//</text:span><text:span text:style-name="T96">range retrieves previous line</text:span></text:p>
      <text:p text:style-name="P117"><text:span text:style-name="T38"><text:s text:c="2"/></text:span><text:span text:style-name="T26">xLex.SetLine</text:span><text:span text:style-name="T79">(</text:span><text:span text:style-name="T26">lines[5],0</text:span><text:span text:style-name="T79">);</text:span><text:span text:style-name="T26"> </text:span><text:span text:style-name="T92">//</text:span><text:span text:style-name="T96">assigns string</text:span></text:p>
      <text:p text:style-name="P117"><text:span text:style-name="T38"><text:s text:c="2"/></text:span><text:span text:style-name="T92">//H</text:span><text:span text:style-name="T96">ere we are in line 6 and we can explore normally.</text:span></text:p>
      <text:p text:style-name="P117"><text:span text:style-name="T94"><text:s text:c="2"/></text:span><text:span text:style-name="T92">//We will f</text:span><text:span text:style-name="T96">ind a unique token of comment type.</text:span></text:p>
      <text:p text:style-name="P114"/>
      <text:p text:style-name="P117"><text:span text:style-name="T38"><text:s text:c="2"/></text:span><text:span text:style-name="T26">lineas.Destroy</text:span><text:span text:style-name="T79">;</text:span></text:p>
      <text:p text:style-name="P117"><text:span text:style-name="T11">end</text:span><text:span text:style-name="T79">;</text:span></text:p>
      <text:p text:style-name="P75"/>
      <text:p text:style-name="P75"/>
      <text:p text:style-name="P75"><text:bookmark text:name="result_box71"/><text:span text:style-name="T136">Of course, if we want to access only once to a specific position, it would be better to explore sequentially until the desired line. But we are assuming that we are going to accessed several times to random different positions of the text.</text:span> </text:p>
      <text:p text:style-name="P75"/>
      <text:p text:style-name="P75">It can be seen that for access to any line, we must first load the value of "fRange" from the previous line. This ensures a correct interpretation of the tokens.</text:p>
      <text:p text:style-name="P75"/>
      <text:p text:style-name="P75">The property "Range" of TsynFacilSyn let us to access to the internal “fRange” field.</text:p>
      <text:p text:style-name="P75"/>
      <text:p text:style-name="P75">It is assumed that the syntax is already loaded on the highlighter "xLex", and it has been defined delimiters /* and */ as multiline comments.</text:p>
      <text:p text:style-name="P75"/>
      <text:p text:style-name="P75">With this mechanism we are ensuring proper access tokens anywhere in the text, keeping the correct value of fRange. But we are not keeping the information of block. </text:p>
      <text:p text:style-name="P75"/>
      <text:list xml:id="list230305954276309" text:continue-list="list230306903377621" text:style-name="WW8Num24">
        <text:list-item>
          <text:list>
            <text:list-item>
              <text:list>
                <text:list-item>
                  <text:h text:style-name="P254" text:outline-level="2"><text:bookmark text:name="result_box72"/><text:bookmark-start text:name="__RefHeading__27882_2030348867"/><text:soft-page-break/><text:span text:style-name="T136">T</text:span><text:span text:style-name="T141">ools for lexical analysis</text:span><text:bookmark-end text:name="__RefHeading__27882_2030348867"/></text:h>
                </text:list-item>
              </text:list>
            </text:list-item>
          </text:list>
        </text:list-item>
      </text:list>
      <text:p text:style-name="P75"><text:span text:style-name="T136"><text:line-break/><text:tab/>The highlighter TSYnaFacilSyn, provides some functions that can help implement lexical or syntactic analyzers. These are:</text:span> </text:p>
      <text:p text:style-name="P75"/>
      <text:p text:style-name="P151"><text:span text:style-name="T16">Public </text:span><text:span text:style-name="T110">//</text:span><text:span text:style-name="T109">Utilities for lexical analysis</text:span></text:p>
      <text:p text:style-name="P151"><text:span text:style-name="T24"><text:s text:c="2"/></text:span><text:span text:style-name="T16">function </text:span><text:span text:style-name="T56">GetX</text:span><text:span text:style-name="T83">:</text:span><text:span text:style-name="T24"> </text:span><text:span text:style-name="T56">Integer</text:span><text:span text:style-name="T83">;</text:span><text:span text:style-name="T24"> </text:span><text:span text:style-name="T16">inline</text:span><text:span text:style-name="T83">;</text:span><text:span text:style-name="T24"> </text:span><text:span text:style-name="T110">//Current </text:span><text:span text:style-name="T109">X posición of highlighter</text:span></text:p>
      <text:p text:style-name="P151"><text:span text:style-name="T24"><text:s text:c="2"/></text:span><text:span text:style-name="T16">function </text:span><text:span text:style-name="T56">GetY</text:span><text:span text:style-name="T83">:</text:span><text:span text:style-name="T24"> </text:span><text:span text:style-name="T56">Integer</text:span><text:span text:style-name="T83">;</text:span><text:span text:style-name="T24"> </text:span><text:span text:style-name="T16">inline</text:span><text:span text:style-name="T83">;</text:span><text:span text:style-name="T24"> </text:span><text:span text:style-name="T110">//Current </text:span><text:span text:style-name="T109">Y position of highlighter</text:span></text:p>
      <text:p text:style-name="P151"><text:span text:style-name="T110"><text:s/></text:span><text:span text:style-name="T16">function </text:span><text:span text:style-name="T56">GetXY</text:span><text:span text:style-name="T83">:</text:span><text:span text:style-name="T24"> </text:span><text:span text:style-name="T56">Tpoint</text:span><text:span text:style-name="T83">; </text:span><text:span text:style-name="T24"><text:s/></text:span><text:span text:style-name="T110">//return the current position of highlighter</text:span></text:p>
      <text:p text:style-name="P151"><text:span text:style-name="T24"><text:s text:c="3"/></text:span><text:span text:style-name="T16">property </text:span><text:span text:style-name="T56">Range</text:span><text:span text:style-name="T83">:</text:span><text:span text:style-name="T24"> </text:span><text:span text:style-name="T56">TPtrTokEspec </text:span><text:span text:style-name="T16">read </text:span><text:span text:style-name="T56">fRange</text:span><text:span text:style-name="T83">;</text:span></text:p>
      <text:p text:style-name="P151"><text:span text:style-name="T24"><text:s text:c="3"/></text:span><text:span text:style-name="T16">property </text:span><text:span text:style-name="T56">State</text:span><text:span text:style-name="T83">:</text:span><text:span text:style-name="T24"> </text:span><text:span text:style-name="T56">TFaLexerState </text:span><text:span text:style-name="T16">read </text:span><text:span text:style-name="T56">GetState write SetState</text:span><text:span text:style-name="T83">;</text:span></text:p>
      <text:p text:style-name="P75"/>
      <text:p text:style-name="P84"><text:bookmark text:name="result_box73"/>If in the middle of an exploration of text, you want to know the current position being scanned, we must use the functions GetX(), GetY() or GetXY(), which can obtain the current position of the highlighter scanning.</text:p>
      <text:p text:style-name="P75"><text:span text:style-name="T136"><text:line-break/><text:tab/>The positions, both horizontally and vertically, always start at the value 1 for the first row or column.</text:span> </text:p>
      <text:p text:style-name="P75"/>
      <text:p text:style-name="P84"><text:bookmark text:name="result_box74"/>For these functions to work properly, it is necessary to have correctly specified the value of "LineNumber" parameter when it was called setline(). This value starts at 0 line to the first line.</text:p>
      <text:p text:style-name="P84"><text:line-break/><text:tab/>The "Range" property, as already indicated, accesses the "fRange" property that is the internal variable where the current range is saved, while a scan is performed.</text:p>
      <text:p text:style-name="P75"><text:span text:style-name="T136"><text:line-break/><text:tab/>The State property, allows to read or write, the internal status variables of the highlighter at any time of the scan. It returns a record <text:s/>of type TFaLexerState:</text:span> </text:p>
      <text:p text:style-name="P109"/>
      <text:p text:style-name="P151"><text:span text:style-name="T56">TFaLexerState </text:span><text:span text:style-name="T83">=</text:span><text:span text:style-name="T24"> </text:span><text:span text:style-name="T16">record</text:span></text:p>
      <text:p text:style-name="P151"><text:span text:style-name="T57"><text:s text:c="2"/></text:span><text:span text:style-name="T110">//properties set at the beginning of the line and maintain for all the line</text:span><text:span text:style-name="T109">.</text:span></text:p>
      <text:p text:style-name="P151"><text:span text:style-name="T56"><text:s text:c="2"/>LineText </text:span><text:span text:style-name="T83">:</text:span><text:span text:style-name="T24"> </text:span><text:span text:style-name="T16">string</text:span><text:span text:style-name="T83">;</text:span><text:span text:style-name="T24"> <text:s text:c="4"/></text:span><text:span text:style-name="T110">//workimg line</text:span></text:p>
      <text:p text:style-name="P151"><text:span text:style-name="T56"><text:s text:c="2"/>LineIndex</text:span><text:span text:style-name="T83">:</text:span><text:span text:style-name="T24"> </text:span><text:span text:style-name="T56">integer</text:span><text:span text:style-name="T83">; </text:span><text:span text:style-name="T110">//current line number</text:span></text:p>
      <text:p text:style-name="P151"><text:span text:style-name="T57"><text:s text:c="2"/></text:span><text:span text:style-name="T110">//properties that change through the line scanning</text:span></text:p>
      <text:p text:style-name="P151"><text:span text:style-name="T56"><text:s text:c="2"/>posTok <text:s text:c="2"/></text:span><text:span text:style-name="T83">:</text:span><text:span text:style-name="T24"> </text:span><text:span text:style-name="T56">integer</text:span><text:span text:style-name="T83">; </text:span><text:span text:style-name="T24"><text:s/></text:span><text:span text:style-name="T110">//identify the order of a token in the line</text:span></text:p>
      <text:p text:style-name="P151"><text:span text:style-name="T56"><text:s text:c="2"/>BlkToClose</text:span><text:span text:style-name="T83">:</text:span><text:span text:style-name="T24"> </text:span><text:span text:style-name="T56">TFaSynBlock</text:span><text:span text:style-name="T83">;</text:span><text:span text:style-name="T24"> </text:span><text:span text:style-name="T110">//flag to postpone the closure of a block</text:span></text:p>
      <text:p text:style-name="P151"><text:span text:style-name="T56"><text:s text:c="2"/>posIni <text:s text:c="3"/></text:span><text:span text:style-name="T83">:</text:span><text:span text:style-name="T24"> </text:span><text:span text:style-name="T56">Integer</text:span><text:span text:style-name="T83">;</text:span><text:span text:style-name="T24"> <text:s text:c="2"/></text:span><text:span text:style-name="T110">//index to the start of a token</text:span></text:p>
      <text:p text:style-name="P151"><text:span text:style-name="T56"><text:s text:c="2"/>posFin <text:s text:c="3"/></text:span><text:span text:style-name="T83">:</text:span><text:span text:style-name="T24"> </text:span><text:span text:style-name="T56">Integer</text:span><text:span text:style-name="T83">;</text:span><text:span text:style-name="T24"> <text:s text:c="2"/></text:span><text:span text:style-name="T110">//index to the end of a token</text:span></text:p>
      <text:p text:style-name="P151"><text:span text:style-name="T56"><text:s text:c="2"/>fRange <text:s text:c="3"/></text:span><text:span text:style-name="T83">:</text:span><text:span text:style-name="T24"> </text:span><text:span text:style-name="T56">^TTokSpec</text:span><text:span text:style-name="T83">;</text:span><text:span text:style-name="T24"> </text:span><text:span text:style-name="T110">//to work with multiline tokens</text:span></text:p>
      <text:p text:style-name="P151"><text:span text:style-name="T56"><text:s text:c="2"/>fTokenID <text:s/></text:span><text:span text:style-name="T83">:</text:span><text:span text:style-name="T24"> </text:span><text:span text:style-name="T65">integer</text:span><text:span text:style-name="T83">;</text:span><text:span text:style-name="T24">  <text:s text:c="3"/></text:span><text:span text:style-name="T110">//current token ID</text:span></text:p>
      <text:p text:style-name="P151"><text:span text:style-name="T16">end</text:span><text:span text:style-name="T83">;</text:span></text:p>
      <text:p text:style-name="P75"/>
      <text:p text:style-name="P75"><text:soft-page-break/>These fields are practically, all we need to read from the highlighter to determine their current status.</text:p>
      <text:p text:style-name="P75"/>
      <text:p text:style-name="P75">The most common use is when in the middle of a scan, you want to save a special position within the text and then recover it, in a more advanced state of exploration.</text:p>
      <text:p text:style-name="P75"/>
      <text:list xml:id="list230306582883805" text:continue-numbering="true" text:style-name="WW8Num24">
        <text:list-item>
          <text:h text:style-name="P244" text:outline-level="1"><text:bookmark-start text:name="__RefHeading___Toc404419525"/>For developers<text:bookmark-end text:name="__RefHeading___Toc404419525"/></text:h>
          <text:list>
            <text:list-item>
              <text:h text:style-name="P246" text:outline-level="2"><text:bookmark-start text:name="__RefHeading___Toc404419526"/>Method table <text:bookmark-end text:name="__RefHeading___Toc404419526"/></text:h>
            </text:list-item>
          </text:list>
        </text:list-item>
      </text:list>
      <text:p text:style-name="P75"/>
      <text:p text:style-name="P75">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96"/>
      <text:p text:style-name="P75">The table is an array of pointers to cells with 256 processing routines. This table has the following statement:</text:p>
      <text:p text:style-name="P75"/>
      <text:p text:style-name="P117"><text:span text:style-name="T38"><text:s text:c="2"/></text:span><text:span text:style-name="T26">TProcTableProc </text:span><text:span text:style-name="T79">=</text:span><text:span text:style-name="T26"> </text:span><text:span text:style-name="T11">procedure of object</text:span><text:span text:style-name="T79">;</text:span><text:span text:style-name="T26"> </text:span></text:p>
      <text:p text:style-name="P117"><text:span text:style-name="T38"><text:s text:c="2"/></text:span><text:span text:style-name="T26">...</text:span></text:p>
      <text:p text:style-name="P117"><text:span text:style-name="T38"><text:s text:c="2"/></text:span><text:span text:style-name="T26">TSynFacilSyn </text:span><text:span text:style-name="T79">=</text:span><text:span text:style-name="T26"> </text:span><text:span text:style-name="T11">class</text:span><text:span text:style-name="T79">(</text:span><text:span text:style-name="T26">TSynCustomHighlighter</text:span><text:span text:style-name="T79">)</text:span></text:p>
      <text:p text:style-name="P117"><text:span text:style-name="T38"><text:s text:c="2"/></text:span><text:span text:style-name="T11">private</text:span></text:p>
      <text:p text:style-name="P117"><text:span text:style-name="T38"><text:s text:c="4"/></text:span><text:span text:style-name="T26">...</text:span></text:p>
      <text:p text:style-name="P117"><text:span text:style-name="T38"><text:s text:c="4"/></text:span><text:span text:style-name="T26">fProcTable </text:span><text:span text:style-name="T79">:</text:span><text:span text:style-name="T26"> </text:span><text:span text:style-name="T11">array</text:span><text:span text:style-name="T26">[# 0 .. # 255] </text:span><text:span text:style-name="T11">of </text:span><text:span text:style-name="T26">TProcTableProc</text:span><text:span text:style-name="T79">;</text:span><text:span text:style-name="T26"> </text:span><text:span text:style-name="T92">//</text:span><text:span text:style-name="T96">Method Table</text:span></text:p>
      <text:p text:style-name="P117"><text:span text:style-name="T38"><text:s text:c="4"/></text:span><text:span text:style-name="T26">...</text:span></text:p>
      <text:p text:style-name="P117"><text:span text:style-name="T13"><text:s text:c="2"/></text:span><text:span text:style-name="T11">end</text:span><text:span text:style-name="T79">;</text:span></text:p>
      <text:p text:style-name="P75"/>
      <text:p text:style-name="P75">This table is modified when identifiers, tokens by content, or delimited tokens, are defined, by pointing to the appropriate routines that perform the identification of tokens. This will avoid comparisons and the response speed is improved.</text:p>
      <text:p text:style-name="P75"/>
      <text:p text:style-name="P75">The methods table is started with ClearMethodTables():</text:p>
      <text:p text:style-name="P75"/>
      <text:p text:style-name="P117"><text:span text:style-name="T11">procedure </text:span><text:span text:style-name="T26">TSynFacilSyn.ClearMethodTables</text:span><text:span text:style-name="T79">;</text:span></text:p>
      <text:p text:style-name="P117"><text:span text:style-name="T11">var </text:span><text:span text:style-name="T26">i</text:span><text:span text:style-name="T79">:</text:span><text:span text:style-name="T26"> Char</text:span><text:span text:style-name="T79">;</text:span></text:p>
      <text:p text:style-name="P127">begin</text:p>
      <text:p text:style-name="P117"><text:span text:style-name="T38"><text:s text:c="2"/></text:span><text:span text:style-name="T26">...</text:span></text:p>
      <text:p text:style-name="P117"><text:span text:style-name="T38"><text:s text:c="2"/></text:span><text:span text:style-name="T11">for </text:span><text:span text:style-name="T26">i</text:span><text:span text:style-name="T79">: =</text:span><text:span text:style-name="T26"> # 0 </text:span><text:span text:style-name="T11">to </text:span><text:span text:style-name="T26"># 255 </text:span><text:span text:style-name="T11">do</text:span></text:p>
      <text:p text:style-name="P117"><text:span text:style-name="T38"><text:s text:c="4"/></text:span><text:span text:style-name="T11">case </text:span><text:span text:style-name="T26">i</text:span><text:span text:style-name="T11">of</text:span></text:p>
      <text:p text:style-name="P117"><text:span text:style-name="T38"><text:s text:c="6"/></text:span><text:span text:style-name="T92">//</text:span><text:span text:style-name="T96">white characters are fixed</text:span></text:p>
      <text:p text:style-name="P117"><text:span text:style-name="T38"><text:s text:c="6"/></text:span><text:span text:style-name="T26"># 1 .. # 32 </text:span><text:span text:style-name="T79">:</text:span><text:span text:style-name="T26"> fProcTable [i] </text:span><text:span text:style-name="T79">: =</text:span><text:span text:style-name="T26"> metSpace</text:span><text:span text:style-name="T79">;</text:span></text:p>
      <text:p text:style-name="P117"><text:span text:style-name="T38"><text:s text:c="6"/></text:span><text:span text:style-name="T92">//</text:span><text:span text:style-name="T96">EOL</text:span></text:p>
      <text:p text:style-name="P117"><text:span text:style-name="T38"><text:s text:c="6"/></text:span><text:span text:style-name="T26"># 0 </text:span><text:span text:style-name="T79">:</text:span><text:span text:style-name="T26"> fProcTable [i] </text:span><text:span text:style-name="T79">: =</text:span><text:span text:style-name="T26"> metNull</text:span><text:span text:style-name="T79">;</text:span></text:p>
      <text:p text:style-name="P117"><text:span text:style-name="T38"><text:s text:c="6"/></text:span><text:span text:style-name="T11">else </text:span><text:span text:style-name="T92">//</text:span><text:span text:style-name="T96">other characters </text:span><text:span text:style-name="T92">(</text:span><text:span text:style-name="T96">alphanumeric or not</text:span><text:span text:style-name="T92">)</text:span></text:p>
      <text:p text:style-name="P117"><text:span text:style-name="T38"><text:s text:c="8"/></text:span><text:span text:style-name="T26">fProcTable [i] </text:span><text:span text:style-name="T79">: =</text:span><text:span text:style-name="T26"> metSymbol</text:span><text:span text:style-name="T79">;</text:span><text:span text:style-name="T26"> </text:span><text:span text:style-name="T92">//</text:span><text:span text:style-name="T96">symbols are considered</text:span></text:p>
      <text:p text:style-name="P117"><text:span text:style-name="T38"><text:s text:c="4"/></text:span><text:span text:style-name="T11">end</text:span><text:span text:style-name="T79">;</text:span></text:p>
      <text:p text:style-name="P117"><text:span text:style-name="T11">end</text:span><text:span text:style-name="T79">;</text:span></text:p>
      <text:p text:style-name="P75"><text:soft-page-break/></text:p>
      <text:p text:style-name="P74"><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128"><text:s/></text:span>Actually, the highlighter also creates a default definition for identifiers to start.</text:p></text:note-body></text:note></text:span></text:span><text:span text:style-name="T6">. For safety, it's required that all characters have an associated method.</text:span></text:p>
      <text:p text:style-name="P75"/>
      <text:p text:style-name="P75">From this basic configuration, it is changing the method table so that it conforms to the syntax of work.</text:p>
      <text:p text:style-name="P75"/>
      <text:p text:style-name="P75">To put the highlighter in this initial state we call the following code.</text:p>
      <text:p text:style-name="P75"/>
      <text:p text:style-name="P117"><text:span text:style-name="T38"><text:s text:c="2"/></text:span><text:span text:style-name="T26">hlt1.ClearSpecials</text:span><text:span text:style-name="T79">;</text:span></text:p>
      <text:p text:style-name="P117"><text:span text:style-name="T38"><text:s text:c="2"/></text:span><text:span text:style-name="T26">hlt1.ClearMethodTables</text:span><text:span text:style-name="T79">;</text:span></text:p>
      <text:p text:style-name="P75"/>
      <text:p text:style-name="P75">This empty syntax would only consider three types of tokens: symbols, spaces and nulls. As null tokens are found only in the end of line, then all other symbols or spaces are considered. One way to see the distribution in the method table would be:</text:p>
      <text:p text:style-name="P75"/>
      <text:p text:style-name="P38"><draw:frame draw:style-name="fr19" draw:name="Object15" text:anchor-type="as-char" svg:width="11.735cm" svg:height="6.754cm" draw:z-index="81"><draw:object-ole xlink:href="./Object 15" xlink:type="simple" xlink:show="embed" xlink:actuate="onLoad"/><draw:image xlink:href="./ObjectReplacements/Object 15" xlink:type="simple" xlink:show="embed" xlink:actuate="onLoad"/></draw:frame></text:p>
      <text:p text:style-name="P78"/>
      <text:p text:style-name="P75">The spaces have a fixed definition and can not be changed, which is why there will always be this category.</text:p>
      <text:p text:style-name="P75"/>
      <text:p text:style-name="P75">The symbols are not defined, are assumed to be characters that can not be processed like any other token. In a case of empty syntax, are considered like symbols, all tokens that are no spaces or nulls.</text:p>
      <text:p text:style-name="P75"/>
      <text:p text:style-name="P75"><text:soft-page-break/>The following example shows what the initial distribution of tokens in a text with highlighter without starting: </text:p>
      <text:p text:style-name="P75"/>
      <text:p text:style-name="P91"><draw:frame draw:style-name="fr20" draw:name="Object16" text:anchor-type="as-char" svg:width="8.35cm" svg:height="1.602cm" draw:z-index="82"><draw:object-ole xlink:href="./Object 16" xlink:type="simple" xlink:show="embed" xlink:actuate="onLoad"/><draw:image xlink:href="./ObjectReplacements/Object 16" xlink:type="simple" xlink:show="embed" xlink:actuate="onLoad"/></draw:frame></text:p>
      <text:p text:style-name="P75"/>
      <text:p text:style-name="P75">The light gray part represents the symbol tokens type, there are 3 of them. There are also 2 tokens of type space and two Nulls, one at the end of each line.</text:p>
      <text:p text:style-name="P75"/>
      <text:p text:style-name="P75">When we start creating delimiters, delimited tokens and tokens by content, we will begin to reduce the number of characters that are considered as symbols.</text:p>
      <text:p text:style-name="P75"/>
      <text:list xml:id="list230306496177080" text:continue-numbering="true" text:style-name="WW8Num24">
        <text:list-item>
          <text:list>
            <text:list-item>
              <text:h text:style-name="P246" text:outline-level="2"><text:bookmark-start text:name="__RefHeading___Toc404419527"/>Defining identifiers<text:bookmark-end text:name="__RefHeading___Toc404419527"/></text:h>
            </text:list-item>
          </text:list>
        </text:list-item>
      </text:list>
      <text:p text:style-name="P75"/>
      <text:p text:style-name="P75">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5"/>
      <text:p text:style-name="P38"><draw:frame draw:style-name="fr21" draw:name="Object17" text:anchor-type="as-char" svg:width="12.709cm" svg:height="4.138cm" draw:z-index="83"><draw:object-ole xlink:href="./Object 17" xlink:type="simple" xlink:show="embed" xlink:actuate="onLoad"/><draw:image xlink:href="./ObjectReplacements/Object 17" xlink:type="simple" xlink:show="embed" xlink:actuate="onLoad"/></draw:frame></text:p>
      <text:p text:style-name="P75"/>
      <text:p text:style-name="P75">The identifiers are at the same level as symbols, because both can be used as delimiters, but not any symbol or identifier. These must be special symbols or special identifiers.</text:p>
      <text:p text:style-name="P75"/>
      <text:p text:style-name="P75">A more complete diagram could be this:</text:p>
      <text:p text:style-name="P75"/>
      <text:p text:style-name="P38"><text:soft-page-break/><draw:frame draw:style-name="fr22" draw:name="Object18" text:anchor-type="as-char" svg:width="14.242cm" svg:height="4.817cm" draw:z-index="84"><draw:object-ole xlink:href="./Object 18" xlink:type="simple" xlink:show="embed" xlink:actuate="onLoad"/><draw:image xlink:href="./ObjectReplacements/Object 18" xlink:type="simple" xlink:show="embed" xlink:actuate="onLoad"/></draw:frame></text:p>
      <text:p text:style-name="P75"/>
      <text:p text:style-name="P75">The delimiters can be used in the definition of tokens, which is why they appear before.</text:p>
      <text:p text:style-name="P75"/>
      <text:p text:style-name="P75">The identifiers are defined in a simple way (to process them quickly). Externally, are defined as any token by content, but internally have restrictions such as:</text:p>
      <text:p text:style-name="P75"/>
      <text:list xml:id="list4151434192938930534" text:style-name="WW8Num21">
        <text:list-item>
          <text:p text:style-name="P229">The definition must always be two lists: One for initial and one for the following characters. No more complex definitions are supported.</text:p>
        </text:list-item>
        <text:list-item>
          <text:p text:style-name="P229">Only support a list of valid characters as the first character. No strings or delimiters allowed (delimiters these are top identifiers hierarchy).</text:p>
        </text:list-item>
        <text:list-item>
          <text:p text:style-name="P229">The initial character can not be any character. They are restricted to a smaller set for design issues, to quickly process the special identifiers.</text:p>
        </text:list-item>
      </text:list>
      <text:p text:style-name="P75"/>
      <text:p text:style-name="P75">The initial list of characters, falls directly within the method table, ie it does not occupy additional space, but for the following characters are required to use a special table within the highlighter. This table has the shape of a character map:</text:p>
      <text:p text:style-name="P75"/>
      <text:p text:style-name="P117"><text:span text:style-name="T38"><text:s text:c="4"/></text:span><text:span text:style-name="T26">CharsIdentif</text:span><text:span text:style-name="T79">:</text:span><text:span text:style-name="T26"> </text:span><text:span text:style-name="T11">array</text:span><text:span text:style-name="T26">[# 0 .. # 255] </text:span><text:span text:style-name="T11">of </text:span><text:span text:style-name="T26">ByteBool</text:span><text:span text:style-name="T79">;</text:span><text:span text:style-name="T26"> </text:span></text:p>
      <text:p text:style-name="P75"/>
      <text:p text:style-name="P75">When we want to define a character to be part of the “valid characters for the content of identifiers”, then the corresponding box will be set to TRUE. This character map allows us to perform quick searches. Graphically we will denote it as:</text:p>
      <text:p text:style-name="P75"/>
      <text:p text:style-name="P38"><draw:frame draw:style-name="fr23" draw:name="Object19" text:anchor-type="as-char" svg:width="3.307cm" svg:height="2.194cm" draw:z-index="85"><draw:object-ole xlink:href="./Object 19" xlink:type="simple" xlink:show="embed" xlink:actuate="onLoad"/><draw:image xlink:href="./ObjectReplacements/Object 19" xlink:type="simple" xlink:show="embed" xlink:actuate="onLoad"/></draw:frame></text:p>
      <text:p text:style-name="P75"/>
      <text:p text:style-name="P75"/>
      <text:p text:style-name="P75">As an example, consider that we define identifiers using:</text:p>
      <text:p text:style-name="P75"><text:soft-page-break/></text:p>
      <text:p text:style-name="P117"><text:span text:style-name="T38"><text:s text:c="2"/></text:span><text:span text:style-name="T26">hlt1.DefTokIdentif</text:span><text:span text:style-name="T79">(</text:span><text:span text:style-name="T114">'[$A-Za-z_]'</text:span><text:span text:style-name="T79">,</text:span><text:span text:style-name="T114">'[A-Za-z0-9_]*'</text:span><text:span text:style-name="T79">);</text:span></text:p>
      <text:p text:style-name="P75"/>
      <text:p text:style-name="P75">Our chart will look like this:</text:p>
      <text:p text:style-name="P75"/>
      <text:p text:style-name="P75"/>
      <text:p text:style-name="P38"><draw:frame draw:style-name="fr24" draw:name="Object20" text:anchor-type="as-char" svg:width="10.077cm" svg:height="7.043cm" draw:z-index="86"><draw:object-ole xlink:href="./Object 20" xlink:type="simple" xlink:show="embed" xlink:actuate="onLoad"/><draw:image xlink:href="./ObjectReplacements/Object 20" xlink:type="simple" xlink:show="embed" xlink:actuate="onLoad"/></draw:frame></text:p>
      <text:p text:style-name="P75"/>
      <text:p text:style-name="P75">With this configuration, each time a character that is on the list of initial characters for an identifier is detected, it is called the metIdent() routine, which is responsible for obtaining the following characters using the map CharsIdentif:</text:p>
      <text:p text:style-name="P75"/>
      <text:p text:style-name="P117"><text:span text:style-name="T11">procedure </text:span><text:span text:style-name="T26">TSynFacilSyn.metIdent</text:span><text:span text:style-name="T79">;</text:span></text:p>
      <text:p text:style-name="P117"><text:span text:style-name="T92">//</text:span><text:span text:style-name="T96">Processes the current identifier</text:span></text:p>
      <text:p text:style-name="P127">begin</text:p>
      <text:p text:style-name="P117"><text:span text:style-name="T38"><text:s text:c="2"/></text:span><text:span text:style-name="T26">inc</text:span><text:span text:style-name="T79">(</text:span><text:span text:style-name="T26">endpos</text:span><text:span text:style-name="T79">);</text:span></text:p>
      <text:p text:style-name="P117"><text:span text:style-name="T38"><text:s text:c="2"/></text:span><text:span text:style-name="T11">while </text:span><text:span text:style-name="T26">CharsIdentif [Fline [endpos]] </text:span><text:span text:style-name="T11">do </text:span><text:span text:style-name="T26">inc</text:span><text:span text:style-name="T79">(</text:span><text:span text:style-name="T26">endpos</text:span><text:span text:style-name="T79">);</text:span></text:p>
      <text:p text:style-name="P117"><text:span text:style-name="T38"><text:s text:c="2"/></text:span><text:span text:style-name="T26">fTokenID </text:span><text:span text:style-name="T79">: =</text:span><text:span text:style-name="T26"> t</text:span><text:span text:style-name="T33">n</text:span><text:span text:style-name="T26">Identif</text:span><text:span text:style-name="T79">;</text:span><text:span text:style-name="T26"> </text:span><text:span text:style-name="T92">//</text:span><text:span text:style-name="T96">common identifier</text:span></text:p>
      <text:p text:style-name="P117"><text:span text:style-name="T11">end</text:span><text:span text:style-name="T79">;</text:span></text:p>
      <text:p text:style-name="P75"/>
      <text:p text:style-name="P75">Once defined the identifiers, can then define the special identifiers. This definition may change references in the method table.</text:p>
      <text:p text:style-name="P75"/>
      <text:p text:style-name="P75">The symbols need not be defined, because they have a default definition, but special symbols if need be explicitly defined (except when automatically defined in the definition of other tokens or blocks).</text:p>
      <text:p text:style-name="P75"/>
      <text:list xml:id="list230306477632571" text:continue-list="list230306496177080" text:style-name="WW8Num24">
        <text:list-item>
          <text:list>
            <text:list-item>
              <text:h text:style-name="P246" text:outline-level="2"><text:bookmark-start text:name="__RefHeading___Toc404419528"/><text:soft-page-break/>Special Tokens<text:bookmark-end text:name="__RefHeading___Toc404419528"/></text:h>
            </text:list-item>
          </text:list>
        </text:list-item>
      </text:list>
      <text:p text:style-name="P75"/>
      <text:p text:style-name="P75">The "special" adjective for a token should not be taken in its real meaning. Perhaps the more appropriate name would be "specialized". </text:p>
      <text:p text:style-name="P196"/>
      <text:p text:style-name="P196">Are considered special tokens:</text:p>
      <text:p text:style-name="P196"/>
      <text:list xml:id="list645386785065747299" text:style-name="WW8Num8">
        <text:list-item>
          <text:p text:style-name="P230">Special Symbols. - Is a subset of all possible symbols.</text:p>
        </text:list-item>
        <text:list-item>
          <text:p text:style-name="P230">Special Identifiers .- <text:s/>Is a subset of identifiers.</text:p>
        </text:list-item>
      </text:list>
      <text:p text:style-name="P75"/>
      <text:p text:style-name="P75">Both types have in common that are stored in the same data structure. What sets them apart is the way it is defined in the source text.</text:p>
      <text:p text:style-name="P75"/>
      <text:p text:style-name="P75">The special identifiers are used to store identifier of delimiter type, but can also be used to store subsets of identifiers with particular attributes (Reserved Words, constants, etc), since by default all identifiers <text:span text:style-name="T155">belong to the predefined type</text:span>: t<text:span text:style-name="T155">n</text:span>Identif.</text:p>
      <text:p text:style-name="P75"/>
      <text:p text:style-name="P75">The situation is similar special symbols. They are used to store delimiters of symbol type, but can also be used to store subsets of symbols with particular attributes (eg operators), since by default, all symbols <text:span text:style-name="T155">belong to the predefined type </text:span>: t<text:span text:style-name="T155">n</text:span>Symbol.</text:p>
      <text:p text:style-name="P75"/>
      <text:p text:style-name="P75">The following table summarizes the statement:</text:p>
      <text:p text:style-name="P7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text:span text:style-name="T155">n</text:span>Identif</text:p>
          </table:table-cell>
          <table:table-cell table:style-name="Table18.C1" office:value-type="string">
            <text:list xml:id="list230306137462882" text:continue-numbering="true" text:style-name="WW8Num8">
              <text:list-item>
                <text:p text:style-name="P242"><text:span text:style-name="T156">I</text:span>dentifiers other than t<text:span text:style-name="T156">n</text:span>Identif (Keywords, Constants, ...)</text:p>
              </text:list-item>
              <text:list-item>
                <text:p text:style-name="P242">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text:span text:style-name="T155">n</text:span>Symbol</text:p>
          </table:table-cell>
          <table:table-cell table:style-name="Table18.C1" office:value-type="string">
            <text:list xml:id="list230307011062127" text:continue-numbering="true" text:style-name="WW8Num8">
              <text:list-item>
                <text:p text:style-name="P242">Symbol<text:span text:style-name="T156">s</text:span> other than t<text:span text:style-name="T156">n</text:span>Symbol (Operator, ...)</text:p>
              </text:list-item>
              <text:list-item>
                <text:p text:style-name="P242">Delimiter.</text:p>
              </text:list-item>
            </text:list>
          </table:table-cell>
        </table:table-row>
      </table:table>
      <text:p text:style-name="P196"/>
      <text:p text:style-name="P75">The special identifiers are stored in various tables, one for each initial character using. Currently we have the following tables:</text:p>
      <text:p text:style-name="P196"/>
      <text:p text:style-name="P117"><text:span text:style-name="T92">//</text:span><text:span text:style-name="T96">tables for special identifiers</text:span></text:p>
      <text:p text:style-name="P117"><text:span text:style-name="T26">mA, mB, mC, mD, mE, mF, mG, mH, mI, mJ, mK, mL, mM, </text:span><text:span text:style-name="T92">//</text:span><text:span text:style-name="T96">to uppercase</text:span></text:p>
      <text:p text:style-name="P123">mN, mO, mP, mQ, mR, mS, mT, mU, mV, mW, mX, mY, mZ,</text:p>
      <text:p text:style-name="P117"><text:span text:style-name="T26">mA_, MB_, mc_, MD_, Me_, mF_, MG_, mH_, mI_, MJ_, mK_, mL are MM_, </text:span><text:span text:style-name="T92">//</text:span><text:span text:style-name="T96">lowercase</text:span></text:p>
      <text:p text:style-name="P123">MN_, mO_, MP_, mQ_, Mr_, MS_, mt_, mU_, mV_, mW_, mX_, MY_, mZ_,</text:p>
      <text:p text:style-name="P117"><text:span text:style-name="T26">m_, mdol, Marr, mPer, mAmp, mC3 </text:span><text:span text:style-name="T79">:</text:span><text:span text:style-name="T26"> TArrayTokEspec</text:span><text:span text:style-name="T79">;</text:span></text:p>
      <text:p text:style-name="P75"><text:soft-page-break/></text:p>
      <text:p text:style-name="P75">Multiple tables are used, to optimize the search, because it is common to have many special identifiers. </text:p>
      <text:p text:style-name="P75"/>
      <text:p text:style-name="P75">Special symbols are stored in the table mSym[], declared as follows:</text:p>
      <text:p text:style-name="P75"/>
      <text:p text:style-name="P117"><text:span text:style-name="T38"><text:s text:c="4"/>mS</text:span><text:span text:style-name="T26">ym </text:span><text:span text:style-name="T79">:</text:span><text:span text:style-name="T26"> TArrayTokEspec</text:span><text:span text:style-name="T79">;</text:span><text:span text:style-name="T26"> </text:span><text:span text:style-name="T92">//</text:span><text:span text:style-name="T96">table of special symbols</text:span></text:p>
      <text:p text:style-name="P196"/>
      <text:p text:style-name="P75">Only one table is used for the special symbols, because it's not expected to have defined so many symbols. Otherwise, we could create several tables in order to speed the searches.</text:p>
      <text:p text:style-name="P196"/>
      <text:p text:style-name="P75">TArrayTokEspec, is an arrangement of elements TtokSpec type:</text:p>
      <text:p text:style-name="P75"/>
      <text:p text:style-name="P117"><text:span text:style-name="T38"><text:s text:c="2"/></text:span><text:span text:style-name="T26">TArrayTokEspec </text:span><text:span text:style-name="T79">=</text:span><text:span text:style-name="T26"> </text:span><text:span text:style-name="T11">array of </text:span><text:span text:style-name="T26">TtokSpec</text:span><text:span text:style-name="T79">;</text:span></text:p>
      <text:p text:style-name="P75"/>
      <text:p text:style-name="P75">Is a structure used to store identifiers or symbols, and further, to store information about the properties of a delimiter. Does not mean that all identifiers or special symbols are delimiters, but when they are, here keep their properties.</text:p>
      <text:p text:style-name="P75"/>
      <text:p text:style-name="P75">The TtokSpec structure has the following declaration:</text:p>
      <text:p text:style-name="P75"/>
      <text:p text:style-name="P117"><text:span text:style-name="T26">TTokSpec </text:span><text:span text:style-name="T79">=</text:span><text:span text:style-name="T26"> </text:span><text:span text:style-name="T11">record</text:span></text:p>
      <text:p text:style-name="P117"><text:span text:style-name="T38"><text:s text:c="2"/></text:span><text:span text:style-name="T26">txt </text:span><text:span text:style-name="T79">:</text:span><text:span text:style-name="T26"> </text:span><text:span text:style-name="T11">string</text:span><text:span text:style-name="T79">;</text:span><text:span text:style-name="T26"> </text:span><text:span text:style-name="T92">//</text:span><text:span text:style-name="T96">keyword</text:span></text:p>
      <text:p text:style-name="P117"><text:span text:style-name="T38"><text:s text:c="2"/></text:span><text:span text:style-name="T26">TokPos</text:span><text:span text:style-name="T79">:</text:span><text:span text:style-name="T26"> integer</text:span><text:span text:style-name="T79">;</text:span><text:span text:style-name="T26"> </text:span><text:span text:style-name="T92">//</text:span><text:span text:style-name="T96">Token position within the line</text:span></text:p>
      <text:p text:style-name="P117"><text:span text:style-name="T38"><text:s text:c="2"/></text:span><text:span text:style-name="T26">ttok </text:span><text:span text:style-name="T79">:</text:span><text:span text:style-name="T26"> </text:span><text:span text:style-name="T28">integer</text:span><text:span text:style-name="T79">;</text:span><text:span text:style-name="T26"> </text:span><text:span text:style-name="T92">//</text:span><text:span text:style-name="T96">token type</text:span></text:p>
      <text:p text:style-name="P117"><text:span text:style-name="T38"><text:s text:c="2"/></text:span><text:span text:style-name="T26">typDel</text:span><text:span text:style-name="T79">:</text:span><text:span text:style-name="T26"> TFaTypeDel</text:span><text:span text:style-name="T79">;</text:span><text:span text:style-name="T26"> </text:span><text:span text:style-name="T96">{Indicates whether the current special token is,</text:span></text:p>
      <text:p text:style-name="P117"><text:span text:style-name="T100"><text:s text:c="24"/></text:span><text:span text:style-name="T96">the starting delimiter of a delimited token}</text:span></text:p>
      <text:p text:style-name="P117"><text:span text:style-name="T38"><text:s text:c="2"/></text:span><text:span text:style-name="T26">dEnd </text:span><text:span text:style-name="T79">:</text:span><text:span text:style-name="T26"> </text:span><text:span text:style-name="T11">string</text:span><text:span text:style-name="T79">;</text:span><text:span text:style-name="T26"> </text:span><text:span text:style-name="T92">//</text:span><text:span text:style-name="T96">end delimiter </text:span><text:span text:style-name="T92">(</text:span><text:span text:style-name="T96">if it delimiter</text:span><text:span text:style-name="T92">)</text:span></text:p>
      <text:p text:style-name="P117"><text:span text:style-name="T38"><text:s text:c="2"/>pR</text:span><text:span text:style-name="T26">ange</text:span><text:span text:style-name="T79">:</text:span><text:span text:style-name="T26"> TFaProcRange</text:span><text:span text:style-name="T79">;</text:span><text:span text:style-name="T26"> </text:span><text:span text:style-name="T92">//</text:span><text:span text:style-name="T96">procedure to process the token or range</text:span><text:span text:style-name="T92">(</text:span><text:span text:style-name="T96">if multiline</text:span><text:span text:style-name="T92">)</text:span></text:p>
      <text:p text:style-name="P117"><text:span text:style-name="T38"><text:s text:c="2"/></text:span><text:span text:style-name="T26">folTok</text:span><text:span text:style-name="T79">:</text:span><text:span text:style-name="T26"> boolean</text:span><text:span text:style-name="T79">;</text:span><text:span text:style-name="T26"> </text:span><text:span text:style-name="T92">//</text:span><text:span text:style-name="T96">indicates whether the token delimited, has folded</text:span></text:p>
      <text:p text:style-name="P117"><text:span text:style-name="T38"><text:s text:c="2"/></text:span><text:span text:style-name="T92">//</text:span><text:span text:style-name="T96">handling properties and bending code block</text:span></text:p>
      <text:p text:style-name="P117"><text:span text:style-name="T38"><text:s text:c="2"/></text:span><text:span text:style-name="T26">openBlk </text:span><text:span text:style-name="T79">:</text:span><text:span text:style-name="T26"> boolean</text:span><text:span text:style-name="T79">;</text:span><text:span text:style-name="T26"> </text:span><text:span text:style-name="T92">//</text:span><text:span text:style-name="T96">indicates whether the token is starting of folding</text:span></text:p>
      <text:p text:style-name="P117"><text:span text:style-name="T38"><text:s text:c="2"/></text:span><text:span text:style-name="T26">BlksToOpen</text:span><text:span text:style-name="T79">:</text:span><text:span text:style-name="T26"> </text:span><text:span text:style-name="T11">array of </text:span><text:span text:style-name="T26">TFaSynBlock</text:span><text:span text:style-name="T79">;</text:span><text:span text:style-name="T26"> </text:span><text:span text:style-name="T92">//</text:span><text:span text:style-name="T96">list of references to blocks that opens</text:span></text:p>
      <text:p text:style-name="P117"><text:span text:style-name="T38"><text:s text:c="2"/></text:span><text:span text:style-name="T26">closeBlk </text:span><text:span text:style-name="T79">:</text:span><text:span text:style-name="T26"> boolean</text:span><text:span text:style-name="T79">;</text:span><text:span text:style-name="T26"> </text:span><text:span text:style-name="T92">//</text:span><text:span text:style-name="T96">indicates whether the token is to block folding</text:span></text:p>
      <text:p text:style-name="P117"><text:span text:style-name="T38"><text:s text:c="2"/></text:span><text:span text:style-name="T26">BlksToClose</text:span><text:span text:style-name="T79">:</text:span><text:span text:style-name="T26"> </text:span><text:span text:style-name="T11">array of </text:span><text:span text:style-name="T26">TFaSynBlock</text:span><text:span text:style-name="T79">;</text:span><text:span text:style-name="T26"> </text:span><text:span text:style-name="T92">//</text:span><text:span text:style-name="T96">list of references to blocks that closes</text:span></text:p>
      <text:p text:style-name="P117"><text:span text:style-name="T38"><text:s text:c="2"/></text:span><text:span text:style-name="T26">OpenSec </text:span><text:span text:style-name="T79">:</text:span><text:span text:style-name="T26"> boolean</text:span><text:span text:style-name="T79">;</text:span><text:span text:style-name="T26"> </text:span><text:span text:style-name="T92">//</text:span><text:span text:style-name="T96">indicates whether the token is starting of section</text:span></text:p>
      <text:p text:style-name="P117"><text:span text:style-name="T38"><text:s text:c="2"/></text:span><text:span text:style-name="T26">SecsToOpen</text:span><text:span text:style-name="T79">:</text:span><text:span text:style-name="T26"> </text:span><text:span text:style-name="T11">array of </text:span><text:span text:style-name="T26">TFaSynBlock</text:span><text:span text:style-name="T79">;</text:span><text:span text:style-name="T26"> </text:span><text:span text:style-name="T92">//</text:span><text:span text:style-name="T96">blocklist which is the beginning of section</text:span></text:p>
      <text:p text:style-name="P117"><text:span text:style-name="T38"><text:s text:c="2"/></text:span><text:span text:style-name="T26">firstSec</text:span><text:span text:style-name="T79">:</text:span><text:span text:style-name="T26"> TFaSynBlock</text:span><text:span text:style-name="T79">;</text:span><text:span text:style-name="T26"> </text:span><text:span text:style-name="T92">//</text:span><text:span text:style-name="T96">section to be open when the block opens</text:span></text:p>
      <text:p text:style-name="P117"><text:span text:style-name="T11">end</text:span><text:span text:style-name="T79">;</text:span></text:p>
      <text:p text:style-name="P196"/>
      <text:p text:style-name="P75"><text:soft-page-break/>The "typDel" field shows whether the identifier or symbol or a delimiter, and if so, what type belongs. Type "TFaTypeDelim" has the following statement:</text:p>
      <text:p text:style-name="P75"/>
      <text:p text:style-name="P117"><text:span text:style-name="T26">TFaTypeDelim </text:span><text:span text:style-name="T79">= (</text:span></text:p>
      <text:p text:style-name="P117"><text:span text:style-name="T80"><text:s text:c="11"/></text:span><text:span text:style-name="T26">tdNull, </text:span><text:span text:style-name="T92">//</text:span><text:span text:style-name="T96">not defined</text:span></text:p>
      <text:p text:style-name="P117"><text:span text:style-name="T38"><text:s text:c="11"/></text:span><text:span text:style-name="T26">tdUniLin, </text:span><text:span text:style-name="T92">//</text:span><text:span text:style-name="T96">starting delimiter is delimited token of a line</text:span></text:p>
      <text:p text:style-name="P117"><text:span text:style-name="T38"><text:s text:c="11"/></text:span><text:span text:style-name="T26">tdMulLin, </text:span><text:span text:style-name="T92">//</text:span><text:span text:style-name="T96">Initial delimiter token is defined multi</text:span></text:p>
      <text:p text:style-name="P117"><text:span text:style-name="T38"><text:s text:c="11"/></text:span><text:span text:style-name="T26">tdConten1, </text:span><text:span text:style-name="T92">//</text:span><text:span text:style-name="T96">is starting delimiter token of Contents 1</text:span></text:p>
      <text:p text:style-name="P117"><text:span text:style-name="T38"><text:s text:c="11"/></text:span><text:span text:style-name="T26">tdConten2, </text:span><text:span text:style-name="T92">//</text:span><text:span text:style-name="T96">is starting delimiter token of Contents 2</text:span></text:p>
      <text:p text:style-name="P117"><text:span text:style-name="T38"><text:s text:c="11"/></text:span><text:span text:style-name="T26">tdConten3, </text:span><text:span text:style-name="T92">//</text:span><text:span text:style-name="T96">is starting delimiter token of Contents 3</text:span></text:p>
      <text:p text:style-name="P117"><text:span text:style-name="T38"><text:s text:c="11"/></text:span><text:span text:style-name="T26">tdConten4</text:span><text:span text:style-name="T79">);</text:span><text:span text:style-name="T26"> </text:span><text:span text:style-name="T92">//</text:span><text:span text:style-name="T96">is starting delimiter token of Contents 4</text:span></text:p>
      <text:p text:style-name="P75"/>
      <text:p text:style-name="P75">A token is considered as a text with a single attribute. As a token can occupy one or more lines are considered separate types to speed up processing.</text:p>
      <text:p text:style-name="P75"/>
      <text:p text:style-name="P75">This definition is oriented processing delimited tokens. But tokens also applies for content. There is a label for each token of content available.</text:p>
      <text:p text:style-name="P75"/>
      <text:p text:style-name="P75">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5"/>
      <text:p text:style-name="P75">(*) When the token spans multiple lines, is composed of several tokens, because the tokens processing is done line by line.</text:p>
      <text:p text:style-name="P75"/>
      <text:list xml:id="list230306263585812" text:continue-list="list230306477632571" text:style-name="WW8Num24">
        <text:list-item>
          <text:list>
            <text:list-item>
              <text:list>
                <text:list-item>
                  <text:h text:style-name="P252" text:outline-level="2"><text:bookmark-start text:name="__RefHeading__24389_277317671"/>Detection of Special Identifiers<text:bookmark-end text:name="__RefHeading__24389_277317671"/></text:h>
                </text:list-item>
              </text:list>
            </text:list-item>
          </text:list>
        </text:list-item>
      </text:list>
      <text:p text:style-name="P88"/>
      <text:p text:style-name="P83"><text:bookmark text:name="result_box3"/>When special identifiers are created, the entries in the methods table are modified, in order to point to the method corresponding to the initial letter of the identifier.</text:p>
      <text:p text:style-name="P95"><text:span text:style-name="T7"><text:line-break/><text:tab/>Suppose we add the special identifier 'PASCAL' in our methods table:</text:span><text:span text:style-name="T1"> </text:span></text:p>
      <text:p text:style-name="P88"/>
      <text:p text:style-name="P62"><text:soft-page-break/></text:p>
      <text:p text:style-name="P146"><text:span text:style-name="T24">  </text:span><text:span text:style-name="T56">hlt.AddIdentSpec</text:span><text:span text:style-name="T83">(</text:span><text:span text:style-name="T118">'PASCAL'</text:span><text:span text:style-name="T56">, hlt.t</text:span><text:span text:style-name="T71">n</text:span><text:span text:style-name="T56">Keyword</text:span><text:span text:style-name="T83">);</text:span></text:p>
      <text:p text:style-name="P62"/>
      <text:p text:style-name="P49"><text:tab/>By adding special identifiers, some entries of the table, that previously pointed to metIdent(), are updated:</text:p>
      <text:p text:style-name="P49"/>
      <text:p text:style-name="P49"/>
      <text:p text:style-name="P49"><draw:frame draw:style-name="fr25" draw:name="Objeto1" text:anchor-type="paragraph" svg:width="10.308cm" svg:height="9.232cm" draw:z-index="35"><draw:object-ole xlink:href="./Object 31" xlink:type="simple" xlink:show="embed" xlink:actuate="onLoad"/><draw:image xlink:href="./ObjectReplacements/Object 31" xlink:type="simple" xlink:show="embed" xlink:actuate="onLoad"/></draw:frame></text:p>
      <text:p text:style-name="P6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
      <text:p text:style-name="P34"><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62"/>
      <text:p text:style-name="P146"><text:span text:style-name="T24"><text:s/></text:span><text:span text:style-name="T110">//</text:span><text:span text:style-name="T109">methods for specials identifiers</text:span></text:p>
      <text:p text:style-name="P146"><text:span text:style-name="T24"><text:s text:c="2"/></text:span><text:span text:style-name="T16">procedure </text:span><text:span text:style-name="T56">metA</text:span><text:span text:style-name="T83">;</text:span></text:p>
      <text:p text:style-name="P146"><text:span text:style-name="T24"><text:s text:c="2"/></text:span><text:span text:style-name="T16">procedure </text:span><text:span text:style-name="T56">metB</text:span><text:span text:style-name="T83">;</text:span></text:p>
      <text:p text:style-name="P138"><text:s text:c="2"/><text:span text:style-name="T139">...</text:span></text:p>
      <text:p text:style-name="P146"><text:span text:style-name="T24"><text:s text:c="2"/></text:span><text:span text:style-name="T16">procedure </text:span><text:span text:style-name="T56">metY</text:span><text:span text:style-name="T83">;</text:span></text:p>
      <text:p text:style-name="P146"><text:span text:style-name="T24"><text:s text:c="2"/></text:span><text:span text:style-name="T16">procedure </text:span><text:span text:style-name="T56">metZ</text:span><text:span text:style-name="T83">;</text:span></text:p>
      <text:p text:style-name="P146"><text:span text:style-name="T24"><text:s text:c="2"/></text:span><text:span text:style-name="T16">procedure </text:span><text:span text:style-name="T56">metA_</text:span><text:span text:style-name="T83">;</text:span></text:p>
      <text:p text:style-name="P146"><text:span text:style-name="T24"><text:s text:c="2"/></text:span><text:span text:style-name="T16">procedure </text:span><text:span text:style-name="T56">metB_</text:span><text:span text:style-name="T83">;</text:span></text:p>
      <text:p text:style-name="P138"><text:s text:c="2"/><text:span text:style-name="T139">...</text:span></text:p>
      <text:p text:style-name="P146"><text:soft-page-break/><text:span text:style-name="T24"><text:s text:c="2"/></text:span><text:span text:style-name="T16">procedure </text:span><text:span text:style-name="T56">metY_</text:span><text:span text:style-name="T83">;<text:tab/></text:span></text:p>
      <text:p text:style-name="P146"><text:span text:style-name="T57"><text:s/></text:span><text:span text:style-name="T16">procedure </text:span><text:span text:style-name="T56">metZ_</text:span><text:span text:style-name="T83">;</text:span></text:p>
      <text:p text:style-name="P146"><text:span text:style-name="T57"><text:s/></text:span><text:span text:style-name="T16">procedure </text:span><text:span text:style-name="T56">metUnd</text:span><text:span text:style-name="T83">;</text:span></text:p>
      <text:p text:style-name="P146"><text:span text:style-name="T57"><text:s/></text:span><text:span text:style-name="T16">procedure </text:span><text:span text:style-name="T56">metDol</text:span><text:span text:style-name="T83">;</text:span></text:p>
      <text:p text:style-name="P146"><text:span text:style-name="T57"><text:s/></text:span><text:span text:style-name="T16">procedure </text:span><text:span text:style-name="T56">metArr</text:span><text:span text:style-name="T83">;</text:span></text:p>
      <text:p text:style-name="P146"><text:span text:style-name="T57"><text:s/></text:span><text:span text:style-name="T16">procedure </text:span><text:span text:style-name="T56">metPer</text:span><text:span text:style-name="T83">;</text:span></text:p>
      <text:p text:style-name="P146"><text:span text:style-name="T57"><text:s/></text:span><text:span text:style-name="T16">procedure </text:span><text:span text:style-name="T56">metAmp</text:span><text:span text:style-name="T83">;</text:span></text:p>
      <text:p text:style-name="P146"><text:span text:style-name="T57"><text:s/></text:span><text:span text:style-name="T16">procedure </text:span><text:span text:style-name="T56">metC3</text:span><text:span text:style-name="T83">;</text:span><text:span text:style-name="T56">.</text:span></text:p>
      <text:p text:style-name="P62"/>
      <text:p text:style-name="P49"><text:tab/>There are as many methods of this type as valid starting characters that exist for identifiers. All of them have the form: </text:p>
      <text:p text:style-name="P62"/>
      <text:p text:style-name="P146"><text:span text:style-name="T16">procedure </text:span><text:span text:style-name="T56">TSynFacilSyn.metP</text:span><text:span text:style-name="T83">;</text:span></text:p>
      <text:p text:style-name="P137">begin </text:p>
      <text:p text:style-name="P146"><text:span text:style-name="T24">  </text:span><text:span text:style-name="T56">metIdentEsp</text:span><text:span text:style-name="T83">(</text:span><text:span text:style-name="T56">mP</text:span><text:span text:style-name="T83">);</text:span></text:p>
      <text:p text:style-name="P146"><text:span text:style-name="T16">end</text:span><text:span text:style-name="T83">;</text:span></text:p>
      <text:p text:style-name="P62"/>
      <text:p text:style-name="P49"><text:tab/>The method metIdentEsp() is similar to metIdent(), but makes a further comparison of the extracted identifier, to see if in exists in the corresponding table of special identifiers.</text:p>
      <text:p text:style-name="P49"/>
      <text:p text:style-name="P49"><text:tab/>For each method, there is a table where the search is performed:</text:p>
      <text:p text:style-name="P62"/>
      <text:p text:style-name="P146"><text:span text:style-name="T110">//</text:span><text:span text:style-name="T109">tables for special identifiers</text:span></text:p>
      <text:p text:style-name="P146"><text:span text:style-name="T56">mA, mB, mC, mD, mE, mF, mG, mH, mI, mJ, mK, mL, mM, </text:span><text:span text:style-name="T110">//for upper case</text:span></text:p>
      <text:p text:style-name="P139">mN, mO, mP, mQ, mR, mS, mT, mU, mV, mW, mX, mY, mZ,</text:p>
      <text:p text:style-name="P146"><text:span text:style-name="T56">mA_,mB_,mC_,mD_,mE_,mF_,mG_,mH_,mI_,mJ_,mK_,mL_, mM_, </text:span><text:span text:style-name="T110">//for lower case</text:span></text:p>
      <text:p text:style-name="P139">mN_,mO_,mP_,mQ_,mR_,mS_,mT_,mU_,mV_,mW_,mX_,mY_, mZ_,</text:p>
      <text:p text:style-name="P146"><text:span text:style-name="T56">m_, mDol, mArr, mPer, mAmp, mC3 </text:span><text:span text:style-name="T83">:</text:span><text:span text:style-name="T24"> </text:span><text:span text:style-name="T56">TArrayTokEspec</text:span><text:span text:style-name="T83">;</text:span></text:p>
      <text:p text:style-name="P62"> </text:p>
      <text:list xml:id="list230306951887013" text:continue-numbering="true" text:style-name="WW8Num24">
        <text:list-item>
          <text:list>
            <text:list-item>
              <text:list>
                <text:list-item>
                  <text:h text:style-name="P258" text:outline-level="3">Detection of Special Symbols</text:h>
                </text:list-item>
              </text:list>
            </text:list-item>
          </text:list>
        </text:list-item>
      </text:list>
      <text:p text:style-name="P62"/>
      <text:p text:style-name="P34"><text:bookmark text:name="result_box5"/><text:span text:style-name="T7"><text:tab/>The case of the special symbols is similar, except that there is only one table to store:</text:span><text:span text:style-name="T1"> </text:span></text:p>
      <text:p text:style-name="P62"/>
      <text:p text:style-name="P146"><text:span text:style-name="T24"><text:s text:c="4"/></text:span><text:span text:style-name="T56">mSym </text:span><text:span text:style-name="T83">:</text:span><text:span text:style-name="T24"> </text:span><text:span text:style-name="T56">TarrayTokEspec</text:span><text:span text:style-name="T83">; <text:s/></text:span></text:p>
      <text:p text:style-name="P62"/>
      <text:p text:style-name="P49"><text:tab/>Actually, there is an extra temporal table:</text:p>
      <text:p text:style-name="P62"/>
      <text:p text:style-name="P146"><text:span text:style-name="T56"><text:s text:c="2"/>mSym0 </text:span><text:span text:style-name="T83">:</text:span><text:span text:style-name="T24"> </text:span><text:span text:style-name="T56">TarrayTokEspec</text:span><text:span text:style-name="T83">; </text:span></text:p>
      <text:p text:style-name="P62"/>
      <text:p text:style-name="P49"><text:tab/>That is used as a intermediate storage space, before to be transferred to mSyn[].</text:p>
      <text:p text:style-name="P62"/>
      <text:p text:style-name="P34"><text:bookmark text:name="result_box6"/><text:soft-page-break/><text:span text:style-name="T7"><text:tab/>By creating special symbols, the methods table also changes, but the process is different. Suppose we create a special symbol "+":</text:span><text:span text:style-name="T1"> </text:span></text:p>
      <text:p text:style-name="P62"/>
      <text:p text:style-name="P146"><text:span text:style-name="T56"><text:s text:c="2"/>hlt.AddSymbSpec</text:span><text:span text:style-name="T83">(</text:span><text:span text:style-name="T118">'</text:span><text:span text:style-name="T119">+</text:span><text:span text:style-name="T118">'</text:span><text:span text:style-name="T56">, t</text:span><text:span text:style-name="T72">n</text:span><text:span text:style-name="T56">Operator</text:span><text:span text:style-name="T83">);</text:span></text:p>
      <text:p text:style-name="P62"/>
      <text:p text:style-name="P34"><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9"/>
      <text:p text:style-name="P62"/>
      <text:p text:style-name="P62"><draw:frame draw:style-name="fr26" draw:name="Objeto2" text:anchor-type="paragraph" svg:width="10.255cm" svg:height="5.66cm" draw:z-index="36"><draw:object-ole xlink:href="./Object 32" xlink:type="simple" xlink:show="embed" xlink:actuate="onLoad"/><draw:image xlink:href="./ObjectReplacements/Object 32"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3"><text:bookmark text:name="result_box8"/><text:span text:style-name="T136"><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52"/>
      <text:p text:style-name="P75"/>
      <text:p text:style-name="P107"/>
      <text:list xml:id="list230306897763408" text:continue-numbering="true" text:style-name="WW8Num24">
        <text:list-item>
          <text:list>
            <text:list-item>
              <text:h text:style-name="P247" text:outline-level="2"><text:bookmark-start text:name="__RefHeading___Toc404419529"/>Definition of Other Token Types <text:bookmark-end text:name="__RefHeading___Toc404419529"/></text:h>
            </text:list-item>
          </text:list>
        </text:list-item>
      </text:list>
      <text:p text:style-name="P75"/>
      <text:p text:style-name="P75">Besides identifiers (which are a special case of token), token types that exist are: </text:p>
      <text:p text:style-name="P75"/>
      <text:list xml:id="list4010312793895776224" text:style-name="WW8Num9">
        <text:list-item>
          <text:p text:style-name="P231">Tokens by Contents</text:p>
        </text:list-item>
        <text:list-item>
          <text:p text:style-name="P231">Delimited Tokens.</text:p>
        </text:list-item>
      </text:list>
      <text:p text:style-name="P75"/>
      <text:p text:style-name="P74"><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128"><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5"/>
      <text:p text:style-name="P94"><draw:frame draw:style-name="fr27" draw:name="Object21" text:anchor-type="as-char" svg:width="11.543cm" svg:height="5.669cm" draw:z-index="34"><draw:object-ole xlink:href="./Object 21" xlink:type="simple" xlink:show="embed" xlink:actuate="onLoad"/><draw:image xlink:href="./ObjectReplacements/Object 21" xlink:type="simple" xlink:show="embed" xlink:actuate="onLoad"/></draw:frame></text:p>
      <text:p text:style-name="P78"/>
      <text:p text:style-name="P74"><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128"><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5"/>
      <text:p text:style-name="P75">Delimited tokens have no pre-defined spaces for storage, you can create many of them, provided there is available characters in Table Methods. </text:p>
      <text:p text:style-name="P75"/>
      <text:p text:style-name="P75">When identifiers are defined, the special area reserved for identifiers are used, and begins to consider these new types of tokens. </text:p>
      <text:p text:style-name="P18"/>
      <text:p text:style-name="P94"><text:soft-page-break/><draw:frame draw:style-name="fr27" draw:name="Object22" text:anchor-type="as-char" svg:width="11.543cm" svg:height="5.669cm" draw:z-index="37"><draw:object-ole xlink:href="./Object 22" xlink:type="simple" xlink:show="embed" xlink:actuate="onLoad"/><draw:image xlink:href="./ObjectReplacements/Object 22" xlink:type="simple" xlink:show="embed" xlink:actuate="onLoad"/></draw:frame></text:p>
      <text:p text:style-name="P75"/>
      <text:p text:style-name="P75">The unused tokens by contents will be empty sets, were not used or processed.</text:p>
      <text:p text:style-name="P75"/>
      <text:p text:style-name="P75">When additional tokens by content are defined, such as numbers, will begin to use any of the additional spaces:</text:p>
      <text:p text:style-name="P75"/>
      <text:p text:style-name="P117"><text:span text:style-name="T38"><text:s text:c="2"/></text:span><text:span text:style-name="T26">hlt1.</text:span> <text:span text:style-name="T26">DefTokContent</text:span><text:span text:style-name="T79">(</text:span><text:span text:style-name="T114">'[0-9]'</text:span><text:span text:style-name="T26">,</text:span><text:span text:style-name="T114">'[0-9]*' </text:span><text:span text:style-name="T26">t</text:span><text:span text:style-name="T34">n</text:span><text:span text:style-name="T26">Number</text:span><text:span text:style-name="T79">);</text:span></text:p>
      <text:p text:style-name="P123"/>
      <text:p text:style-name="P91"/>
      <text:p text:style-name="P91"><draw:frame draw:style-name="fr27" draw:name="Object23" text:anchor-type="as-char" svg:width="11.543cm" svg:height="5.669cm" draw:z-index="38"><draw:object-ole xlink:href="./Object 23" xlink:type="simple" xlink:show="embed" xlink:actuate="onLoad"/><draw:image xlink:href="./ObjectReplacements/Object 23" xlink:type="simple" xlink:show="embed" xlink:actuate="onLoad"/></draw:frame></text:p>
      <text:p text:style-name="P75"/>
      <text:p text:style-name="P75">We can also add delimited tokens definitions:</text:p>
      <text:p text:style-name="P75"/>
      <text:p text:style-name="P117"><text:span text:style-name="T38"><text:s text:c="2"/></text:span><text:span text:style-name="T26">hlt.AddTokenString</text:span><text:span text:style-name="T79">(</text:span><text:span text:style-name="T114">''</text:span><text:span text:style-name="T26">,</text:span><text:span text:style-name="T114">''</text:span><text:span text:style-name="T26">,</text:span><text:span text:style-name="T11"> </text:span><text:span text:style-name="T12">hl.tnString</text:span><text:span text:style-name="T79">);</text:span></text:p>
      <text:p text:style-name="P120"><text:span text:style-name="T38"><text:s text:c="2"/></text:span><text:span text:style-name="T26">hlt.AddTokenString</text:span><text:span text:style-name="T79">(</text:span><text:span text:style-name="T114">'"'</text:span><text:span text:style-name="T26">,</text:span><text:span text:style-name="T114">'"'</text:span><text:span text:style-name="T26">,</text:span><text:span text:style-name="T11"> </text:span><text:span text:style-name="T12">hl.tnString</text:span><text:span text:style-name="T79">);</text:span></text:p>
      <text:p text:style-name="P117"><text:span text:style-name="T38"><text:s text:c="2"/></text:span><text:span text:style-name="T26">hlt.Rebuild</text:span><text:span text:style-name="T79">;</text:span></text:p>
      <text:p text:style-name="P75"/>
      <text:p text:style-name="P75">Now the diagram might look like this:</text:p>
      <text:p text:style-name="P75"/>
      <text:p text:style-name="P94"><text:soft-page-break/><draw:frame draw:style-name="fr28" draw:name="Object24" text:anchor-type="as-char" svg:width="11.442cm" svg:height="6.158cm" draw:z-index="87"><draw:object-ole xlink:href="./Object 24" xlink:type="simple" xlink:show="embed" xlink:actuate="onLoad"/><draw:image xlink:href="./ObjectReplacements/Object 24" xlink:type="simple" xlink:show="embed" xlink:actuate="onLoad"/></draw:frame></text:p>
      <text:p text:style-name="P75"/>
      <text:p text:style-name="P75">If we also define some special identifiers, then subsets of identifiers are created with different attributes (unique identifiers).</text:p>
      <text:p text:style-name="P75"/>
      <text:p text:style-name="P94"><draw:frame draw:style-name="fr28" draw:name="Object25" text:anchor-type="as-char" svg:width="11.442cm" svg:height="6.158cm" draw:z-index="88"><draw:object-ole xlink:href="./Object 25" xlink:type="simple" xlink:show="embed" xlink:actuate="onLoad"/><draw:image xlink:href="./ObjectReplacements/Object 25" xlink:type="simple" xlink:show="embed" xlink:actuate="onLoad"/></draw:frame></text:p>
      <text:p text:style-name="P75"/>
      <text:p text:style-name="P75">Only the identifiers block, supports subsets with different attribute. The other blocks of content or delimited not let you manage subsets.</text:p>
      <text:p text:style-name="P75"/>
      <text:p text:style-name="P75">But we can create subsets of symbols:</text:p>
      <text:p text:style-name="P75"/>
      <text:p text:style-name="P117"><text:span text:style-name="T38"><text:s text:c="2"/></text:span><text:span text:style-name="T26">hlt.AddSymbSpec</text:span><text:span text:style-name="T79">(</text:span><text:span text:style-name="T114">'</text:span><text:span text:style-name="T115">+</text:span><text:span text:style-name="T114">'</text:span><text:span text:style-name="T26">, </text:span><text:span text:style-name="T34">tn</text:span><text:span text:style-name="T26">Extra1</text:span><text:span text:style-name="T79">);</text:span></text:p>
      <text:p text:style-name="P117"><text:span text:style-name="T38"><text:s text:c="2"/></text:span><text:span text:style-name="T26">hlt.AddSymbSpec</text:span><text:span text:style-name="T79">(</text:span><text:span text:style-name="T114">'-'</text:span><text:span text:style-name="T26">, </text:span><text:span text:style-name="T34">tn</text:span><text:span text:style-name="T26">Extra1</text:span><text:span text:style-name="T79">);</text:span></text:p>
      <text:p text:style-name="P75"/>
      <text:p text:style-name="P94"><text:soft-page-break/><draw:frame draw:style-name="fr29" draw:name="Object26" text:anchor-type="as-char" svg:width="11.442cm" svg:height="6.895cm" draw:z-index="89"><draw:object-ole xlink:href="./Object 26" xlink:type="simple" xlink:show="embed" xlink:actuate="onLoad"/><draw:image xlink:href="./ObjectReplacements/Object 26" xlink:type="simple" xlink:show="embed" xlink:actuate="onLoad"/></draw:frame></text:p>
      <text:p text:style-name="P75"/>
      <text:p text:style-name="P75">As we go adding more items to the syntax, we will be completing the diagram. A more complete syntax might look like the one shown:</text:p>
      <text:p text:style-name="P75"/>
      <text:p text:style-name="P75"/>
      <text:p text:style-name="P94"><draw:frame draw:style-name="fr30" draw:name="Object27" text:anchor-type="as-char" svg:width="11.442cm" svg:height="7.833cm" draw:z-index="90"><draw:object-ole xlink:href="./Object 27" xlink:type="simple" xlink:show="embed" xlink:actuate="onLoad"/><draw:image xlink:href="./ObjectReplacements/Object 27" xlink:type="simple" xlink:show="embed" xlink:actuate="onLoad"/></draw:frame></text:p>
      <text:p text:style-name="P78"/>
      <text:p text:style-name="P75">In this diagram, the green area corresponds to the delimiters, which as we <text:s/>can see, can be identifiers or special symbols. The symbols are "surplus" elements in syntax, but we can make them to be token delimiters.</text:p>
      <text:p text:style-name="P75"/>
      <text:p text:style-name="P75">All delimiters must be special symbols or special identifiers. An unusual case is to use a special identifier as comment delimiter, but this case exist in the language of DOS, where the keyword REM specifies a comment.</text:p>
      <text:p text:style-name="P75"><text:soft-page-break/>When a symbol or special identifier, becomes delimiter token loses its nature and become part of a larger token.</text:p>
      <text:p text:style-name="P75"/>
      <text:list xml:id="list230306653037227" text:continue-list="list230306897763408" text:style-name="WW8Num24">
        <text:list-item>
          <text:list>
            <text:list-item>
              <text:list>
                <text:list-item>
                  <text:h text:style-name="P263" text:outline-level="3">Detection of <text:s/>Tokens by Content</text:h>
                </text:list-item>
              </text:list>
            </text:list-item>
          </text:list>
        </text:list-item>
      </text:list>
      <text:p text:style-name="P62"/>
      <text:p text:style-name="P49"><text:tab/>Tokens by Content are created using the method DefTokContent():</text:p>
      <text:p text:style-name="P62"/>
      <text:p text:style-name="P146"><text:span text:style-name="T24"><text:s text:c="2"/></text:span><text:span text:style-name="T56">hlt.DefTokContent</text:span><text:span text:style-name="T83">(</text:span><text:span text:style-name="T118">'[0123456789]'</text:span><text:span text:style-name="T56">, </text:span><text:span text:style-name="T118">'[0123456789]*'</text:span><text:span text:style-name="T56">, hlt.t</text:span><text:span text:style-name="T73">n</text:span><text:span text:style-name="T56">Number</text:span><text:span text:style-name="T83">);</text:span></text:p>
      <text:p text:style-name="P62"/>
      <text:p text:style-name="P49"><text:tab/>And when a token by content <text:s/>is defined, a new element TTokSpec, is created in the table mSym0[].</text:p>
      <text:p text:style-name="P62"/>
      <text:p text:style-name="P75"><text:bookmark text:name="result_box9"/>The method table is not directly modified, until Rebulid() is called, who will see if it generates a quick entry into the method table, or call the general routine metSimbEsp(), which is slower process.</text:p>
      <text:p text:style-name="P75"><text:line-break/><text:tab/>The fast routines that can be introduced into the method table are: </text:p>
      <text:p text:style-name="P75"/>
      <text:p text:style-name="P49">metTokCont1();</text:p>
      <text:p text:style-name="P49">metTokCont2();</text:p>
      <text:p text:style-name="P49">metTokCont3();</text:p>
      <text:p text:style-name="P49">metTokCont4();</text:p>
      <text:p text:style-name="P62"/>
      <text:p text:style-name="P49"><text:tab/>These fast routines are introduced in the methods table <text:s/>when it's possible to determine, only using the first character, that we have a token by content. </text:p>
      <text:p text:style-name="P62"/>
      <text:p text:style-name="P49"><text:tab/>Let's consider this definition:</text:p>
      <text:p text:style-name="P62"/>
      <text:p text:style-name="P146"><text:span text:style-name="T56"><text:s text:c="2"/>hlt.DefTokContent</text:span><text:span text:style-name="T83">(</text:span><text:span text:style-name="T118">'[0-9]'</text:span><text:span text:style-name="T56">, </text:span><text:span text:style-name="T118">'[0-9]*'</text:span><text:span text:style-name="T56">, </text:span><text:span text:style-name="T118">''</text:span><text:span text:style-name="T56">, hlt.t</text:span><text:span text:style-name="T73">n</text:span><text:span text:style-name="T56">Number</text:span><text:span text:style-name="T83">);</text:span></text:p>
      <text:p text:style-name="P62"/>
      <text:p text:style-name="P49"><text:tab/>If there are no simplification, the methods table would have the next form:</text:p>
      <text:p text:style-name="P62"/>
      <text:p text:style-name="P62"/>
      <text:p text:style-name="P62"/>
      <text:p text:style-name="P62"/>
      <text:p text:style-name="P62"/>
      <text:p text:style-name="P62"/>
      <text:p text:style-name="P62"/>
      <text:p text:style-name="P61"/>
      <text:p text:style-name="P61"/>
      <text:p text:style-name="P61"><text:soft-page-break/> </text:p>
      <text:p text:style-name="P61"><draw:frame draw:style-name="fr31" draw:name="Objeto3" text:anchor-type="paragraph" svg:x="3.503cm" svg:y="0.169cm" svg:width="10.548cm" svg:height="6.62cm" draw:z-index="39"><draw:object-ole xlink:href="./Object 33" xlink:type="simple" xlink:show="embed" xlink:actuate="onLoad"/><draw:image xlink:href="./ObjectReplacements/Object 33"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text:bookmark text:name="result_box10"/><text:span text:style-name="T136"><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62"><draw:frame draw:style-name="fr32" draw:name="Objeto4" text:anchor-type="paragraph" svg:x="3.59cm" svg:y="0.452cm" svg:width="9.962cm" svg:height="6.761cm" draw:z-index="40"><draw:object-ole xlink:href="./Object 34" xlink:type="simple" xlink:show="embed" xlink:actuate="onLoad"/><draw:image xlink:href="./ObjectReplacements/Object 34" xlink:type="simple" xlink:show="embed" xlink:actuate="onLoad"/></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9"><text:tab/>In this way, it's possible to have a faster processing.</text:p>
      <text:p text:style-name="P62"> </text:p>
      <text:p text:style-name="P8"><text:bookmark text:name="result_box12"/><text:span text:style-name="T136"><text:tab/>I</text:span><text:bookmark text:name="result_box11"/><text:span text:style-name="T136">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definition begins with any of the same numerical characters, exists. Consider that we have these definitions:</text:span> </text:p>
      <text:p text:style-name="P62"/>
      <text:p text:style-name="P146"><text:span text:style-name="T24"><text:s text:c="2"/></text:span><text:span text:style-name="T56">hlt.DefTokContent</text:span><text:span text:style-name="T83">(</text:span><text:span text:style-name="T118">'Ox'</text:span><text:span text:style-name="T56">, </text:span><text:span text:style-name="T118">'[0123456789]*'</text:span><text:span text:style-name="T56">, t</text:span><text:span text:style-name="T73">n</text:span><text:span text:style-name="T56">Hexa</text:span><text:span text:style-name="T83">);</text:span></text:p>
      <text:p text:style-name="P146"><text:span text:style-name="T24"><text:s text:c="2"/></text:span><text:span text:style-name="T56">hlt.DefTokContent</text:span><text:span text:style-name="T83">(</text:span><text:span text:style-name="T118">'[0123456789]'</text:span><text:span text:style-name="T56">, </text:span><text:span text:style-name="T118">'[0123456789]*'</text:span><text:span text:style-name="T56">, hlt.t</text:span><text:span text:style-name="T73">n</text:span><text:span text:style-name="T56">Number</text:span><text:span text:style-name="T83">);</text:span></text:p>
      <text:p text:style-name="P62"/>
      <text:p text:style-name="P8"><text:bookmark text:name="result_box13"/><text:span text:style-name="T136"><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9"/>
      <text:p text:style-name="P62"><draw:frame draw:style-name="fr33" draw:name="Objeto5" text:anchor-type="paragraph" svg:x="3.478cm" svg:y="0.062cm" svg:width="9.88cm" svg:height="6.747cm" draw:z-index="41"><draw:object-ole xlink:href="./Object 35" xlink:type="simple" xlink:show="embed" xlink:actuate="onLoad"/><draw:image xlink:href="./ObjectReplacements/Object 35" xlink:type="simple" xlink:show="embed" xlink:actuate="onLoad"/></draw:frame></text:p>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list xml:id="list230306210201523" text:continue-numbering="true" text:style-name="WW8Num24">
        <text:list-item>
          <text:list>
            <text:list-item>
              <text:list>
                <text:list-item>
                  <text:h text:style-name="P258" text:outline-level="3">Detection of Delimited Tokens</text:h>
                </text:list-item>
              </text:list>
            </text:list-item>
          </text:list>
        </text:list-item>
      </text:list>
      <text:p text:style-name="P62"> </text:p>
      <text:p text:style-name="P49"><text:tab/>Delimited tokens are defined with the method DefTokDelim:</text:p>
      <text:p text:style-name="P62"> </text:p>
      <text:p text:style-name="P146"><text:span text:style-name="T24">  </text:span><text:span text:style-name="T56">hlt.DefTokDelim</text:span><text:span text:style-name="T83">(</text:span><text:span text:style-name="T118">'"'</text:span><text:span text:style-name="T56">,</text:span><text:span text:style-name="T118">'"'</text:span><text:span text:style-name="T56">, hl.t</text:span><text:span text:style-name="T73">n</text:span><text:span text:style-name="T56">String</text:span><text:span text:style-name="T83">);</text:span></text:p>
      <text:p text:style-name="P49"/>
      <text:p text:style-name="P49"><text:tab/>This definition, creates a new element TTokSpec, in the table mSym0[].</text:p>
      <text:p text:style-name="P62"/>
      <text:p text:style-name="P8"><text:bookmark text:name="result_box14"/><text:span text:style-name="T136"><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9"/>
      <text:p text:style-name="P62"> </text:p>
      <text:p text:style-name="P49"><text:tab/>metUniLin1();</text:p>
      <text:p text:style-name="P49"><text:tab/>metFinLinea();</text:p>
      <text:p text:style-name="P62"> </text:p>
      <text:p text:style-name="P8"><text:bookmark text:name="result_box15"/><text:span text:style-name="T136"><text:tab/>Fast routines are introduced in the method table when it is possible to determine, by only using the first character, that we have a delimited token.<text:line-break/><text:line-break/><text:tab/>Consider for example, the following definition:</text:span> </text:p>
      <text:p text:style-name="P49"/>
      <text:p text:style-name="P62"> </text:p>
      <text:p text:style-name="P146"><text:span text:style-name="T24">  </text:span><text:span text:style-name="T56">hlt.DefTokDelim</text:span><text:span text:style-name="T83">(</text:span><text:span text:style-name="T118">'"'</text:span><text:span text:style-name="T56">,</text:span><text:span text:style-name="T118">'"'</text:span><text:span text:style-name="T56">, hl.t</text:span><text:span text:style-name="T74">n</text:span><text:span text:style-name="T56">String</text:span><text:span text:style-name="T83">);</text:span></text:p>
      <text:p text:style-name="P62"> </text:p>
      <text:p text:style-name="P49"><text:tab/>In this case, if <text:s/>there is not simplification performed, we would have this scheme:</text:p>
      <text:p text:style-name="P62"/>
      <text:p text:style-name="P61"><draw:frame draw:style-name="fr34" draw:name="Objeto6" text:anchor-type="paragraph" svg:x="3.986cm" svg:y="0.185cm" svg:width="9.029cm" svg:height="5.399cm" draw:z-index="42"><draw:object-ole xlink:href="./Object 36" xlink:type="simple" xlink:show="embed" xlink:actuate="onLoad"/><draw:image xlink:href="./ObjectReplacements/Object 36" xlink:type="simple" xlink:show="embed" xlink:actuate="onLoad"/></draw:frame></text:p>
      <text:p text:style-name="P61"/>
      <text:p text:style-name="P61"/>
      <text:p text:style-name="P61"/>
      <text:p text:style-name="P61"/>
      <text:p text:style-name="P61"/>
      <text:p text:style-name="P61"><text:soft-page-break/></text:p>
      <text:p text:style-name="P61"/>
      <text:p text:style-name="P61"/>
      <text:p text:style-name="P61"/>
      <text:p text:style-name="P61"/>
      <text:p text:style-name="P34"><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62"/>
      <text:p text:style-name="P62"><draw:frame draw:style-name="fr35" draw:name="Objeto7" text:anchor-type="paragraph" svg:x="4.06cm" svg:y="0.226cm" svg:width="8.999cm" svg:height="5.486cm" draw:z-index="43"><draw:object-ole xlink:href="./Object 37" xlink:type="simple" xlink:show="embed" xlink:actuate="onLoad"/><draw:image xlink:href="./ObjectReplacements/Object 37" xlink:type="simple" xlink:show="embed" xlink:actuate="onLoad"/></draw:frame> </text:p>
      <text:p text:style-name="P62"/>
      <text:p text:style-name="P62"/>
      <text:p text:style-name="P62"/>
      <text:p text:style-name="P62"/>
      <text:p text:style-name="P62"/>
      <text:p text:style-name="P62"/>
      <text:p text:style-name="P62"/>
      <text:p text:style-name="P62"/>
      <text:p text:style-name="P62"/>
      <text:p text:style-name="P62"> </text:p>
      <text:p text:style-name="P8"><text:bookmark text:name="result_box17"/><text:span text:style-name="T136"><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52"/>
      <text:list xml:id="list230305223797258" text:continue-numbering="true" text:style-name="WW8Num24">
        <text:list-item>
          <text:list>
            <text:list-item>
              <text:h text:style-name="P246" text:outline-level="2"><text:bookmark-start text:name="__RefHeading__25320_513627730"/><text:tab/>Driving Ranges<text:bookmark-end text:name="__RefHeading__25320_513627730"/></text:h>
            </text:list-item>
          </text:list>
        </text:list-item>
      </text:list>
      <text:p text:style-name="P15"/>
      <text:p text:style-name="P75">For general information on handling ranges, please read "La Biblia del SynEdit- Rev6 - Section 2.3.10" on the management ranges.</text:p>
      <text:p text:style-name="P196"/>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text:soft-page-break/></text:p>
      <text:p text:style-name="P127">type</text:p>
      <text:p text:style-name="P117"><text:span text:style-name="T38"><text:s text:c="2"/></text:span><text:span text:style-name="T26">TRangeState </text:span><text:span text:style-name="T79">=</text:span><text:span text:style-name="T26"> </text:span><text:span text:style-name="T79">(</text:span><text:span text:style-name="T26">rsUnknown,</text:span></text:p>
      <text:p text:style-name="P117"><text:span text:style-name="T38"><text:s text:c="17"/></text:span><text:span text:style-name="T26">rsComment, <text:s/></text:span><text:span text:style-name="T92">//</text:span><text:span text:style-name="T96">comment</text:span></text:p>
      <text:p text:style-name="P117"><text:span text:style-name="T38"><text:s text:c="17"/></text:span><text:span text:style-name="T26">rsComment2, </text:span><text:span text:style-name="T92">//</text:span><text:span text:style-name="T96">comment</text:span></text:p>
      <text:p text:style-name="P117"><text:span text:style-name="T38"><text:s text:c="17"/></text:span><text:span text:style-name="T26">rsString</text:span><text:span text:style-name="T79">);</text:span><text:span text:style-name="T26"> <text:s/></text:span><text:span text:style-name="T92">//string</text:span><text:span text:style-name="T96">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17"><text:span text:style-name="T38"><text:s text:c="4"/>fR</text:span><text:span text:style-name="T26">ange </text:span><text:span text:style-name="T79">:</text:span><text:span text:style-name="T26"> ^ TtokSpec</text:span><text:span text:style-name="T79">;</text:span><text:span text:style-name="T26"> </text:span><text:span text:style-name="T92">//</text:span><text:span text:style-name="T96">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16"><text:span text:style-name="T38"><text:s text:c="2"/></text:span><text:span text:style-name="T26">TtokSpec </text:span><text:span text:style-name="T79">=</text:span><text:span text:style-name="T26"> </text:span><text:span text:style-name="T11">record</text:span></text:p>
      <text:p text:style-name="P116"><text:span text:style-name="T38"><text:s text:c="4"/></text:span><text:span text:style-name="T26">txt <text:s text:c="2"/></text:span><text:span text:style-name="T79">:</text:span><text:span text:style-name="T26"> </text:span><text:span text:style-name="T11">string</text:span><text:span text:style-name="T79">;</text:span><text:span text:style-name="T26"> <text:s text:c="2"/></text:span><text:span text:style-name="T92">//</text:span><text:span text:style-name="T96">keyword</text:span></text:p>
      <text:p text:style-name="P134"><text:span text:style-name="T39"><text:s text:c="4"/></text:span><text:span text:style-name="T40">orig</text:span><text:span text:style-name="T41"> <text:s/></text:span><text:span text:style-name="T81">:</text:span><text:span text:style-name="T41"> </text:span><text:span text:style-name="T14">string</text:span><text:span text:style-name="T81">;</text:span><text:span text:style-name="T41"> <text:s text:c="2"/></text:span><text:span text:style-name="T111">//</text:span><text:span text:style-name="T112">keyword as real indicated</text:span><text:span text:style-name="T92"> </text:span></text:p>
      <text:p text:style-name="P121"><text:span text:style-name="T38"><text:s text:c="4"/></text:span><text:span text:style-name="T26">TokPos</text:span><text:span text:style-name="T79">:</text:span><text:span text:style-name="T26"> integer</text:span><text:span text:style-name="T79">;</text:span><text:span text:style-name="T26"> <text:s/></text:span><text:span text:style-name="T92">//</text:span><text:span text:style-name="T96">Token position within the line</text:span></text:p>
      <text:p text:style-name="P116"><text:span text:style-name="T38"><text:s text:c="4"/></text:span><text:span text:style-name="T26">t</text:span><text:span text:style-name="T35">T</text:span><text:span text:style-name="T26">ok <text:s/></text:span><text:span text:style-name="T79">:</text:span><text:span text:style-name="T26"> </text:span><text:span text:style-name="T35">integer</text:span><text:span text:style-name="T79">;</text:span><text:span text:style-name="T26"> <text:s/></text:span><text:span text:style-name="T92">//</text:span><text:span text:style-name="T96">token type</text:span></text:p>
      <text:p text:style-name="P116"><text:span text:style-name="T38"><text:s text:c="4"/></text:span><text:span text:style-name="T26">typDel</text:span><text:span text:style-name="T79">:</text:span><text:span text:style-name="T26"> TFaTypeDel</text:span><text:span text:style-name="T79">;</text:span><text:span text:style-name="T26"> </text:span><text:span text:style-name="T96">{Indicates whether the current special token, is</text:span></text:p>
      <text:p text:style-name="P116"><text:span text:style-name="T96"><text:s text:c="22"/>actually,</text:span><text:span text:style-name="T100"> </text:span><text:span text:style-name="T96">the starting delimiter of a delimited token}</text:span></text:p>
      <text:p text:style-name="P116"><text:span text:style-name="T38"><text:s text:c="4"/></text:span><text:span text:style-name="T26">dEnd </text:span><text:span text:style-name="T79">:</text:span><text:span text:style-name="T26"> </text:span><text:span text:style-name="T11">string</text:span><text:span text:style-name="T79">;</text:span><text:span text:style-name="T26"> <text:s text:c="2"/></text:span><text:span text:style-name="T92">//</text:span><text:span text:style-name="T96">end delimiter </text:span><text:span text:style-name="T92">(</text:span><text:span text:style-name="T96">if it delimiter</text:span><text:span text:style-name="T92">)</text:span></text:p>
      <text:p text:style-name="P116"><text:span text:style-name="T38"><text:s text:c="4"/>pR</text:span><text:span text:style-name="T26">ange</text:span><text:span text:style-name="T79">:</text:span><text:span text:style-name="T26"> TFaProcRange</text:span><text:span text:style-name="T79">;</text:span><text:span text:style-name="T26"> </text:span><text:span text:style-name="T92">//</text:span><text:span text:style-name="T96">procedure to process the token or range </text:span><text:span text:style-name="T92">(</text:span><text:span text:style-name="T96">if multiline</text:span><text:span text:style-name="T92">)</text:span></text:p>
      <text:p text:style-name="P116"><text:span text:style-name="T38"><text:s text:c="4"/></text:span><text:span text:style-name="T26">folTok</text:span><text:span text:style-name="T79">:</text:span><text:span text:style-name="T26"> boolean</text:span><text:span text:style-name="T79">;</text:span><text:span text:style-name="T26"> </text:span><text:span text:style-name="T92">//</text:span><text:span text:style-name="T96">indicates whether the token delimited, has folding</text:span></text:p>
      <text:p text:style-name="P122">...</text:p>
      <text:p text:style-name="P116"><text:span text:style-name="T38"><text:s text:c="2"/></text:span><text:span text:style-name="T11">end</text:span><text:span text:style-name="T79">;</text:span></text:p>
      <text:p text:style-name="P15"/>
      <text:p text:style-name="P15"><text:tab/>Thus, when we begin to explore multiline tokens, is assigned to fRrange, the reference to the starting delimiter record:</text:p>
      <text:p text:style-name="P15"/>
      <text:p text:style-name="P117"><text:span text:style-name="T11">procedure </text:span><text:span text:style-name="T26">TSynFacilSyn.ProcTokenDelim</text:span><text:span text:style-name="T79">(</text:span><text:span text:style-name="T11">const </text:span><text:span text:style-name="T26">d</text:span><text:span text:style-name="T79">:</text:span><text:span text:style-name="T26"> TTokSpec</text:span><text:span text:style-name="T79">);</text:span></text:p>
      <text:p text:style-name="P123">...</text:p>
      <text:p text:style-name="P117"><text:span text:style-name="T38"><text:s text:c="6"/>fR</text:span><text:span text:style-name="T26">ange </text:span><text:span text:style-name="T79">: =</text:span><text:span text:style-name="T26"> @d</text:span><text:span text:style-name="T79">;</text:span></text:p>
      <text:p text:style-name="P123">...</text:p>
      <text:p text:style-name="P15"/>
      <text:p text:style-name="P15"><text:tab/>When no range is handled, fRange should be NIL.</text:p>
      <text:p text:style-name="P15"><text:soft-page-break/></text:p>
      <text:p text:style-name="P15"><text:tab/>In the method Next(), a check is made to see if it is in the middle of a range, and if so, the information of the targeted record will be used:</text:p>
      <text:p text:style-name="P15"/>
      <text:p text:style-name="P117"><text:span text:style-name="T11">procedure </text:span><text:span text:style-name="T26">TSynFacilSyn.Next</text:span><text:span text:style-name="T79">;</text:span></text:p>
      <text:p text:style-name="P127">begin</text:p>
      <text:p text:style-name="P123">...</text:p>
      <text:p text:style-name="P117"><text:span text:style-name="T38"><text:s text:c="2"/></text:span><text:span text:style-name="T26">posIni </text:span><text:span text:style-name="T79">:=</text:span><text:span text:style-name="T26"> endpos</text:span><text:span text:style-name="T79">;</text:span><text:span text:style-name="T26"> </text:span><text:span text:style-name="T92">//</text:span><text:span text:style-name="T96">points to the first element</text:span></text:p>
      <text:p text:style-name="P117"><text:span text:style-name="T38"><text:s text:c="2"/></text:span><text:span text:style-name="T11">if </text:span><text:span text:style-name="T26">Frange </text:span><text:span text:style-name="T79">=</text:span><text:span text:style-name="T26"> </text:span><text:span text:style-name="T11">nil then begin</text:span></text:p>
      <text:p text:style-name="P117"><text:span text:style-name="T38"><text:s text:c="6"/></text:span><text:span text:style-name="T26">Charini </text:span><text:span text:style-name="T79">:=</text:span><text:span text:style-name="T26">Fline [endpos]</text:span><text:span text:style-name="T79">;</text:span><text:span text:style-name="T26"> </text:span><text:span text:style-name="T92">//</text:span><text:span text:style-name="T96">store to have it available in the method that will be called.</text:span></text:p>
      <text:p text:style-name="P117"><text:span text:style-name="T38"><text:s text:c="6"/></text:span><text:span text:style-name="T26">fProcTable[Charini]</text:span><text:span text:style-name="T79">;</text:span><text:span text:style-name="T26"> </text:span><text:span text:style-name="T92">//</text:span><text:span text:style-name="T96">The corresponding function is executed.</text:span></text:p>
      <text:p text:style-name="P117"><text:span text:style-name="T38"><text:s text:c="4"/></text:span><text:span text:style-name="T11">end</text:span></text:p>
      <text:p text:style-name="P117"><text:span text:style-name="T38"><text:s text:c="2"/></text:span><text:span text:style-name="T11">else begin</text:span></text:p>
      <text:p text:style-name="P117"><text:span text:style-name="T38"><text:s text:c="4"/></text:span><text:span text:style-name="T11">if </text:span><text:span text:style-name="T26">endpos </text:span><text:span text:style-name="T79">=</text:span><text:span text:style-name="T26"> Tamlin </text:span><text:span text:style-name="T11">then begin </text:span><text:span text:style-name="T92">//</text:span><text:span text:style-name="T96">to accelerate exploration</text:span></text:p>
      <text:p text:style-name="P117"><text:span text:style-name="T38"><text:s text:c="6"/></text:span><text:span text:style-name="T26">fTokenID</text:span><text:span text:style-name="T79">: =</text:span><text:span text:style-name="T26">t</text:span><text:span text:style-name="T35">n</text:span><text:span text:style-name="T26">Eol</text:span><text:span text:style-name="T79">;</text:span><text:span text:style-name="T26"> </text:span><text:span text:style-name="T11">exit</text:span><text:span text:style-name="T79">;</text:span></text:p>
      <text:p text:style-name="P117"><text:span text:style-name="T38"><text:s text:c="4"/></text:span><text:span text:style-name="T11">end</text:span><text:span text:style-name="T79">;</text:span></text:p>
      <text:p text:style-name="P117"><text:span text:style-name="T38"><text:s text:c="4"/></text:span><text:span text:style-name="T26">fTokenID</text:span><text:span text:style-name="T79">: = </text:span><text:span text:style-name="T26">^fRange .tTok</text:span><text:span text:style-name="T79">;</text:span></text:p>
      <text:p text:style-name="P117"><text:span text:style-name="T38"><text:s text:c="4"/></text:span><text:span text:style-name="T26">^fRange.pRange</text:span><text:span text:style-name="T79">;</text:span><text:span text:style-name="T26"> </text:span><text:span text:style-name="T92">//</text:span><text:span text:style-name="T96">run method</text:span></text:p>
      <text:p text:style-name="P117"><text:span text:style-name="T38"><text:s text:c="2"/></text:span><text:span text:style-name="T11">end</text:span><text:span text:style-name="T79">;</text:span></text:p>
      <text:p text:style-name="P117"><text:span text:style-name="T11">end</text:span><text:span text:style-name="T79">;</text:span></text:p>
      <text:p text:style-name="P15"/>
      <text:p text:style-name="P15"><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17"><text:span text:style-name="T11">procedure </text:span><text:span text:style-name="T26">TSynFacilSyn.Rebuild</text:span><text:span text:style-name="T79">;</text:span></text:p>
      <text:p text:style-name="P123">...</text:p>
      <text:p text:style-name="P117"><text:span text:style-name="T38"><text:s text:c="2"/></text:span><text:span text:style-name="T11">Self</text:span><text:span text:style-name="T26">.ScanAllRanges</text:span><text:span text:style-name="T79">;</text:span><text:span text:style-name="T26"> </text:span></text:p>
      <text:p text:style-name="P123">...</text:p>
      <text:p text:style-name="P15"/>
      <text:p text:style-name="P15"/>
      <text:list xml:id="list230305186751541" text:continue-numbering="true" text:style-name="WW8Num24">
        <text:list-item>
          <text:list>
            <text:list-item>
              <text:h text:style-name="P255"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15"/>
      <text:p text:style-name="P159">The blocks are born as a need to implement the code folding facility. However, they were created, thinking on defining syntactic special regions. Ie, highlighter blocks are oriented to represent the real syntactic blocks of the language they use.</text:p>
      <text:p text:style-name="P159"/>
      <text:p text:style-name="P159">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59"/>
      <text:p text:style-name="P159">This way, you can represent many structures of the language itself, using blocks and sections. </text:p>
      <text:p text:style-name="P159"/>
      <text:p text:style-name="P159">The sections with as an additional tool to enhance the ability to create special text regions. They were defined considering the structure of the Pascal language, but are rather general, to apply to different languages.</text:p>
      <text:p text:style-name="P159"/>
      <text:p text:style-name="P159">While the concept of "block" within the highlighter TSynFacilSyn is similar to the concept of "Block" (Block Fold or Fold Block), within SynEdit, it should be noted that there are some differences between these concepts:</text:p>
      <text:p text:style-name="P159"/>
      <text:list xml:id="list3987219283014445815" text:style-name="WW8Num4">
        <text:list-item>
          <text:p text:style-name="P232">The blocks within the TSynFacilSyn, use machinery of SynEdit blocks to implement, but complement the functionality to extend the concept of block.</text:p>
        </text:list-item>
        <text:list-item>
          <text:p text:style-name="P232">The blocks of TSynFacilSyn are defined as special regions of several tokens, which may occupy one or more lines. SynEdit blocks, which occupy a line, are not considered (not generate fold marks).</text:p>
        </text:list-item>
        <text:list-item>
          <text:p text:style-name="P232">SynEdit blocks basically are used to implement the code folding functionality. TSynFacilSyn blocks, define regions of semantic meaning.</text:p>
        </text:list-item>
      </text:list>
      <text:p text:style-name="P159"/>
      <text:p text:style-name="P159">Internally the blocks and sections TSynFacilSyn share the same structure. Are implemented with a class:</text:p>
      <text:p text:style-name="P159"/>
      <text:p text:style-name="P159"/>
      <text:p text:style-name="P117"><text:span text:style-name="T38"><text:s text:c="2"/></text:span><text:span text:style-name="T26">TFaSynBlock </text:span><text:span text:style-name="T79">=</text:span><text:span text:style-name="T26"> </text:span><text:span text:style-name="T11">class </text:span><text:span text:style-name="T92">//</text:span><text:span text:style-name="T96">class to handle syntax blocks</text:span></text:p>
      <text:p text:style-name="P117"><text:span text:style-name="T38"><text:s text:c="4"/></text:span><text:span text:style-name="T11">name </text:span><text:span text:style-name="T79">:</text:span><text:span text:style-name="T26"> </text:span><text:span text:style-name="T11">string</text:span><text:span text:style-name="T79">;</text:span><text:span text:style-name="T26"> </text:span><text:span text:style-name="T92">//</text:span><text:span text:style-name="T96">block name</text:span></text:p>
      <text:p text:style-name="P117"><text:span text:style-name="T38"><text:s text:c="4"/></text:span><text:span text:style-name="T26">dStart, dEnd</text:span><text:span text:style-name="T79">:</text:span><text:span text:style-name="T26"> </text:span><text:span text:style-name="T11">string</text:span><text:span text:style-name="T79">;</text:span><text:span text:style-name="T26"> </text:span><text:span text:style-name="T92">//</text:span><text:span text:style-name="T96">delimiters</text:span></text:p>
      <text:p text:style-name="P117"><text:span text:style-name="T38"><text:s text:c="4"/></text:span><text:span text:style-name="T11">index </text:span><text:span text:style-name="T79">:</text:span><text:span text:style-name="T26"> integer</text:span><text:span text:style-name="T79">;</text:span><text:span text:style-name="T26"> </text:span><text:span text:style-name="T92">//</text:span><text:span text:style-name="T96">indicates its position within TFaListBlocks</text:span></text:p>
      <text:p text:style-name="P117"><text:span text:style-name="T38"><text:s text:c="4"/></text:span><text:span text:style-name="T26">showFold </text:span><text:span text:style-name="T79">:</text:span><text:span text:style-name="T26"> boolean</text:span><text:span text:style-name="T79">;</text:span><text:span text:style-name="T26"> </text:span><text:span text:style-name="T92">//</text:span><text:span text:style-name="T96">indicates whether the fold mark is displayed</text:span></text:p>
      <text:p text:style-name="P117"><text:soft-page-break/><text:span text:style-name="T38"><text:s text:c="4"/></text:span><text:span text:style-name="T26">parentBlk </text:span><text:span text:style-name="T79">:</text:span><text:span text:style-name="T26"> TFaSynBlock</text:span><text:span text:style-name="T79">;</text:span><text:span text:style-name="T26"> </text:span><text:span text:style-name="T92">//</text:span><text:span text:style-name="T96">parent block </text:span><text:span text:style-name="T92">(</text:span><text:span text:style-name="T96">where the block is valid</text:span><text:span text:style-name="T92">)</text:span></text:p>
      <text:p text:style-name="P117"><text:span text:style-name="T38"><text:s text:c="4"/></text:span><text:span text:style-name="T26">Backcol </text:span><text:span text:style-name="T79">:</text:span><text:span text:style-name="T26"> TColor</text:span><text:span text:style-name="T79">;</text:span><text:span text:style-name="T26"> </text:span><text:span text:style-name="T92">//</text:span><text:span text:style-name="T96">background color of a block</text:span></text:p>
      <text:p text:style-name="P117"><text:span text:style-name="T38"><text:s text:c="4"/></text:span><text:span text:style-name="T26">IsSection </text:span><text:span text:style-name="T79">:</text:span><text:span text:style-name="T26"> boolean</text:span><text:span text:style-name="T79">;</text:span><text:span text:style-name="T26"> </text:span><text:span text:style-name="T92">//</text:span><text:span text:style-name="T96">indicates whether a block of type section</text:span></text:p>
      <text:p text:style-name="P117"><text:span text:style-name="T38"><text:s text:c="4"/></text:span><text:span text:style-name="T26">UniqSec </text:span><text:span text:style-name="T79">:</text:span><text:span text:style-name="T26"> boolean</text:span><text:span text:style-name="T79">;</text:span><text:span text:style-name="T26"> </text:span><text:span text:style-name="T92">//</text:span><text:span text:style-name="T96">Indica is only section</text:span></text:p>
      <text:p text:style-name="P117"><text:span text:style-name="T38"><text:s text:c="2"/></text:span><text:span text:style-name="T11">end</text:span><text:span text:style-name="T79">;</text:span></text:p>
      <text:p text:style-name="P159"/>
      <text:p text:style-name="P159">Each new block created (or section), dynamically generates a new object TFaSynBlock. The only internal difference between a block and a section is that this is the "IsSection" field to TRUE, and therefore makes sense the "UniqSec" field.</text:p>
      <text:p text:style-name="P159"/>
      <text:p text:style-name="P159">For handling blocks, additional fields are used in the records "TTokSpec"</text:p>
      <text:p text:style-name="P159"/>
      <text:p text:style-name="P117"><text:span text:style-name="T26">TTokSpec </text:span><text:span text:style-name="T79">=</text:span><text:span text:style-name="T26"> </text:span><text:span text:style-name="T11">record</text:span></text:p>
      <text:p text:style-name="P123">...</text:p>
      <text:p text:style-name="P117"><text:span text:style-name="T38"><text:s text:c="2"/></text:span><text:span text:style-name="T92">//</text:span><text:span text:style-name="T96">handling properties and bending code block</text:span></text:p>
      <text:p text:style-name="P117"><text:span text:style-name="T38"><text:s text:c="2"/></text:span><text:span text:style-name="T26">openBlk </text:span><text:span text:style-name="T79">:</text:span><text:span text:style-name="T26"> boolean</text:span><text:span text:style-name="T79">;</text:span><text:span text:style-name="T26"> </text:span><text:span text:style-name="T92">//</text:span><text:span text:style-name="T96">indicates whether the token is starting block folding</text:span></text:p>
      <text:p text:style-name="P117"><text:span text:style-name="T38"><text:s text:c="2"/></text:span><text:span text:style-name="T26">BlksToOpen</text:span><text:span text:style-name="T79">:</text:span><text:span text:style-name="T26"> </text:span><text:span text:style-name="T11">array of </text:span><text:span text:style-name="T26">TFaSynBlock</text:span><text:span text:style-name="T79">;</text:span><text:span text:style-name="T26"> </text:span><text:span text:style-name="T92">//</text:span><text:span text:style-name="T96">list of references to blocks that opens</text:span></text:p>
      <text:p text:style-name="P117"><text:span text:style-name="T38"><text:s text:c="2"/></text:span><text:span text:style-name="T26">closeBlk </text:span><text:span text:style-name="T79">:</text:span><text:span text:style-name="T26"> boolean</text:span><text:span text:style-name="T79">;</text:span><text:span text:style-name="T26"> </text:span><text:span text:style-name="T92">//</text:span><text:span text:style-name="T96">indicates whether the token is to block folding</text:span></text:p>
      <text:p text:style-name="P117"><text:span text:style-name="T38"><text:s text:c="2"/></text:span><text:span text:style-name="T26">BlksToClose</text:span><text:span text:style-name="T79">:</text:span><text:span text:style-name="T26"> </text:span><text:span text:style-name="T11">array of </text:span><text:span text:style-name="T26">TFaSynBlock</text:span><text:span text:style-name="T79">;</text:span><text:span text:style-name="T26"> </text:span><text:span text:style-name="T92">//</text:span><text:span text:style-name="T96">list of references to blocks that closes</text:span></text:p>
      <text:p text:style-name="P117"><text:span text:style-name="T38"><text:s text:c="2"/></text:span><text:span text:style-name="T26">OpenSec </text:span><text:span text:style-name="T79">:</text:span><text:span text:style-name="T26"> boolean</text:span><text:span text:style-name="T79">;</text:span><text:span text:style-name="T26"> </text:span><text:span text:style-name="T92">//</text:span><text:span text:style-name="T96">indicates whether the token is starting block section</text:span></text:p>
      <text:p text:style-name="P117"><text:span text:style-name="T38"><text:s text:c="2"/></text:span><text:span text:style-name="T26">SecsToOpen </text:span><text:span text:style-name="T79">:</text:span><text:span text:style-name="T26"> </text:span><text:span text:style-name="T11">array of </text:span><text:span text:style-name="T26">TFaSynBlock</text:span><text:span text:style-name="T79">;</text:span><text:span text:style-name="T92">//</text:span><text:span text:style-name="T96">list of blocks which is the beginning of section</text:span></text:p>
      <text:p text:style-name="P117"><text:span text:style-name="T11">end</text:span><text:span text:style-name="T79">;</text:span></text:p>
      <text:p text:style-name="P75"/>
      <text:p text:style-name="P75">Each, when a new section or block adds, delimiters are also added as special tokens (identifiers and symbols), if they did not exist, and block properties are configured.</text:p>
      <text:p text:style-name="P75"/>
      <text:p text:style-name="P75">Block handling management is independent tokens. Recognition of tokens is a separate task that is done by specialized routines. Blocks working on these routines, without interfering in their work.</text:p>
      <text:p text:style-name="P75"/>
      <text:p text:style-name="P75">The processing of blocks and sections, introduces an additional charge to the highlighter, but in heavy tests, could be estimated that the performance is as good (or even better) as fixed highlighters that come with Lazarus. </text:p>
      <text:p text:style-name="P75"/>
      <text:p text:style-name="P75">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5"/>
      <text:p text:style-name="P74"><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128"><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5"/>
      <text:p text:style-name="P75">The blocks are always open, calling StartCodeFoldBlock() and always close, calling EndCodeFoldBlock(), regardless whether to display or not fold mark.</text:p>
      <text:p text:style-name="P75"/>
      <text:p text:style-name="P74"><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128"><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5"/>
      <text:p text:style-name="P75">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5"/>
      <text:p text:style-name="P75">A table could help and explain the situation:</text:p>
      <text:p text:style-name="P75"/>
      <text:p text:style-name="P75"/>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0">DELIMITER</text:p>
          </table:table-cell>
          <table:table-cell table:style-name="Table20.A1" office:value-type="string">
            <text:p text:style-name="P40">TYPE</text:p>
          </table:table-cell>
          <table:table-cell table:style-name="Table20.A1" office:value-type="string">
            <text:p text:style-name="P40">THE BLOCK OPENS ..</text:p>
          </table:table-cell>
          <table:table-cell table:style-name="Table20.D1" office:value-type="string">
            <text:p text:style-name="P40">THE BLOCK SHOULD OPEN ..</text:p>
          </table:table-cell>
        </table:table-row>
        <table:table-row table:style-name="Table20.1">
          <table:table-cell table:style-name="Table20.A1" office:value-type="string">
            <text:p text:style-name="P37">Of Start</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Before identifying the token !!!!</text:p>
          </table:table-cell>
        </table:table-row>
        <table:table-row table:style-name="Table20.1">
          <table:table-cell table:style-name="Table20.A1" office:value-type="string">
            <text:p text:style-name="P37">Of End</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After identifying the token</text:p>
          </table:table-cell>
        </table:table-row>
      </table:table>
      <text:p text:style-name="P75"/>
      <text:p text:style-name="P75"/>
      <text:p text:style-name="P75">This method works well for blocks that that have delimiter tokens defined, and the gap when opening the block, is not notorious for folding purposes. </text:p>
      <text:p text:style-name="P75"><text:soft-page-break/></text:p>
      <text:p text:style-name="P75">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5"/>
      <text:p text:style-name="P75">For better understanding, consider the following picture:</text:p>
      <text:p text:style-name="P75"/>
      <text:p text:style-name="P75"><draw:frame draw:style-name="fr4" draw:name="Image33" text:anchor-type="as-char" svg:width="9.816cm" svg:height="5.847cm" draw:z-index="91"><draw:image xlink:href="Pictures/1000000000000173000000DDE75B9F29C70A01C1.png" xlink:type="simple" xlink:show="embed" xlink:actuate="onLoad"/></draw:frame></text:p>
      <text:p text:style-name="P75"/>
      <text:p text:style-name="P75">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5"/>
      <text:p text:style-name="P75">So far, it has kept this "defect". But it is known that it is possible to implement more elaborate mechanisms to properly close the fold in the case of sections (as supposed highlighter Pascal Lazarus do).</text:p>
      <text:p text:style-name="P75"/>
      <text:list xml:id="list230305202693425" text:continue-list="list230305186751541" text:style-name="WW8Num24">
        <text:list-item>
          <text:list>
            <text:list-item>
              <text:h text:style-name="P246" text:outline-level="2"><text:bookmark-start text:name="__RefHeading___Toc404419532"/>Colored blocks<text:bookmark-end text:name="__RefHeading___Toc404419532"/></text:h>
            </text:list-item>
          </text:list>
        </text:list-item>
      </text:list>
      <text:p text:style-name="P75"/>
      <text:p text:style-name="P75">The functionality of colored blocks allows us to see the physical boundaries of the blocks in the editor, but this is basically an illusion.</text:p>
      <text:p text:style-name="P75"/>
      <text:p text:style-name="P75">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75"/>
      <text:p text:style-name="P75">The boundaries of TSynFacilSyn blocks are defined at runtime, when the token are scanned, as highlighters have the token as the smallest unit of exploration.</text:p>
      <text:p text:style-name="P75"/>
      <text:p text:style-name="P75">To better visualize the scanning process, consider the following sequence diagram:</text:p>
      <text:p text:style-name="P80"><text:s text:c="2"/></text:p>
      <text:p text:style-name="P91"><draw:frame draw:style-name="fr36" draw:name="Object28" text:anchor-type="as-char" svg:width="10.183cm" svg:height="8.98cm" draw:z-index="44"><draw:object-ole xlink:href="./Object 28" xlink:type="simple" xlink:show="embed" xlink:actuate="onLoad"/><draw:image xlink:href="./ObjectReplacements/Object 28" xlink:type="simple" xlink:show="embed" xlink:actuate="onLoad"/></draw:frame></text:p>
      <text:p text:style-name="P75"/>
      <text:p text:style-name="P75">Drawing a complete token is performed after SynEdit call GetTokenEx() and GetTokenAttribute(). Therefore, if we want to change the attribute of the token, it must be done before returning the attribute with GetTokenAttribute().</text:p>
      <text:p text:style-name="P75"/>
      <text:p text:style-name="P75">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5"/>
      <text:p text:style-name="P75">The following diagram shows the sequence in the opening and closing of blocks:</text:p>
      <text:p text:style-name="P75"/>
      <text:p text:style-name="P91"><text:soft-page-break/><draw:frame draw:style-name="fr37" draw:name="Object29" text:anchor-type="as-char" svg:width="12.875cm" svg:height="9.977cm" draw:z-index="45"><draw:object-ole xlink:href="./Object 29" xlink:type="simple" xlink:show="embed" xlink:actuate="onLoad"/><draw:image xlink:href="./ObjectReplacements/Object 29" xlink:type="simple" xlink:show="embed" xlink:actuate="onLoad"/></draw:frame></text:p>
      <text:p text:style-name="P75"/>
      <text:p text:style-name="P74"><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128"><text:s/></text:span>Unfortunately change the background attribute tokens, leading to a loss of information background color of the tokens (remains as a pendant, solving this fault).</text:p></text:note-body></text:note></text:span></text:span><text:span text:style-name="T6">.</text:span></text:p>
      <text:p text:style-name="P75"/>
      <text:p text:style-name="P75">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5"/>
      <text:p text:style-name="P117"><text:span text:style-name="T10">function </text:span><text:span text:style-name="T25">TSynFacilSyn.GetTokenAttribute</text:span><text:span text:style-name="T78">:</text:span><text:span text:style-name="T25"> TSynHighlighterAttributes</text:span><text:span text:style-name="T78">;</text:span></text:p>
      <text:p text:style-name="P130">{Must return the attribute for the current token. The current token is updated</text:p>
      <text:p text:style-name="P117"><text:span text:style-name="T99"><text:s/></text:span><text:span text:style-name="T95">with each call to "Next" (or "setline" to the first token of the line.)</text:span></text:p>
      <text:p text:style-name="P130">This function is, what usually SynEdit uses, to define the attribute of the current token}</text:p>
      <text:p text:style-name="P117"><text:span text:style-name="T10">var </text:span><text:span text:style-name="T25">Topblock</text:span><text:span text:style-name="T78">:</text:span><text:span text:style-name="T25"> TFaSynBlock</text:span><text:span text:style-name="T78">;</text:span></text:p>
      <text:p text:style-name="P128">begin</text:p>
      <text:p text:style-name="P117"><text:span text:style-name="T37"><text:s text:c="2"/></text:span><text:span text:style-name="T25">Result </text:span><text:span text:style-name="T78">: =</text:span><text:span text:style-name="T25"> fTokenID</text:span><text:span text:style-name="T78">;</text:span><text:span text:style-name="T25"> </text:span><text:span text:style-name="T91">//</text:span><text:span text:style-name="T95">might return "t</text:span><text:span text:style-name="T98">n</text:span><text:span text:style-name="T95">Eol"</text:span></text:p>
      <text:p text:style-name="P117"><text:span text:style-name="T37"><text:s text:c="2"/></text:span><text:span text:style-name="T10">if </text:span><text:span text:style-name="T25">Result</text:span><text:span text:style-name="T78">&lt;&gt;</text:span><text:span text:style-name="T25"> </text:span><text:span text:style-name="T10">nil then begin</text:span></text:p>
      <text:p text:style-name="P117"><text:span text:style-name="T37"><text:s text:c="4"/></text:span><text:span text:style-name="T91">//</text:span><text:span text:style-name="T95">colored block verifies</text:span></text:p>
      <text:p text:style-name="P117"><text:span text:style-name="T37"><text:s text:c="4"/></text:span><text:span text:style-name="T10">case </text:span><text:span text:style-name="T25">ColBlock </text:span><text:span text:style-name="T10">of</text:span></text:p>
      <text:p text:style-name="P117"><text:span text:style-name="T37"><text:s text:c="4"/></text:span><text:span text:style-name="T25">cbLevel</text:span><text:span text:style-name="T78">:</text:span><text:span text:style-name="T25"> </text:span><text:span text:style-name="T10">begin <text:s/></text:span><text:span text:style-name="T91">//</text:span><text:span text:style-name="T95">paint by level</text:span></text:p>
      <text:p text:style-name="P117"><text:soft-page-break/><text:span text:style-name="T37"><text:s text:c="8"/></text:span><text:span text:style-name="T25">Result.Background</text:span><text:span text:style-name="T78">: =</text:span><text:span text:style-name="T25">RGB</text:span><text:span text:style-name="T78">(</text:span><text:span text:style-name="T25">255</text:span><text:span text:style-name="T78">-</text:span><text:span text:style-name="T25"> CodeFoldRange.CodeFoldStackSize</text:span><text:span text:style-name="T78">*</text:span><text:span text:style-name="T25">25.255</text:span><text:span text:style-name="T78">-</text:span><text:span text:style-name="T25"> CodeFoldRange.CodeFoldStackSize</text:span><text:span text:style-name="T78">*</text:span><text:span text:style-name="T25">25.255</text:span><text:span text:style-name="T78">);</text:span></text:p>
      <text:p text:style-name="P117"><text:span text:style-name="T37"><text:s text:c="6"/></text:span><text:span text:style-name="T10">end</text:span><text:span text:style-name="T78">;</text:span></text:p>
      <text:p text:style-name="P117"><text:span text:style-name="T37"><text:s text:c="4"/></text:span><text:span text:style-name="T25">cbBlock</text:span><text:span text:style-name="T78">:</text:span><text:span text:style-name="T25"> </text:span><text:span text:style-name="T10">begin </text:span><text:span text:style-name="T91">//</text:span><text:span text:style-name="T95">paint by block type</text:span></text:p>
      <text:p text:style-name="P117"><text:span text:style-name="T37"><text:s text:c="8"/></text:span><text:span text:style-name="T25">Topblock </text:span><text:span text:style-name="T78">: =</text:span><text:span text:style-name="T25"> TFaSynBlock</text:span><text:span text:style-name="T78">(</text:span><text:span text:style-name="T25">TopCodeFoldBlockType</text:span><text:span text:style-name="T78">);</text:span></text:p>
      <text:p text:style-name="P117"><text:span text:style-name="T37"><text:s text:c="8"/></text:span><text:span text:style-name="T10">if </text:span><text:span text:style-name="T25">Topblock</text:span><text:span text:style-name="T78">=</text:span><text:span text:style-name="T25"> </text:span><text:span text:style-name="T10">nil then </text:span><text:span text:style-name="T25">Topblock </text:span><text:span text:style-name="T78">: =</text:span><text:span text:style-name="T25"> MainBlk</text:span><text:span text:style-name="T78">;</text:span></text:p>
      <text:p text:style-name="P117"><text:span text:style-name="T37"><text:s text:c="8"/></text:span><text:span text:style-name="T25">Result.Background</text:span><text:span text:style-name="T78">: =</text:span><text:span text:style-name="T25">topBlock.BackCol</text:span><text:span text:style-name="T78">;</text:span></text:p>
      <text:p text:style-name="P117"><text:span text:style-name="T37"><text:s text:c="6"/></text:span><text:span text:style-name="T10">end</text:span><text:span text:style-name="T78">;</text:span></text:p>
      <text:p text:style-name="P117"><text:span text:style-name="T37"><text:s text:c="4"/></text:span><text:span text:style-name="T10">end</text:span><text:span text:style-name="T78">;</text:span></text:p>
      <text:p text:style-name="P117"><text:span text:style-name="T37"><text:s text:c="2"/></text:span><text:span text:style-name="T10">end</text:span><text:span text:style-name="T78">;</text:span></text:p>
      <text:p text:style-name="P117"><text:span text:style-name="T10">end</text:span><text:span text:style-name="T78">;</text:span></text:p>
      <text:p text:style-name="P75"/>
      <text:p text:style-name="P75">The choice of colored "cbBlock" reads the "current" block (last open block) using TopCodeFoldBlockType(). This implies that the current block, remains open (do not call EndCodeFoldBlock() until it has been called GetTokenAttribute().</text:p>
      <text:p text:style-name="P75"/>
      <text:p text:style-name="P75">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5"/>
      <text:p text:style-name="P75">Therefore, for colored block, we have the opposite effect, with respect to the detection of blocks (see previous section), in determining the block boundaries. </text:p>
      <text:p text:style-name="P75"/>
      <text:p text:style-name="P74"><text:span text:style-name="T6">To address this gap, is that the closure of a block, is postponed until reading the next token. That is why it has been created the flag "BlkToClose", and ends to close the block on "Next"</text:span><text:span text:style-name="Footnote_20_anchor"><text:span text:style-name="T129"><text:note text:id="ftn15" text:note-class="footnote"><text:note-citation>15</text:note-citation><text:note-body><text:p text:style-name="P7"><text:span text:style-name="T128"><text:s/>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5"/>
      <text:p text:style-name="P75">The variable "BlkToClose" It is actually a pointer to the current block, which is expected to close. When there is not block on hold, it is NIL.</text:p>
      <text:p text:style-name="P75"/>
      <text:p text:style-name="P75">The following diagram shows how the current sequence:</text:p>
      <text:p text:style-name="P75"/>
      <text:p text:style-name="P91"><text:soft-page-break/><draw:frame draw:style-name="fr38" draw:name="Object30" text:anchor-type="as-char" svg:width="12.845cm" svg:height="12.414cm" draw:z-index="46"><draw:object-ole xlink:href="./Object 30" xlink:type="simple" xlink:show="embed" xlink:actuate="onLoad"/><draw:image xlink:href="./ObjectReplacements/Object 30" xlink:type="simple" xlink:show="embed" xlink:actuate="onLoad"/></draw:frame></text:p>
      <text:p text:style-name="P75"/>
      <text:p text:style-name="P75">As "BlkToClose" is a variable whose life should not exceed one line, it always starts in Setline().</text:p>
      <text:p text:style-name="P75"/>
      <text:p text:style-name="P75">You can then see that all machinery for opening/closing block, exists only within the method <text:s/>Next(). The extension of a block are not stored anywhere in TSynFacilSyn. The block has a lifetime in the text scanning process.</text:p>
      <text:p text:style-name="P75"/>
      <text:p text:style-name="P75">Colored function block uses this information to change the background color of the tokens, on the fly, when you call GetTokenAttribute().</text:p>
      <text:p text:style-name="P75"/>
      <text:list xml:id="list230305455077433" text:continue-numbering="true" text:style-name="WW8Num24">
        <text:list-item>
          <text:list>
            <text:list-item>
              <text:h text:style-name="P246" text:outline-level="2"><text:bookmark-start text:name="__RefHeading___Toc404419533"/>Blocks and Ranges<text:bookmark-end text:name="__RefHeading___Toc404419533"/></text:h>
            </text:list-item>
          </text:list>
        </text:list-item>
      </text:list>
      <text:p text:style-name="P75"/>
      <text:p text:style-name="P75">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5"/>
      <text:p text:style-name="P75">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5"/>
      <text:list xml:id="list230305741271297" text:continue-numbering="true" text:style-name="WW8Num24">
        <text:list-item>
          <text:list>
            <text:list-item>
              <text:h text:style-name="P250" text:outline-level="2"><text:bookmark-start text:name="__RefHeading___Toc404419534"/>Speed ​​optimization<text:bookmark-end text:name="__RefHeading___Toc404419534"/></text:h>
            </text:list-item>
          </text:list>
        </text:list-item>
      </text:list>
      <text:p text:style-name="P75"/>
      <text:p text:style-name="P75">It is known that the greatest difficulty in implementing a highlighter to SynEdit is the speed of response, and that depends on how fast it is to identify the tokens. </text:p>
      <text:p text:style-name="P75"/>
      <text:p text:style-name="P75">Optimization has been made to recognize tokens, not for construction of the syntax.</text:p>
      <text:p text:style-name="P75"/>
      <text:p text:style-name="P74"><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 text:style-name="Internet_20_link" text:visited-style-name="Visited_20_Internet_20_Link"><text:span text:style-name="Internet_20_link"><text:span text:style-name="T6">http://forum.lazarus.freepascal.org/index.php?topic=22008.0</text:span></text:span></text:a><text:span text:style-name="T6"> ).</text:span></text:p>
      <text:p text:style-name="P75"/>
      <text:p text:style-name="P75">The method used, resembles a tree prefixes, but using only the first letter to improve identification of tokens. Quick Search This method applies to both identifiers as delimiters.</text:p>
      <text:p text:style-name="P75"/>
      <text:p text:style-name="P75">Consider the special identifiers are stored in one of the 58 special tables are reserved. This separation is done to speed up the identification of specific identifiers.</text:p>
      <text:p text:style-name="P75"/>
      <text:p text:style-name="P75">The idea is to use the initial character (line analyzed), to determine quickly to routine processing token is derived (using the method table). As each routine, it's only specialized in identifying a small group of identifiers, so it can be done quickly.</text:p>
      <text:p text:style-name="P75"/>
      <text:p text:style-name="P75">To be able to quickly identify the characters that may be part of an identifier, it is used an array of Boolean values (CharsIdentif []).</text:p>
      <text:p text:style-name="P75"/>
      <text:p text:style-name="P75">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5"/>
      <text:p text:style-name="P75">The highlighter works according to the rules described in this document, if you modify a feature, this document should be updated.</text:p>
      <text:p text:style-name="P75"/>
      <text:p text:style-name="P75">To expand the list of characters available for the initial character of an identifier must be modified "AgregaIdenEspec" and create the appropriate method (metXXX) and create the new tables.</text:p>
      <text:p text:style-name="P75"/>
      <text:list xml:id="list230306940724789" text:continue-numbering="true" text:style-name="WW8Num24">
        <text:list-item>
          <text:list>
            <text:list-item>
              <text:h text:style-name="P246" text:outline-level="2"><text:bookmark-start text:name="__RefHeading___Toc404419535"/><text:soft-page-break/><text:s/>Lightening the highlighter<text:bookmark-end text:name="__RefHeading___Toc404419535"/></text:h>
            </text:list-item>
          </text:list>
        </text:list-item>
      </text:list>
      <text:p text:style-name="P174"/>
      <text:p text:style-name="P75">The unit highlighter is a fairly quick and relatively light in terms of memory space code. But if you want to make it more compact, whether for performance issues or simplification, you can easily remove certain functionalities.</text:p>
      <text:p text:style-name="P75"/>
      <text:list xml:id="list230306565268904" text:continue-numbering="true" text:style-name="WW8Num24">
        <text:list-item>
          <text:list>
            <text:list-item>
              <text:list>
                <text:list-item>
                  <text:h text:style-name="P256" text:outline-level="3"><text:bookmark-start text:name="__RefHeading___Toc404419536"/>Functionality "CaseSensitive". <text:bookmark-end text:name="__RefHeading___Toc404419536"/></text:h>
                </text:list-item>
              </text:list>
            </text:list-item>
          </text:list>
        </text:list-item>
      </text:list>
      <text:p text:style-name="P82"/>
      <text:p text:style-name="P75">This option requires the use of 26 more tables within the unit. If this option is not desired and only want to process tokens ignoring case, you must drop the tables:</text:p>
      <text:p text:style-name="P75"/>
      <text:p text:style-name="P108">mA_, mB_, mC_, mD_, mE_, mF_, mG_, mH_, </text:p>
      <text:p text:style-name="P49"><text:tab/>mI_, mJ_, mK_, mL_, mM_, mN_, mO_, mP_, </text:p>
      <text:p text:style-name="P49"><text:tab/>mQ_, mR_, mS_, mT_, mU_, mV_, mW_, mX_, mY_, mZ_</text:p>
      <text:p text:style-name="P75"/>
      <text:p text:style-name="P75">And also the CaseSensitive field, then go selectively removing the code that makes use of these data. </text:p>
      <text:p text:style-name="P75"/>
      <text:p text:style-name="P75">The metA_, metB_ ... methods also must be removed.</text:p>
      <text:p text:style-name="P75"/>
      <text:p text:style-name="P75">The simplest way would be to eliminate the variables listed and then compile to see what part of the code these variables are used. </text:p>
      <text:p text:style-name="P75"/>
      <text:p text:style-name="P75">In the case of "CaseSensitive" would work just because he is a Boolean variable, then would proceed to the simplification using the slogan "assume that the variable will always FALSE". For example, the following code:</text:p>
      <text:p text:style-name="P75"/>
      <text:p text:style-name="P117"><text:span text:style-name="T11">If </text:span><text:span text:style-name="T26">CaseSensitive </text:span><text:span text:style-name="T11">then a</text:span></text:p>
      <text:p text:style-name="P117"><text:span text:style-name="T38"><text:s text:c="2"/></text:span><text:span text:style-name="T26">{Part </text:span><text:span text:style-name="T11">TRUE</text:span><text:span text:style-name="T26">}</text:span></text:p>
      <text:p text:style-name="P127">else</text:p>
      <text:p text:style-name="P117"><text:span text:style-name="T38"><text:s text:c="2"/></text:span><text:span text:style-name="T26">{Part </text:span><text:span text:style-name="T11">FALSE</text:span><text:span text:style-name="T26">}</text:span></text:p>
      <text:p text:style-name="P75"/>
      <text:p text:style-name="P75">It will be like:</text:p>
      <text:p text:style-name="P75"/>
      <text:p text:style-name="P117"><text:span text:style-name="T38"><text:s text:c="2"/></text:span><text:span text:style-name="T26">{Part </text:span><text:span text:style-name="T11">FALSE</text:span><text:span text:style-name="T26">}</text:span></text:p>
      <text:p text:style-name="P75"/>
      <text:p text:style-name="P75"><text:soft-page-break/>If desired, further simplification can also eliminate the variable "tCasSen" from "FirstXMLExplor" and its associated code.</text:p>
      <text:p text:style-name="P75"/>
      <text:p text:style-name="P75">After this simplification, the code should be reduced by about 100 lines. It is also believed that improved highlighter speed between 1 and about 2%.</text:p>
      <text:p text:style-name="P75"/>
      <text:list xml:id="list230306915464564" text:continue-numbering="true" text:style-name="WW8Num24">
        <text:list-item>
          <text:list>
            <text:list-item>
              <text:list>
                <text:list-item>
                  <text:h text:style-name="P256" text:outline-level="3"><text:bookmark-start text:name="__RefHeading___Toc404419538"/>Management of sections<text:bookmark-end text:name="__RefHeading___Toc404419538"/></text:h>
                </text:list-item>
              </text:list>
            </text:list-item>
          </text:list>
        </text:list-item>
      </text:list>
      <text:p text:style-name="P36"/>
      <text:p text:style-name="P75">If you only want to use the handling blocks without sections, you can completely remove this functionality. </text:p>
      <text:p text:style-name="P75"/>
      <text:p text:style-name="P75">The additional code for the handling of the sections, is considerable. In addition there is an additional processing load.</text:p>
      <text:p text:style-name="P75"/>
      <text:p text:style-name="P75">To eliminate handling sections, we must first remove the properties of "TTokSpec" sections regarding "OpenSec" and "SecsToOpen". Also the properties of "TFaSynBlock" referring to sections: "IsSection" and "UniqSec". All code associated with these properties should be removed. It should also eliminate Addsection() method, and the code that processes sections LoadFromFile().</text:p>
      <text:p text:style-name="P75"/>
      <text:p text:style-name="P75">You can also remove only the characteristic of "First Section", removing the "firstSec" field of "TTokSpec" and all the associated code.</text:p>
      <text:p text:style-name="P75"/>
      <text:list xml:id="list230305318631888" text:continue-numbering="true" text:style-name="WW8Num24">
        <text:list-item>
          <text:list>
            <text:list-item>
              <text:list>
                <text:list-item>
                  <text:h text:style-name="P256" text:outline-level="3"><text:bookmark-start text:name="__RefHeading___Toc404419539"/>Folding functionality. <text:bookmark-end text:name="__RefHeading___Toc404419539"/></text:h>
                </text:list-item>
              </text:list>
            </text:list-item>
          </text:list>
        </text:list-item>
      </text:list>
      <text:p text:style-name="P36"/>
      <text:p text:style-name="P75">If the code folding functionality in any form is not required, can be completely eliminated this functionality. If so, would considerably reduce the size of the unit and the additional processing load. </text:p>
      <text:p text:style-name="P75"/>
      <text:p text:style-name="P75">However, removing TSynFacilSyn, folding, is to have a highlighter of type TsynFileSyn (An old version). So instead of manually delete all the properties and methods relating to fold better TSynFileSyn should use the highlighter, which is quite lighter.</text:p>
      <text:p text:style-name="P75"/>
      <text:list xml:id="list230305456257241" text:continue-numbering="true" text:style-name="WW8Num24">
        <text:list-item>
          <text:list>
            <text:list-item>
              <text:list>
                <text:list-item>
                  <text:h text:style-name="P256" text:outline-level="3"><text:bookmark-start text:name="__RefHeading___Toc404419540"/>Reading XML file<text:bookmark-end text:name="__RefHeading___Toc404419540"/></text:h>
                </text:list-item>
              </text:list>
            </text:list-item>
          </text:list>
        </text:list-item>
      </text:list>
      <text:p text:style-name="P36"/>
      <text:p text:style-name="P75"><text:soft-page-break/>In the unlikely case that is not going to set the highlighter using the XML file, and only desired to do so by instructions. You can remove all heavy machinery reading syntax file.</text:p>
      <text:p text:style-name="P75"/>
      <text:p text:style-name="P75">To begin, you must remove FirstXMLExplor() and LoadFromFile().</text:p>
      <text:p text:style-name="P75"/>
      <text:p text:style-name="P75">It should also eliminate TFaXMLatrib types and functions LeeAtrib(), IsAttributeName() and ValidateAtribs() because they would no longer be necessary.</text:p>
      <text:p text:style-name="P75"/>
      <text:p text:style-name="P75">The code is considerable saving of about 300 lines. The processing speed is not affected, because the main routines are not modified.</text:p>
      <text:p text:style-name="P174"/>
      <text:p text:style-name="P174"/>
      <text:p text:style-name="P197"/>
      <text:list xml:id="list230307070953360" text:continue-numbering="true" text:style-name="WW8Num24">
        <text:list-item>
          <text:list>
            <text:list-item>
              <text:h text:style-name="P246"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5"/>
      <text:p text:style-name="P75">The highlighter makes a compromise between speed and flexibility. Because of this, there are some trade-offs:</text:p>
      <text:p text:style-name="P104"/>
      <text:list xml:id="list2917193178758089237" text:style-name="WW8Num23">
        <text:list-item>
          <text:p text:style-name="P210">Only is permitted to define four tokens by content, in addition to the space reserved for identifiers. Creating more, it is easy, and only slightly loaded memory.</text:p>
        </text:list-item>
        <text:list-item>
          <text:p text:style-name="P210">You can not create subsets of tokens, for other tokens by content than are not identifiers or symbols.</text:p>
        </text:list-item>
        <text:list-item>
          <text:p text:style-name="P210">Block delimiters can not be of type "&lt;identifier&gt; &lt;space&gt; &lt;identifier&gt;". For example, you can not define "END IF" as delimiter block.</text:p>
        </text:list-item>
        <text:list-item>
          <text:p text:style-name="P210">The sections can not contain other sections. Currently the sections can only contain blocks, but no big problem.</text:p>
        </text:list-item>
        <text:list-item>
          <text:p text:style-name="P210">The handling of UTF-8 is still limited in the highlighter. </text:p>
        </text:list-item>
      </text:list>
      <text:list xml:id="list230306495980476" text:continue-list="list230307070953360" text:style-name="WW8Num24">
        <text:list-item>
          <text:list>
            <text:list-item>
              <text:h text:style-name="P250" text:outline-level="2"><text:bookmark-start text:name="__RefHeading___Toc404419542"/><text:s/>Pending improvements<text:bookmark-end text:name="__RefHeading___Toc404419542"/></text:h>
            </text:list-item>
          </text:list>
        </text:list-item>
      </text:list>
      <text:p text:style-name="P75"/>
      <text:p text:style-name="P75">There is always room for improvement. Listed are just a few that were always in mind when the highlighter was developed.</text:p>
      <text:p text:style-name="P75"/>
      <text:list xml:id="list230306529202270" text:continue-list="list230305437800972" text:style-name="WW8Num10">
        <text:list-item>
          <text:p text:style-name="P239"><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218">Deactivate the colored blocks, without creating new highlighter. Currently, when the colored block is activated, the background color information of all tokens are lost.</text:p>
        </text:list-item>
        <text:list-item>
          <text:p text:style-name="P218">Creating nested sections.</text:p>
        </text:list-item>
        <text:list-item>
          <text:p text:style-name="P218">Ability to define a special block for multiline tokens with folding support. Currently all multiline tokens share the same block "MulTokBlk".</text:p>
        </text:list-item>
        <text:list-item>
          <text:p text:style-name="P218">The definition of identifiers and special identifiers in UTF-8 can be improved.</text:p>
        </text:list-item>
      </text:list>
      <text:p text:style-name="P75"/>
      <text:p text:style-name="P75"/>
      <text:h text:style-name="P245"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04"><text:a xlink:type="simple" xlink:href="#__RefHeading___Toc404419443" text:style-name="Index_20_Link" text:visited-style-name="Index_20_Link">1Introduction<text:tab/>3</text:a></text:p>
          <text:p text:style-name="P204"><text:a xlink:type="simple" xlink:href="#__RefHeading___Toc404419445" text:style-name="Index_20_Link" text:visited-style-name="Index_20_Link">2Summary<text:tab/>5</text:a></text:p>
          <text:p text:style-name="P205"><text:a xlink:type="simple" xlink:href="#__RefHeading___Toc404419446" text:style-name="Index_20_Link" text:visited-style-name="Index_20_Link">2.1Use within a program.<text:tab/>5</text:a></text:p>
          <text:p text:style-name="P205"><text:a xlink:type="simple" xlink:href="#__RefHeading___Toc404419447" text:style-name="Index_20_Link" text:visited-style-name="Index_20_Link">2.2Configuration using syntax file<text:tab/>5</text:a></text:p>
          <text:p text:style-name="P205"><text:a xlink:type="simple" xlink:href="#__RefHeading___Toc404419448" text:style-name="Index_20_Link" text:visited-style-name="Index_20_Link">2.3Configuration using Code<text:tab/>6</text:a></text:p>
          <text:p text:style-name="P205"><text:a xlink:type="simple" xlink:href="#__RefHeading___Toc404419449" text:style-name="Index_20_Link" text:visited-style-name="Index_20_Link">2.4Changing attributes<text:tab/>6</text:a></text:p>
          <text:p text:style-name="P205"><text:a xlink:type="simple" xlink:href="#__RefHeading___Toc404419450" text:style-name="Index_20_Link" text:visited-style-name="Index_20_Link">2.5Code folding<text:tab/>8</text:a></text:p>
          <text:p text:style-name="P204"><text:a xlink:type="simple" xlink:href="#__RefHeading___Toc404419451" text:style-name="Index_20_Link" text:visited-style-name="Index_20_Link">3Understanding the syntax<text:tab/>9</text:a></text:p>
          <text:p text:style-name="P205"><text:a xlink:type="simple" xlink:href="#__RefHeading___Toc404419452" text:style-name="Index_20_Link" text:visited-style-name="Index_20_Link">3.1Syntax elements<text:tab/>9</text:a></text:p>
          <text:p text:style-name="P205"><text:a xlink:type="simple" xlink:href="#__RefHeading___Toc404419459" text:style-name="Index_20_Link" text:visited-style-name="Index_20_Link">3.2Special identifiers<text:tab/>18</text:a></text:p>
          <text:p text:style-name="P205"><text:a xlink:type="simple" xlink:href="#__RefHeading___Toc404419460" text:style-name="Index_20_Link" text:visited-style-name="Index_20_Link">3.3Special symbols<text:tab/>19</text:a></text:p>
          <text:p text:style-name="P205"><text:a xlink:type="simple" xlink:href="#__RefHeading___Toc404419461" text:style-name="Index_20_Link" text:visited-style-name="Index_20_Link">3.4Definition of tokens<text:tab/>20</text:a></text:p>
          <text:p text:style-name="P205"><text:a xlink:type="simple" xlink:href="#__RefHeading___Toc404419464" text:style-name="Index_20_Link" text:visited-style-name="Index_20_Link">3.5Token Delimiters<text:tab/>21</text:a></text:p>
          <text:p text:style-name="P205"><text:a xlink:type="simple" xlink:href="#__RefHeading___Toc404419465" text:style-name="Index_20_Link" text:visited-style-name="Index_20_Link">3.6Codeblocks<text:tab/>23</text:a></text:p>
          <text:p text:style-name="P205"><text:a xlink:type="simple" xlink:href="#__RefHeading___Toc404419466" text:style-name="Index_20_Link" text:visited-style-name="Index_20_Link">3.7Sections<text:tab/>24</text:a></text:p>
          <text:p text:style-name="P205"><text:a xlink:type="simple" xlink:href="#__RefHeading___Toc404419467" text:style-name="Index_20_Link" text:visited-style-name="Index_20_Link">3.8Lexical, syntactic and semantic levels<text:tab/>26</text:a></text:p>
          <text:p text:style-name="P204"><text:a xlink:type="simple" xlink:href="#__RefHeading___Toc404419468" text:style-name="Index_20_Link" text:visited-style-name="Index_20_Link">4Configuring Syntax using an external file.<text:tab/>28</text:a></text:p>
          <text:p text:style-name="P205"><text:a xlink:type="simple" xlink:href="#__RefHeading___Toc404419469" text:style-name="Index_20_Link" text:visited-style-name="Index_20_Link">4.1The syntax file<text:tab/>28</text:a></text:p>
          <text:p text:style-name="P205"><text:a xlink:type="simple" xlink:href="#__RefHeading___Toc404419476" text:style-name="Index_20_Link" text:visited-style-name="Index_20_Link">4.2Language Definition<text:tab/>35</text:a></text:p>
          <text:p text:style-name="P205"><text:a xlink:type="simple" xlink:href="#__RefHeading___Toc404419477" text:style-name="Index_20_Link" text:visited-style-name="Index_20_Link">4.3Setting attributes<text:tab/>36</text:a></text:p>
          <text:p text:style-name="P205"><text:a xlink:type="simple" xlink:href="#__RefHeading___Toc404419478" text:style-name="Index_20_Link" text:visited-style-name="Index_20_Link">4.4Defining Symbols<text:tab/>40</text:a></text:p>
          <text:p text:style-name="P205"><text:a xlink:type="simple" xlink:href="#__RefHeading___Toc404419480" text:style-name="Index_20_Link" text:visited-style-name="Index_20_Link">4.5Defining identifiers<text:tab/>43</text:a></text:p>
          <text:p text:style-name="P205"><text:a xlink:type="simple" xlink:href="#__RefHeading___Toc404419482" text:style-name="Index_20_Link" text:visited-style-name="Index_20_Link">4.5.2Special Identifiers<text:tab/>45</text:a></text:p>
          <text:p text:style-name="P205"><text:a xlink:type="simple" xlink:href="#__RefHeading___Toc404419484" text:style-name="Index_20_Link" text:visited-style-name="Index_20_Link">4.6Defining Tokens by content<text:tab/>50</text:a></text:p>
          <text:p text:style-name="P205"><text:a xlink:type="simple" xlink:href="#__RefHeading___Toc404419486" text:style-name="Index_20_Link" text:visited-style-name="Index_20_Link">4.7Definition of delimited Tokens<text:tab/>63</text:a></text:p>
          <text:p text:style-name="P205"><text:a xlink:type="simple" xlink:href="#__RefHeading__27878_2030348867" text:style-name="Index_20_Link" text:visited-style-name="Index_20_Link">4.7.1Escape character<text:tab/>65</text:a></text:p>
          <text:p text:style-name="P205"><text:a xlink:type="simple" xlink:href="#__RefHeading___Toc404419487" text:style-name="Index_20_Link" text:visited-style-name="Index_20_Link">4.8Defining strings<text:tab/>66</text:a></text:p>
          <text:p text:style-name="P205"><text:a xlink:type="simple" xlink:href="#__RefHeading___Toc404419488" text:style-name="Index_20_Link" text:visited-style-name="Index_20_Link">4.9Defining comments<text:tab/>66</text:a></text:p>
          <text:p text:style-name="P205"><text:a xlink:type="simple" xlink:href="#__RefHeading___Toc404419489" text:style-name="Index_20_Link" text:visited-style-name="Index_20_Link">4.10Block Definition<text:tab/>67</text:a></text:p>
          <text:p text:style-name="P205"><text:a xlink:type="simple" xlink:href="#__RefHeading___Toc404419490" text:style-name="Index_20_Link" text:visited-style-name="Index_20_Link">4.11Advanced Blocks<text:tab/>81</text:a></text:p>
          <text:p text:style-name="P205"><text:a xlink:type="simple" xlink:href="#__RefHeading___Toc404419493" text:style-name="Index_20_Link" text:visited-style-name="Index_20_Link">4.12 Defining Sections<text:tab/>84</text:a></text:p>
          <text:p text:style-name="P205"><text:a xlink:type="simple" xlink:href="#__RefHeading___Toc404419494" text:style-name="Index_20_Link" text:visited-style-name="Index_20_Link">4.12.1 First Section<text:tab/>89</text:a></text:p>
          <text:p text:style-name="P205"><text:a xlink:type="simple" xlink:href="#__RefHeading__27746_320519508" text:style-name="Index_20_Link" text:visited-style-name="Index_20_Link">4.12.2Blocks and sections<text:tab/>90</text:a></text:p>
          <text:p text:style-name="P204"><text:a xlink:type="simple" xlink:href="#__RefHeading___Toc404419495" text:style-name="Index_20_Link" text:visited-style-name="Index_20_Link">5Configuring the syntax using code<text:tab/>92</text:a></text:p>
          <text:p text:style-name="P205"><text:a xlink:type="simple" xlink:href="#__RefHeading__26456_417478401" text:style-name="Index_20_Link" text:visited-style-name="Index_20_Link">5.1Regular Expressions<text:tab/>94</text:a></text:p>
          <text:p text:style-name="P205"><text:a xlink:type="simple" xlink:href="#__RefHeading__26458_417478401" text:style-name="Index_20_Link" text:visited-style-name="Index_20_Link">5.2Error Handling<text:tab/>94</text:a></text:p>
          <text:p text:style-name="P205"><text:a xlink:type="simple" xlink:href="#__RefHeading___Toc404419496" text:style-name="Index_20_Link" text:visited-style-name="Index_20_Link">5.3Token types and attributes<text:tab/>95</text:a></text:p>
          <text:p text:style-name="P205"><text:soft-page-break/><text:a xlink:type="simple" xlink:href="#__RefHeading___Toc30865_1870574537" text:style-name="Index_20_Link" text:visited-style-name="Index_20_Link">5.4Configuring the attributes<text:tab/>96</text:a></text:p>
          <text:p text:style-name="P205"><text:a xlink:type="simple" xlink:href="#__RefHeading___Toc404419497" text:style-name="Index_20_Link" text:visited-style-name="Index_20_Link">5.5Defining identifiers<text:tab/>98</text:a></text:p>
          <text:p text:style-name="P205"><text:a xlink:type="simple" xlink:href="#__RefHeading___Toc404419500" text:style-name="Index_20_Link" text:visited-style-name="Index_20_Link">5.5.2Special Identifiers<text:tab/>102</text:a></text:p>
          <text:p text:style-name="P205"><text:a xlink:type="simple" xlink:href="#__RefHeading___Toc404419499" text:style-name="Index_20_Link" text:visited-style-name="Index_20_Link">5.6Defining Tokens by content<text:tab/>106</text:a></text:p>
          <text:p text:style-name="P205"><text:a xlink:type="simple" xlink:href="#__RefHeading___Toc404419502" text:style-name="Index_20_Link" text:visited-style-name="Index_20_Link">5.7Special Symbols<text:tab/>114</text:a></text:p>
          <text:p text:style-name="P205"><text:a xlink:type="simple" xlink:href="#__RefHeading___Toc404419503" text:style-name="Index_20_Link" text:visited-style-name="Index_20_Link">5.8Definition of Delimited Tokens<text:tab/>116</text:a></text:p>
          <text:p text:style-name="P205"><text:a xlink:type="simple" xlink:href="#__RefHeading__27880_2030348867" text:style-name="Index_20_Link" text:visited-style-name="Index_20_Link">5.8.1Escape character<text:tab/>118</text:a></text:p>
          <text:p text:style-name="P205"><text:a xlink:type="simple" xlink:href="#__RefHeading___Toc404419504" text:style-name="Index_20_Link" text:visited-style-name="Index_20_Link">5.9Considerations of delimited tokens<text:tab/>119</text:a></text:p>
          <text:p text:style-name="P205"><text:a xlink:type="simple" xlink:href="#__RefHeading___Toc404419505" text:style-name="Index_20_Link" text:visited-style-name="Index_20_Link">5.10Configuration Example<text:tab/>121</text:a></text:p>
          <text:p text:style-name="P205"><text:a xlink:type="simple" xlink:href="#__RefHeading___Toc404419506" text:style-name="Index_20_Link" text:visited-style-name="Index_20_Link">5.11Definition of blocks<text:tab/>123</text:a></text:p>
          <text:p text:style-name="P205"><text:a xlink:type="simple" xlink:href="#__RefHeading___Toc404419507" text:style-name="Index_20_Link" text:visited-style-name="Index_20_Link">5.12Blocks as objects<text:tab/>125</text:a></text:p>
          <text:p text:style-name="P205"><text:a xlink:type="simple" xlink:href="#__RefHeading___Toc404419508" text:style-name="Index_20_Link" text:visited-style-name="Index_20_Link">5.13Advanced Blocks<text:tab/>127</text:a></text:p>
          <text:p text:style-name="P205"><text:a xlink:type="simple" xlink:href="#__RefHeading___Toc404419509" text:style-name="Index_20_Link" text:visited-style-name="Index_20_Link">5.14Coloring of blocks<text:tab/>130</text:a></text:p>
          <text:p text:style-name="P205"><text:a xlink:type="simple" xlink:href="#__RefHeading___Toc404419510" text:style-name="Index_20_Link" text:visited-style-name="Index_20_Link">5.15Scope of a block<text:tab/>133</text:a></text:p>
          <text:p text:style-name="P205"><text:a xlink:type="simple" xlink:href="#__RefHeading___Toc404419511" text:style-name="Index_20_Link" text:visited-style-name="Index_20_Link">5.16Defining sections<text:tab/>136</text:a></text:p>
          <text:p text:style-name="P205"><text:a xlink:type="simple" xlink:href="#__RefHeading___Toc404419512" text:style-name="Index_20_Link" text:visited-style-name="Index_20_Link">5.17First Section<text:tab/>140</text:a></text:p>
          <text:p text:style-name="P205"><text:a xlink:type="simple" xlink:href="#__RefHeading___Toc404419513" text:style-name="Index_20_Link" text:visited-style-name="Index_20_Link">5.18Advanced sections<text:tab/>143</text:a></text:p>
          <text:p text:style-name="P205"><text:a xlink:type="simple" xlink:href="#__RefHeading___Toc404419514" text:style-name="Index_20_Link" text:visited-style-name="Index_20_Link">5.19Getting information about blocks<text:tab/>147</text:a></text:p>
          <text:p text:style-name="P205"><text:a xlink:type="simple" xlink:href="#__RefHeading___Toc404419521" text:style-name="Index_20_Link" text:visited-style-name="Index_20_Link">5.20Using the highlighter as lexical analyzer - syntactic<text:tab/>152</text:a></text:p>
          <text:p text:style-name="P205"><text:a xlink:type="simple" xlink:href="#__RefHeading__27882_2030348867" text:style-name="Index_20_Link" text:visited-style-name="Index_20_Link">5.20.4Tools for lexical analysis<text:tab/>159</text:a></text:p>
          <text:p text:style-name="P204"><text:a xlink:type="simple" xlink:href="#__RefHeading___Toc404419525" text:style-name="Index_20_Link" text:visited-style-name="Index_20_Link">6For developers<text:tab/>161</text:a></text:p>
          <text:p text:style-name="P205"><text:a xlink:type="simple" xlink:href="#__RefHeading___Toc404419526" text:style-name="Index_20_Link" text:visited-style-name="Index_20_Link">6.1Method table<text:tab/>161</text:a></text:p>
          <text:p text:style-name="P205"><text:a xlink:type="simple" xlink:href="#__RefHeading___Toc404419527" text:style-name="Index_20_Link" text:visited-style-name="Index_20_Link">6.2Defining identifiers<text:tab/>163</text:a></text:p>
          <text:p text:style-name="P205"><text:a xlink:type="simple" xlink:href="#__RefHeading___Toc404419528" text:style-name="Index_20_Link" text:visited-style-name="Index_20_Link">6.3Special Tokens<text:tab/>166</text:a></text:p>
          <text:p text:style-name="P205"><text:a xlink:type="simple" xlink:href="#__RefHeading__24389_277317671" text:style-name="Index_20_Link" text:visited-style-name="Index_20_Link">6.3.1Detection of Special Identifiers<text:tab/>168</text:a></text:p>
          <text:p text:style-name="P205"><text:a xlink:type="simple" xlink:href="#__RefHeading___Toc404419529" text:style-name="Index_20_Link" text:visited-style-name="Index_20_Link">6.4Definition of Other Token Types<text:tab/>172</text:a></text:p>
          <text:p text:style-name="P205"><text:a xlink:type="simple" xlink:href="#__RefHeading__25320_513627730" text:style-name="Index_20_Link" text:visited-style-name="Index_20_Link">6.5 Driving Ranges<text:tab/>180</text:a></text:p>
          <text:p text:style-name="P205"><text:a xlink:type="simple" xlink:href="#__RefHeading___Toc404419531" text:style-name="Index_20_Link" text:visited-style-name="Index_20_Link">6.6Blocks and Sections<text:tab/>183</text:a></text:p>
          <text:p text:style-name="P205"><text:a xlink:type="simple" xlink:href="#__RefHeading___Toc404419532" text:style-name="Index_20_Link" text:visited-style-name="Index_20_Link">6.7Colored blocks<text:tab/>186</text:a></text:p>
          <text:p text:style-name="P205"><text:a xlink:type="simple" xlink:href="#__RefHeading___Toc404419533" text:style-name="Index_20_Link" text:visited-style-name="Index_20_Link">6.8Blocks and Ranges<text:tab/>190</text:a></text:p>
          <text:p text:style-name="P205"><text:a xlink:type="simple" xlink:href="#__RefHeading___Toc404419534" text:style-name="Index_20_Link" text:visited-style-name="Index_20_Link">6.9Speed ​​optimization<text:tab/>192</text:a></text:p>
          <text:p text:style-name="P205"><text:a xlink:type="simple" xlink:href="#__RefHeading___Toc404419535" text:style-name="Index_20_Link" text:visited-style-name="Index_20_Link">6.10 Lightening the highlighter<text:tab/>193</text:a></text:p>
          <text:p text:style-name="P205"><text:a xlink:type="simple" xlink:href="#__RefHeading___Toc404419541" text:style-name="Index_20_Link" text:visited-style-name="Index_20_Link">6.11 Limitations<text:tab/>196</text:a></text:p>
          <text:p text:style-name="P205"><text:a xlink:type="simple" xlink:href="#__RefHeading___Toc404419542" text:style-name="Index_20_Link" text:visited-style-name="Index_20_Link">6.12 Pending improvements<text:tab/>197</text:a></text:p>
          <text:p text:style-name="P204"><text:a xlink:type="simple" xlink:href="#__RefHeading___Toc404419543" text:style-name="Index_20_Link" text:visited-style-name="Index_20_Link">Content<text:tab/>198</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arker_5f_0" draw:display-name="Marker_0"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left="1.16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552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9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328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style-name="Standaard"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ourier New1" fo:font-family="'Courier New'" style:font-family-generic="modern" fo:font-size="10pt" style:font-size-asian="10pt" style:language-asian="nl" style:country-asian="BE" style:font-name-complex="Courier New1" style:font-family-complex="'Courier New'" style:font-family-generic-complex="modern" style:font-size-complex="12pt"/>
    </style:style>
    <style:style style:name="WW8Num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0" style:family="text"/>
    <style:style style:name="WW8Num1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4z0" style:family="text">
      <style:text-properties fo:font-size="12pt" style:font-size-asian="12pt" style:font-size-complex="12pt"/>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_20_Car" style:display-name="HTML con formato previo Car" style:family="text">
      <style:text-properties style:font-name="Courier New1" fo:font-family="'Courier New'" style:font-family-generic="modern" style:font-name-asian="Times New Roman" style:font-family-asian="'Times New Roman'" style:font-family-generic-asian="roman" style:font-pitch-asian="variable" style:font-name-complex="Courier New1" style:font-family-complex="'Courier New'" style:font-family-generic-complex="modern"/>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8-10-21T23:03:03.374000000</dc:date>
    <meta:print-date>2014-11-22T11:52:00</meta:print-date>
    <meta:editing-cycles>217</meta:editing-cycles>
    <meta:editing-duration>P5DT10H38M33S</meta:editing-duration>
    <meta:generator>LibreOffice/5.1.6.2$Windows_x86 LibreOffice_project/07ac168c60a517dba0f0d7bc7540f5afa45f0909</meta:generator>
    <meta:document-statistic meta:table-count="27" meta:image-count="39" meta:object-count="35" meta:page-count="200" meta:paragraph-count="3460" meta:word-count="36720" meta:character-count="238088" meta:non-whitespace-character-count="200834"/>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